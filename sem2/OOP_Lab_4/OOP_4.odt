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8000001355600C77B.png" manifest:media-type="image/png"/>
  <manifest:file-entry manifest:full-path="Pictures/10000001000002640000012D14FD2A7D.png" manifest:media-type="image/png"/>
  <manifest:file-entry manifest:full-path="Pictures/100000010000066C00000BF0E191DE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  <style:text-properties officeooo:paragraph-rsid="00482439"/>
    </style:style>
    <style:style style:name="P9" style:family="paragraph" style:parent-style-name="List_20_Paragraph">
      <style:paragraph-properties fo:margin-left="0in" fo:text-align="justify" style:justify-single-word="false" fo:text-indent="0in" style:auto-text-indent="false"/>
      <style:text-properties officeooo:paragraph-rsid="004af9d1"/>
    </style:style>
    <style:style style:name="P10" style:family="paragraph" style:parent-style-name="Standard">
      <style:paragraph-properties fo:margin-left="0in" fo:text-align="justify" style:justify-single-word="false" fo:text-indent="0in" style:auto-text-indent="false"/>
      <style:text-properties officeooo:paragraph-rsid="004af9d1"/>
    </style:style>
    <style:style style:name="P11" style:family="paragraph" style:parent-style-name="Standard">
      <style:paragraph-properties fo:margin-left="0in" fo:text-align="justify" style:justify-single-word="false" fo:text-indent="0in" style:auto-text-indent="false"/>
      <style:text-properties fo:color="#000000" loext:opacity="100%" style:font-name="Times New Roman" fo:font-size="12pt" fo:font-style="normal" fo:font-weight="normal" officeooo:paragraph-rsid="004af9d1" style:font-size-asian="12pt" style:font-style-asian="normal" style:font-weight-asian="normal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4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5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3adf73" style:font-size-asian="14pt" style:font-name-complex="Times New Roman1" style:font-size-complex="14pt"/>
    </style:style>
    <style:style style:name="P16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419a16" officeooo:paragraph-rsid="00419a16" style:font-size-asian="14pt" style:font-name-complex="Times New Roman1" style:font-size-complex="14pt"/>
    </style:style>
    <style:style style:name="P17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3adf73" officeooo:paragraph-rsid="004ba345" style:font-size-asian="14pt" style:font-name-complex="Times New Roman1" style:font-size-complex="14pt"/>
    </style:style>
    <style:style style:name="P18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419a16" officeooo:paragraph-rsid="004ba345" style:font-size-asian="14pt" style:font-name-complex="Times New Roman1" style:font-size-complex="14pt"/>
    </style:style>
    <style:style style:name="P19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20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22" style:family="paragraph" style:parent-style-name="Standard">
      <style:text-properties fo:color="#000000" loext:opacity="100%" style:font-name="Cascadia Mono" fo:font-size="9.5pt" fo:language="en" fo:country="US" fo:font-weight="bold" officeooo:rsid="004af9d1" officeooo:paragraph-rsid="004af9d1" fo:background-color="#ffffff" style:font-size-asian="9.5pt" style:font-weight-asian="bold" style:font-weight-complex="bold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4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5" style:family="paragraph" style:parent-style-name="Standard">
      <style:text-properties fo:color="#0000ff" loext:opacity="100%" style:font-name="Cascadia Mono" fo:font-size="9.5pt" fo:language="en" fo:country="US" fo:font-weight="bold" officeooo:rsid="004af9d1" fo:background-color="#ffffff" style:font-size-asian="9.5pt" style:font-weight-asian="bold" style:font-weight-complex="bold"/>
    </style:style>
    <style:style style:name="P26" style:family="paragraph" style:parent-style-name="Standard">
      <style:text-properties fo:color="#0000ff" loext:opacity="100%" style:font-name="Cascadia Mono" fo:font-size="9.5pt" fo:language="en" fo:country="US" officeooo:rsid="004af9d1" fo:background-color="#ffffff" style:font-size-asian="9.5pt"/>
    </style:style>
    <style:style style:name="P27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8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9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30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4ba345" style:font-size-asian="14pt" style:font-weight-asian="normal" style:font-name-complex="Times New Roman1" style:font-size-complex="14pt" style:font-weight-complex="normal"/>
    </style:style>
    <style:style style:name="P31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482439" officeooo:paragraph-rsid="004ba345" style:font-size-asian="14pt" style:font-weight-asian="normal" style:font-name-complex="Times New Roman1" style:font-size-complex="14pt" style:font-weight-complex="normal"/>
    </style:style>
    <style:style style:name="P32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4c0a96" officeooo:paragraph-rsid="004c0a96" style:font-size-asian="14pt" style:font-weight-asian="normal" style:font-name-complex="Times New Roman1" style:font-size-complex="14pt" style:font-weight-complex="normal"/>
    </style:style>
    <style:style style:name="P33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482439" officeooo:paragraph-rsid="004c8beb" style:font-size-asian="14pt" style:font-weight-asian="normal" style:font-name-complex="Times New Roman1" style:font-size-complex="14pt" style:font-weight-complex="normal"/>
    </style:style>
    <style:style style:name="P34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ba345" officeooo:paragraph-rsid="004ba345" style:font-size-asian="14pt" style:font-weight-asian="normal" style:font-name-complex="Times New Roman1" style:font-size-complex="14pt" style:font-weight-complex="normal"/>
    </style:style>
    <style:style style:name="P35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4c8beb" officeooo:paragraph-rsid="004c8beb" style:font-size-asian="14pt" style:font-weight-asian="normal" style:font-name-complex="Times New Roman1" style:font-size-complex="14pt" style:font-weight-complex="normal"/>
    </style:style>
    <style:style style:name="P36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4cf0ca" officeooo:paragraph-rsid="004cf0ca" style:font-size-asian="14pt" style:font-weight-asian="normal" style:font-name-complex="Times New Roman1" style:font-size-complex="14pt" style:font-weight-complex="normal"/>
    </style:style>
    <style:style style:name="P37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en" fo:country="US" fo:font-weight="normal" officeooo:rsid="004cf0ca" officeooo:paragraph-rsid="004ba345" style:font-size-asian="14pt" style:font-weight-asian="normal" style:font-name-complex="Times New Roman1" style:font-size-complex="14pt" style:font-weight-complex="normal"/>
    </style:style>
    <style:style style:name="P38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ba345" officeooo:paragraph-rsid="004cf0ca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4996e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normal" officeooo:rsid="004af9d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12" style:family="text">
      <style:text-properties fo:color="#000000" loext:opacity="100%" style:font-name="Times New Roman" fo:font-size="12pt" fo:language="en" fo:country="US" fo:font-style="normal" fo:font-weight="normal" officeooo:rsid="004af9d1" style:font-size-asian="12pt" style:font-style-asian="normal" style:font-weight-asian="normal"/>
    </style:style>
    <style:style style:name="T13" style:family="text">
      <style:text-properties fo:color="#000000" loext:opacity="100%" style:font-name="Times New Roman" fo:font-size="12pt" fo:font-style="normal" fo:font-weight="normal" officeooo:rsid="004af9d1" style:font-size-asian="12pt" style:font-style-asian="normal" style:font-weight-asian="normal"/>
    </style:style>
    <style:style style:name="T14" style:family="text">
      <style:text-properties fo:color="#000000" loext:opacity="100%" fo:font-family="'Times New Roman'" fo:font-size="12pt" fo:font-weight="normal" style:font-family-asian="'Times New Roman'" style:font-size-asian="12pt" style:font-weight-asian="normal" style:font-family-complex="'Times New Roman'" style:font-size-complex="12pt" style:font-weight-complex="normal"/>
    </style:style>
    <style:style style:name="T15" style:family="text">
      <style:text-properties officeooo:rsid="004ba345"/>
    </style:style>
    <style:style style:name="T16" style:family="text">
      <style:text-properties fo:language="en" fo:country="US" officeooo:rsid="004ba34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482439"/>
    </style:style>
    <style:style style:name="T19" style:family="text">
      <style:text-properties officeooo:rsid="00482439"/>
    </style:style>
    <style:style style:name="T20" style:family="text">
      <style:text-properties fo:font-weight="bold" officeooo:rsid="001c65e1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8080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3" style:family="text">
      <style:text-properties fo:color="#9e880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4" style:family="text">
      <style:text-properties fo:color="#067d17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5" style:family="text">
      <style:text-properties fo:color="#0033b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6" style:family="text">
      <style:text-properties fo:color="#00000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627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8" style:family="text">
      <style:text-properties fo:color="#8c8c8c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29" style:family="text">
      <style:text-properties fo:color="#0037a6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0" style:family="text">
      <style:text-properties fo:color="#1750e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1" style:family="text">
      <style:text-properties fo:color="#87109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3" style:family="text">
      <style:text-properties fo:color="#80808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4" style:family="text">
      <style:text-properties fo:language="ru" fo:country="RU" officeooo:rsid="004ba345"/>
    </style:style>
    <style:style style:name="T35" style:family="text">
      <style:text-properties fo:language="ru" fo:country="RU" officeooo:rsid="004c0a96"/>
    </style:style>
    <style:style style:name="T36" style:family="text">
      <style:text-properties fo:language="ru" fo:country="RU" officeooo:rsid="004c8beb"/>
    </style:style>
    <style:style style:name="T37" style:family="text">
      <style:text-properties officeooo:rsid="004c0a96"/>
    </style:style>
    <style:style style:name="T38" style:family="text">
      <style:text-properties officeooo:rsid="004c8beb"/>
    </style:style>
    <style:style style:name="T39" style:family="text">
      <style:text-properties officeooo:rsid="004cf0ca"/>
    </style:style>
    <style:style style:name="T40" style:family="text">
      <style:text-properties fo:language="en" fo:country="US" officeooo:rsid="004cf0ca"/>
    </style:style>
    <style:style style:name="T41" style:family="text">
      <style:text-properties fo:language="en" fo:country="US" officeooo:rsid="004d6cd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1744in" fo:padding-top="0in" fo:padding-bottom="0in" fo:padding-left="0in" fo:padding-right="0in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6862in" fo:padding-top="0in" fo:padding-bottom="0in" fo:padding-left="0in" fo:padding-right="0in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4791in" fo:padding-top="0in" fo:padding-bottom="0in" fo:padding-left="0in" fo:padding-right="0in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1.4035in" fo:padding-top="0in" fo:padding-bottom="0in" fo:padding-left="0in" fo:padding-right="0in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2.9484in" fo:padding-top="0in" fo:padding-bottom="0in" fo:padding-left="0in" fo:padding-right="0in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6.3307in" fo:padding-top="0in" fo:padding-bottom="0in" fo:padding-left="0in" fo:padding-right="0in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5.6646in" fo:padding-top="0in" fo:padding-bottom="0in" fo:padding-left="0in" fo:padding-right="0in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02in" fo:min-width="2.3602in" fo:padding-top="0in" fo:padding-bottom="0in" fo:padding-left="0in" fo:padding-right="0in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Простое наследование. Принцип подстановки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p text:style-name="P9"><text:span text:style-name="T10">1. </text:span><text:span text:style-name="T11">Определить пользовательский класс. <text:s/></text:span></text:p>
      <text:p text:style-name="P10"><text:span text:style-name="T10">2. </text:span><text:span text:style-name="T11">Определить в классе следующие конструкторы: без параметров, с параметрами, копирования</text:span></text:p>
      <text:p text:style-name="P10"><text:span text:style-name="T12">3. </text:span><text:span text:style-name="T11">Определить в классе деструктор. </text:span></text:p>
      <text:p text:style-name="P10"><text:span text:style-name="T12">4. </text:span><text:span text:style-name="T11">Определить в классе компоненты-функции для просмотра и установки полей данных (селекторы и модификаторы). </text:span></text:p>
      <text:p text:style-name="P10"><text:span text:style-name="T13">5. </text:span><text:span text:style-name="T11">Перегрузить операцию присваивания. </text:span></text:p>
      <text:p text:style-name="P10"><text:span text:style-name="T13">6. </text:span><text:span text:style-name="T11">Перегрузить операции ввода и вывода объектов с помощью потоков. </text:span></text:p>
      <text:p text:style-name="P10"><text:span text:style-name="T13">7. </text:span><text:span text:style-name="T11">Определить производный класс. </text:span></text:p>
      <text:p text:style-name="P10"><text:span text:style-name="T13">8. </text:span><text:span text:style-name="T11">Написать программу, в которой продемонстрировать создание объектов и работу всех перегруженных операций. </text:span></text:p>
      <text:p text:style-name="P10"><text:span text:style-name="T13">9. </text:span><text:span text:style-name="T11">Реализовать функции, получающие и возвращающие объект базового класса. Продемонстрировать принцип подстановки.</text:span></text:p>
      <text:p text:style-name="P11"/>
      <text:p text:style-name="P11"><draw:g text:anchor-type="as-char" svg:y="-0.9701in" draw:z-index="2" draw:name="Групповой объект 1" draw:style-name="gr1"><draw:frame draw:style-name="gr2" draw:text-style-name="P13" svg:width="1.1748in" svg:height="0.2106in" svg:x="0in" svg:y="0in"><draw:text-box><text:p text:style-name="P12"><text:span text:style-name="T14">Базовый класс: </text:span></text:p></draw:text-box></draw:frame><draw:frame draw:style-name="gr3" draw:text-style-name="P13" svg:width="1.6862in" svg:height="0.2106in" svg:x="0in" svg:y="0.2189in"><draw:text-box><text:p text:style-name="P12"><text:span text:style-name="T14">ЧЕЛОВЕК (PERSON) </text:span></text:p></draw:text-box></draw:frame><draw:frame draw:style-name="gr4" draw:text-style-name="P13" svg:width="1.4795in" svg:height="0.2106in" svg:x="0in" svg:y="0.4346in"><draw:text-box><text:p text:style-name="P12"><text:span text:style-name="T14">Имя (name) – string </text:span></text:p></draw:text-box></draw:frame><draw:frame draw:style-name="gr5" draw:text-style-name="P13" svg:width="1.4039in" svg:height="0.2106in" svg:x="0in" svg:y="0.6543in"><draw:text-box><text:p text:style-name="P12"><text:span text:style-name="T14">Возраст (age) – int </text:span></text:p></draw:text-box></draw:frame><draw:frame draw:style-name="gr6" draw:text-style-name="P13" svg:width="2.9488in" svg:height="0.2106in" svg:x="0in" svg:y="0.8693in"><draw:text-box><text:p text:style-name="P12"><text:span text:style-name="T14">Определить методы изменения полей. <text:s/></text:span></text:p></draw:text-box></draw:frame><draw:frame draw:style-name="gr7" draw:text-style-name="P13" svg:width="6.3307in" svg:height="0.2106in" svg:x="0in" svg:y="1.089in"><draw:text-box><text:p text:style-name="P12"><text:span text:style-name="T14">Создать производный класс STUDENT, имеющий поля Предмет – string и Оценка – </text:span></text:p></draw:text-box></draw:frame><draw:frame draw:style-name="gr8" draw:text-style-name="P13" svg:width="5.665in" svg:height="0.2106in" svg:x="0in" svg:y="1.3047in"><draw:text-box><text:p text:style-name="P12"><text:span text:style-name="T14">int. Определить методы изменения полей и метод, выдающий сообщение о </text:span></text:p></draw:text-box></draw:frame><draw:frame draw:style-name="gr9" draw:text-style-name="P13" svg:width="2.3606in" svg:height="0.2106in" svg:x="0in" svg:y="1.5236in"><draw:text-box><text:p text:style-name="P12"><text:span text:style-name="T14">неудовлетворительной оценке. </text:span></text:p></draw:text-box></draw:frame></draw:g></text:p>
      <text:p text:style-name="P14" loext:marker-style-name="T9"><text:span text:style-name="T1">Анализ задачи</text:span><text:span text:style-name="T9">:</text:span></text:p>
      <text:list text:style-name="WWNum25">
        <text:list-item>
          <text:p text:style-name="P15">Реализуем <text:span text:style-name="T15">базовый класс P</text:span><text:span text:style-name="T16">erson </text:span><text:span text:style-name="T15">с указанными полями</text:span></text:p>
        </text:list-item>
        <text:list-item>
          <text:p text:style-name="P16">С модификатором <text:span text:style-name="T17">public </text:span>реализуем конструкторы (без параметров, с параметрами, копирования), деструктор (все поля — типы по умолчанию поэтому определение оставляем пустым), Реализуем <text:span text:style-name="T18">2</text:span> геттера (по одному на поле), реализуем <text:span text:style-name="T18">2</text:span> сеттера (по одному на поле). <text:span text:style-name="T19">Переопределим операц</text:span><text:span text:style-name="T15">ию</text:span><text:span text:style-name="T19"> присваивания, в качестве дружественных функций переопределим взаимодействие с потоками </text:span><text:span text:style-name="T18">iostream</text:span></text:p>
        </text:list-item>
        <text:list-item>
          <text:p text:style-name="P17">Реализуем<text:span text:style-name="T15"> класс-ребенок S</text:span><text:span text:style-name="T16">tudent</text:span><text:span text:style-name="T15"> наслеующий у</text:span><text:span text:style-name="T16"> Person </text:span><text:span text:style-name="T15">с указанными полями</text:span></text:p>
        </text:list-item>
        <text:list-item>
          <text:p text:style-name="P18">С модификатором <text:span text:style-name="T17">public </text:span>реализуем конструкторы (без параметров, с параметрами, копирования), деструктор (все поля — типы по умолчанию <text:soft-page-break/>поэтому определение оставляем пустым), Реализуем <text:span text:style-name="T18">2</text:span> геттера (по одному на поле), реализуем <text:span text:style-name="T18">2</text:span> сеттера (по одному на поле). <text:span text:style-name="T19">Переопределим операц</text:span><text:span text:style-name="T15">ию</text:span><text:span text:style-name="T19"> присваивания, в качестве дружественных функций переопределим взаимодействие с потоками </text:span><text:span text:style-name="T18">iostream. </text:span><text:span text:style-name="T15">Также определим </text:span><text:span text:style-name="T16">bool-</text:span><text:span text:style-name="T15">функцию для проверки оценки студента на удовлетворительность (3+)</text:span></text:p>
        </text:list-item>
        <text:list-item>
          <text:p text:style-name="P16">Реализуем главную функцию с тестированием всего вышеперечисленного</text:p>
        </text:list-item>
      </text:list>
      <text:p text:style-name="P19">UML</text:p>
      <text:p text:style-name="P20" loext:marker-style-name="T1"><draw:frame draw:style-name="fr1" draw:name="Изображение1" text:anchor-type="as-char" svg:y="-2.5866in" svg:width="4.9717in" svg:height="9.1063in" draw:z-index="0"><draw:image xlink:href="Pictures/100000010000066C00000BF0E191DEF0.png" xlink:type="simple" xlink:show="embed" xlink:actuate="onLoad" draw:mime-type="image/png"/></draw:frame></text:p>
      <text:p text:style-name="P21" loext:marker-style-name="T1"><text:span text:style-name="T20">К</text:span><text:span text:style-name="T21">од</text:span></text:p>
      <text:p text:style-name="P22">main.cpp</text:p>
      <text:p text:style-name="P23" loext:marker-style-name="T22"><text:span text:style-name="T23">#include </text:span><text:span text:style-name="T24">&lt;iostream&gt;<text:line-break/></text:span><text:span text:style-name="T23">#include </text:span><text:span text:style-name="T24">"Person.h"<text:line-break/></text:span><text:span text:style-name="T23">#include </text:span><text:span text:style-name="T24">"Student.h"<text:line-break/></text:span><text:span text:style-name="T25">using namespace </text:span><text:span text:style-name="T26">std</text:span><text:span text:style-name="T22">;<text:line-break/><text:line-break/></text:span><text:span text:style-name="T25">void </text:span><text:span text:style-name="T27">foo1</text:span><text:span text:style-name="T22">(</text:span><text:span text:style-name="T26">Person</text:span><text:span text:style-name="T22">&amp; </text:span><text:span text:style-name="T26">p</text:span><text:span text:style-name="T22">) { </text:span><text:span text:style-name="T28">//function to check whether we could pass a Student (child) into a Person (parent) function - we could<text:line-break/><text:tab/></text:span><text:span text:style-name="T26">p</text:span><text:span text:style-name="T22">.</text:span><text:span text:style-name="T27">setName</text:span><text:span text:style-name="T22">(</text:span><text:span text:style-name="T24">"Alex"</text:span><text:span text:style-name="T22">);<text:line-break/><text:tab/></text:span><text:span text:style-name="T26">cout </text:span><text:span text:style-name="T27">&lt;&lt; </text:span><text:span text:style-name="T26">p </text:span><text:span text:style-name="T27">&lt;&lt; </text:span><text:span text:style-name="T24">"</text:span><text:span text:style-name="T29">\n</text:span><text:span text:style-name="T24">"</text:span><text:span text:style-name="T22">;<text:line-break/>}<text:line-break/></text:span><text:span text:style-name="T26">Person </text:span><text:span text:style-name="T27">foo2</text:span><text:span text:style-name="T22">() { </text:span><text:span text:style-name="T28">//a function to check whether we could intialize a Person (parent) object with Student (child) function - we could<text:line-break/><text:tab/></text:span><text:span text:style-name="T26">Student r</text:span><text:span text:style-name="T27">(</text:span><text:span text:style-name="T24">"Bob"</text:span><text:span text:style-name="T22">, </text:span><text:span text:style-name="T30">20</text:span><text:span text:style-name="T22">, </text:span><text:span text:style-name="T24">"Math"</text:span><text:span text:style-name="T22">, </text:span><text:span text:style-name="T30">5</text:span><text:span text:style-name="T27">)</text:span><text:span text:style-name="T22">;<text:line-break/><text:tab/></text:span><text:span text:style-name="T25">return </text:span><text:span text:style-name="T26">r</text:span><text:span text:style-name="T22">;<text:line-break/>}<text:line-break/><text:line-break/></text:span><text:span text:style-name="T25">int </text:span><text:span text:style-name="T27">main</text:span><text:span text:style-name="T22">()<text:line-break/>{<text:line-break/><text:tab/></text:span><text:span text:style-name="T28">//basic manipulations (parent) test<text:line-break/> <text:s text:c="3"/></text:span><text:span text:style-name="T26">Person a</text:span><text:span text:style-name="T22">;<text:line-break/><text:tab/></text:span><text:span text:style-name="T26">cin </text:span><text:span text:style-name="T27">&gt;&gt; </text:span><text:span text:style-name="T26">a</text:span><text:span text:style-name="T22">;<text:line-break/><text:tab/></text:span><text:span text:style-name="T26">cout </text:span><text:span text:style-name="T27">&lt;&lt; </text:span><text:span text:style-name="T26">a </text:span><text:span text:style-name="T27">&lt;&lt; </text:span><text:span text:style-name="T24">"</text:span><text:span text:style-name="T29">\n</text:span><text:span text:style-name="T24">"</text:span><text:span text:style-name="T22">;<text:line-break/><text:tab/></text:span><text:span text:style-name="T26">Person b</text:span><text:span text:style-name="T27">(</text:span><text:span text:style-name="T24">"Alice"</text:span><text:span text:style-name="T22">, </text:span><text:span text:style-name="T30">30</text:span><text:span text:style-name="T27">)</text:span><text:span text:style-name="T22">;<text:line-break/><text:tab/></text:span><text:span text:style-name="T26">cout </text:span><text:span text:style-name="T27">&lt;&lt; </text:span><text:span text:style-name="T26">b </text:span><text:span text:style-name="T27">&lt;&lt; </text:span><text:span text:style-name="T24">"</text:span><text:span text:style-name="T29">\n</text:span><text:span text:style-name="T24">"</text:span><text:span text:style-name="T22">;<text:line-break/><text:tab/></text:span><text:span text:style-name="T26">a </text:span><text:span text:style-name="T27">= </text:span><text:span text:style-name="T26">b</text:span><text:span text:style-name="T22">;<text:line-break/><text:tab/></text:span><text:span text:style-name="T26">cout </text:span><text:span text:style-name="T27">&lt;&lt; </text:span><text:span text:style-name="T26">a </text:span><text:span text:style-name="T27">&lt;&lt; </text:span><text:span text:style-name="T24">"</text:span><text:span text:style-name="T29">\n</text:span><text:span text:style-name="T24">"</text:span><text:span text:style-name="T22">;<text:line-break/><text:tab/></text:span><text:span text:style-name="T28">//basic manipulations (child) test<text:line-break/><text:tab/></text:span><text:span text:style-name="T26">Student s</text:span><text:span text:style-name="T22">;<text:line-break/><text:tab/></text:span><text:span text:style-name="T26">cin </text:span><text:span text:style-name="T27">&gt;&gt; </text:span><text:span text:style-name="T26">s</text:span><text:span text:style-name="T22">;<text:line-break/><text:tab/></text:span><text:span text:style-name="T26">cout </text:span><text:span text:style-name="T27">&lt;&lt; </text:span><text:span text:style-name="T26">s </text:span><text:span text:style-name="T27">&lt;&lt; </text:span><text:span text:style-name="T24">"</text:span><text:span text:style-name="T29">\n</text:span><text:span text:style-name="T24">"</text:span><text:span text:style-name="T22">;<text:line-break/><text:tab/></text:span><text:span text:style-name="T26">s</text:span><text:span text:style-name="T22">.</text:span><text:span text:style-name="T27">isGradeOkay</text:span><text:span text:style-name="T22">();<text:line-break/><text:line-break/><text:tab/></text:span><text:span text:style-name="T28">//check functions defined above<text:line-break/><text:tab/></text:span><text:span text:style-name="T27">foo1</text:span><text:span text:style-name="T22">(</text:span><text:span text:style-name="T26">s</text:span><text:span text:style-name="T22">);<text:line-break/><text:tab/></text:span><text:span text:style-name="T26">a </text:span><text:span text:style-name="T27">= foo2</text:span><text:span text:style-name="T22">();<text:line-break/><text:tab/></text:span><text:span text:style-name="T26">cout </text:span><text:span text:style-name="T27">&lt;&lt; </text:span><text:span text:style-name="T26">a </text:span><text:span text:style-name="T27">&lt;&lt; </text:span><text:span text:style-name="T24">"</text:span><text:span text:style-name="T29">\n</text:span><text:span text:style-name="T24">"</text:span><text:span text:style-name="T22">;<text:line-break/></text:span><text:soft-page-break/><text:span text:style-name="T22"><text:line-break/><text:tab/></text:span><text:span text:style-name="T25">return </text:span><text:span text:style-name="T30">0</text:span><text:span text:style-name="T22">;<text:line-break/>}</text:span></text:p>
      <text:p text:style-name="P22">Person.h</text:p>
      <text:p text:style-name="P23" loext:marker-style-name="T22"><text:span text:style-name="T23">#pragma </text:span><text:span text:style-name="T25">once<text:line-break/></text:span><text:span text:style-name="T23">#include </text:span><text:span text:style-name="T24">&lt;string&gt;<text:line-break/></text:span><text:span text:style-name="T23">#include </text:span><text:span text:style-name="T24">&lt;iostream&gt;<text:line-break/><text:line-break/></text:span><text:span text:style-name="T25">class </text:span><text:span text:style-name="T26">Person </text:span><text:span text:style-name="T22">{ </text:span><text:span text:style-name="T28">//basic class<text:line-break/></text:span><text:span text:style-name="T25">protected</text:span><text:span text:style-name="T22">: </text:span><text:span text:style-name="T28">//class attributes<text:line-break/><text:tab/></text:span><text:span text:style-name="T26">std</text:span><text:span text:style-name="T22">::</text:span><text:span text:style-name="T26">string </text:span><text:span text:style-name="T31">name_</text:span><text:span text:style-name="T22">;<text:line-break/><text:tab/></text:span><text:span text:style-name="T25">int </text:span><text:span text:style-name="T31">age_</text:span><text:span text:style-name="T22">;<text:line-break/></text:span><text:span text:style-name="T25">public</text:span><text:span text:style-name="T22">:<text:line-break/><text:tab/></text:span><text:span text:style-name="T27">Person</text:span><text:span text:style-name="T22">(); </text:span><text:span text:style-name="T28">//default constructor<text:line-break/><text:tab/></text:span><text:span text:style-name="T27">Person</text:span><text:span text:style-name="T22">(</text:span><text:span text:style-name="T26">std</text:span><text:span text:style-name="T22">::</text:span><text:span text:style-name="T26">string</text:span><text:span text:style-name="T22">, </text:span><text:span text:style-name="T25">int</text:span><text:span text:style-name="T22">); </text:span><text:span text:style-name="T28">//constructor with parameters<text:line-break/><text:tab/></text:span><text:span text:style-name="T27">Person</text:span><text:span text:style-name="T22">(</text:span><text:span text:style-name="T25">const </text:span><text:span text:style-name="T26">Person</text:span><text:span text:style-name="T22">&amp;); </text:span><text:span text:style-name="T28">//copy constructor<text:line-break/><text:tab/></text:span><text:span text:style-name="T25">virtual </text:span><text:span text:style-name="T27">~Person</text:span><text:span text:style-name="T22">(); </text:span><text:span text:style-name="T28">//destructor<text:line-break/><text:line-break/><text:tab/>//basic getters<text:line-break/><text:tab/></text:span><text:span text:style-name="T26">std</text:span><text:span text:style-name="T22">::</text:span><text:span text:style-name="T26">string </text:span><text:span text:style-name="T27">getName</text:span><text:span text:style-name="T22">() </text:span><text:span text:style-name="T25">const</text:span><text:span text:style-name="T22">;<text:line-break/><text:tab/></text:span><text:span text:style-name="T25">int </text:span><text:span text:style-name="T27">getAge</text:span><text:span text:style-name="T22">() </text:span><text:span text:style-name="T25">const</text:span><text:span text:style-name="T22">;<text:line-break/><text:tab/></text:span><text:span text:style-name="T28">//basic setters<text:line-break/><text:tab/></text:span><text:span text:style-name="T25">void </text:span><text:span text:style-name="T27">setName</text:span><text:span text:style-name="T22">(</text:span><text:span text:style-name="T26">std</text:span><text:span text:style-name="T22">::</text:span><text:span text:style-name="T26">string</text:span><text:span text:style-name="T22">);<text:line-break/><text:tab/></text:span><text:span text:style-name="T25">void </text:span><text:span text:style-name="T27">setAge</text:span><text:span text:style-name="T22">(</text:span><text:span text:style-name="T25">int</text:span><text:span text:style-name="T22">);<text:line-break/><text:tab/></text:span><text:span text:style-name="T28">//assignment operator overload<text:line-break/><text:tab/></text:span><text:span text:style-name="T26">Person</text:span><text:span text:style-name="T22">&amp; </text:span><text:span text:style-name="T25">operator</text:span><text:span text:style-name="T22">=(</text:span><text:span text:style-name="T25">const </text:span><text:span text:style-name="T26">Person</text:span><text:span text:style-name="T22">&amp;);<text:line-break/><text:tab/></text:span><text:span text:style-name="T28">//console i/o overload<text:line-break/><text:tab/></text:span><text:span text:style-name="T25">friend </text:span><text:span text:style-name="T26">std</text:span><text:span text:style-name="T22">::</text:span><text:span text:style-name="T26">istream</text:span><text:span text:style-name="T22">&amp; </text:span><text:span text:style-name="T25">operator</text:span><text:span text:style-name="T22">&gt;&gt;(</text:span><text:span text:style-name="T26">std</text:span><text:span text:style-name="T22">::</text:span><text:span text:style-name="T26">istream</text:span><text:span text:style-name="T22">&amp;, </text:span><text:span text:style-name="T26">Person</text:span><text:span text:style-name="T22">&amp;);<text:line-break/><text:tab/></text:span><text:span text:style-name="T25">friend </text:span><text:span text:style-name="T26">std</text:span><text:span text:style-name="T22">::</text:span><text:span text:style-name="T26">ostream</text:span><text:span text:style-name="T22">&amp; </text:span><text:span text:style-name="T25">operator</text:span><text:span text:style-name="T22">&lt;&lt;(</text:span><text:span text:style-name="T26">std</text:span><text:span text:style-name="T22">::</text:span><text:span text:style-name="T26">ostream</text:span><text:span text:style-name="T22">&amp;, </text:span><text:span text:style-name="T25">const </text:span><text:span text:style-name="T26">Person</text:span><text:span text:style-name="T22">&amp;);<text:line-break/>};<text:line-break/><text:line-break/></text:span></text:p>
      <text:p text:style-name="P24" loext:marker-style-name="T32"/>
      <text:p text:style-name="P22">Person.cpp</text:p>
      <text:p text:style-name="P23" loext:marker-style-name="T22"><text:span text:style-name="T23">#include </text:span><text:span text:style-name="T24">"Person.h"<text:line-break/></text:span><text:span text:style-name="T23">#include </text:span><text:span text:style-name="T24">&lt;string&gt;<text:line-break/></text:span><text:span text:style-name="T23">#include </text:span><text:span text:style-name="T24">&lt;iostream&gt;<text:line-break/></text:span><text:soft-page-break/><text:span text:style-name="T24"><text:line-break/></text:span><text:span text:style-name="T26">Person</text:span><text:span text:style-name="T22">::</text:span><text:span text:style-name="T27">Person</text:span><text:span text:style-name="T22">() : </text:span><text:span text:style-name="T31">name_</text:span><text:span text:style-name="T27">(</text:span><text:span text:style-name="T24">""</text:span><text:span text:style-name="T27">)</text:span><text:span text:style-name="T22">, </text:span><text:span text:style-name="T31">age_</text:span><text:span text:style-name="T22">(</text:span><text:span text:style-name="T30">0</text:span><text:span text:style-name="T22">) {} </text:span><text:span text:style-name="T28">//default constructor<text:line-break/></text:span><text:span text:style-name="T26">Person</text:span><text:span text:style-name="T22">::</text:span><text:span text:style-name="T27">Person</text:span><text:span text:style-name="T22">(</text:span><text:span text:style-name="T26">std</text:span><text:span text:style-name="T22">::</text:span><text:span text:style-name="T26">string name</text:span><text:span text:style-name="T22">, </text:span><text:span text:style-name="T25">int </text:span><text:span text:style-name="T26">age</text:span><text:span text:style-name="T22">) : </text:span><text:span text:style-name="T31">name_</text:span><text:span text:style-name="T27">(</text:span><text:span text:style-name="T26">name</text:span><text:span text:style-name="T27">)</text:span><text:span text:style-name="T22">, </text:span><text:span text:style-name="T31">age_</text:span><text:span text:style-name="T22">(</text:span><text:span text:style-name="T26">age</text:span><text:span text:style-name="T22">) {} </text:span><text:span text:style-name="T28">//constructor with parameters<text:line-break/></text:span><text:span text:style-name="T26">Person</text:span><text:span text:style-name="T22">::</text:span><text:span text:style-name="T27">Person</text:span><text:span text:style-name="T22">(</text:span><text:span text:style-name="T25">const </text:span><text:span text:style-name="T26">Person</text:span><text:span text:style-name="T22">&amp; </text:span><text:span text:style-name="T26">other</text:span><text:span text:style-name="T22">) : </text:span><text:span text:style-name="T31">name_</text:span><text:span text:style-name="T27">(</text:span><text:span text:style-name="T26">other</text:span><text:span text:style-name="T22">.</text:span><text:span text:style-name="T31">name_</text:span><text:span text:style-name="T27">)</text:span><text:span text:style-name="T22">, </text:span><text:span text:style-name="T31">age_</text:span><text:span text:style-name="T22">(</text:span><text:span text:style-name="T26">other</text:span><text:span text:style-name="T22">.</text:span><text:span text:style-name="T31">age_</text:span><text:span text:style-name="T22">) {} </text:span><text:span text:style-name="T28">//copy constructor<text:line-break/><text:line-break/></text:span><text:span text:style-name="T26">Person</text:span><text:span text:style-name="T22">::</text:span><text:span text:style-name="T27">~Person</text:span><text:span text:style-name="T22">() {} </text:span><text:span text:style-name="T28">//destructor (default)<text:line-break/>//basic getters<text:line-break/></text:span><text:span text:style-name="T26">std</text:span><text:span text:style-name="T22">::</text:span><text:span text:style-name="T26">string Person</text:span><text:span text:style-name="T22">::</text:span><text:span text:style-name="T27">getName</text:span><text:span text:style-name="T22">() </text:span><text:span text:style-name="T25">const </text:span><text:span text:style-name="T22">{<text:line-break/><text:tab/></text:span><text:span text:style-name="T25">return </text:span><text:span text:style-name="T31">name_</text:span><text:span text:style-name="T22">;<text:line-break/>}<text:line-break/></text:span><text:span text:style-name="T25">int </text:span><text:span text:style-name="T26">Person</text:span><text:span text:style-name="T22">::</text:span><text:span text:style-name="T27">getAge</text:span><text:span text:style-name="T22">() </text:span><text:span text:style-name="T25">const </text:span><text:span text:style-name="T22">{<text:line-break/><text:tab/></text:span><text:span text:style-name="T25">return </text:span><text:span text:style-name="T31">age_</text:span><text:span text:style-name="T22">;<text:line-break/>}<text:line-break/></text:span><text:span text:style-name="T28">//basic setters<text:line-break/></text:span><text:span text:style-name="T25">void </text:span><text:span text:style-name="T26">Person</text:span><text:span text:style-name="T22">::</text:span><text:span text:style-name="T27">setName</text:span><text:span text:style-name="T22">(</text:span><text:span text:style-name="T26">std</text:span><text:span text:style-name="T22">::</text:span><text:span text:style-name="T26">string name</text:span><text:span text:style-name="T22">) {<text:line-break/><text:tab/></text:span><text:span text:style-name="T31">name_ </text:span><text:span text:style-name="T27">= </text:span><text:span text:style-name="T26">name</text:span><text:span text:style-name="T22">;<text:line-break/>}<text:line-break/></text:span><text:span text:style-name="T25">void </text:span><text:span text:style-name="T26">Person</text:span><text:span text:style-name="T22">::</text:span><text:span text:style-name="T27">setAge</text:span><text:span text:style-name="T22">(</text:span><text:span text:style-name="T25">int </text:span><text:span text:style-name="T26">age</text:span><text:span text:style-name="T22">) {<text:line-break/><text:tab/></text:span><text:span text:style-name="T31">age_ </text:span><text:span text:style-name="T22">= </text:span><text:span text:style-name="T26">age</text:span><text:span text:style-name="T22">;<text:line-break/>}<text:line-break/></text:span><text:span text:style-name="T28">//assignment operator overload<text:line-break/></text:span><text:span text:style-name="T26">Person</text:span><text:span text:style-name="T22">&amp; </text:span><text:span text:style-name="T26">Person</text:span><text:span text:style-name="T22">::</text:span><text:span text:style-name="T25">operator</text:span><text:span text:style-name="T22">=(</text:span><text:span text:style-name="T25">const </text:span><text:span text:style-name="T26">Person</text:span><text:span text:style-name="T22">&amp; </text:span><text:span text:style-name="T26">other</text:span><text:span text:style-name="T22">) {<text:line-break/><text:tab/></text:span><text:span text:style-name="T25">if </text:span><text:span text:style-name="T22">(</text:span><text:span text:style-name="T25">this </text:span><text:span text:style-name="T22">!= &amp;</text:span><text:span text:style-name="T26">other</text:span><text:span text:style-name="T22">) { </text:span><text:span text:style-name="T28">//self-assignment defence<text:line-break/><text:tab/><text:tab/></text:span><text:span text:style-name="T31">name_ </text:span><text:span text:style-name="T27">= </text:span><text:span text:style-name="T26">other</text:span><text:span text:style-name="T22">.</text:span><text:span text:style-name="T31">name_</text:span><text:span text:style-name="T22">;<text:line-break/><text:tab/><text:tab/></text:span><text:span text:style-name="T31">age_ </text:span><text:span text:style-name="T22">= </text:span><text:span text:style-name="T26">other</text:span><text:span text:style-name="T22">.</text:span><text:span text:style-name="T31">age_</text:span><text:span text:style-name="T22">;<text:line-break/><text:tab/>}<text:line-break/><text:tab/></text:span><text:span text:style-name="T25">return </text:span><text:span text:style-name="T22">*</text:span><text:span text:style-name="T25">this</text:span><text:span text:style-name="T22">;<text:line-break/>}<text:line-break/></text:span><text:span text:style-name="T28">//console i/o stylized overload<text:line-break/></text:span><text:span text:style-name="T26">std</text:span><text:span text:style-name="T22">::</text:span><text:span text:style-name="T26">istream</text:span><text:span text:style-name="T22">&amp; </text:span><text:span text:style-name="T25">operator</text:span><text:span text:style-name="T22">&gt;&gt;(</text:span><text:span text:style-name="T26">std</text:span><text:span text:style-name="T22">::</text:span><text:span text:style-name="T26">istream</text:span><text:span text:style-name="T22">&amp; </text:span><text:span text:style-name="T26">in</text:span><text:span text:style-name="T22">, </text:span><text:span text:style-name="T26">Person</text:span><text:span text:style-name="T22">&amp; </text:span><text:span text:style-name="T26">person</text:span><text:span text:style-name="T22">) {<text:line-break/><text:tab/></text:span><text:span text:style-name="T26">std</text:span><text:span text:style-name="T22">::</text:span><text:span text:style-name="T26">cout </text:span><text:span text:style-name="T27">&lt;&lt; </text:span><text:span text:style-name="T24">"Enter name: "</text:span><text:span text:style-name="T22">;<text:line-break/><text:tab/></text:span><text:span text:style-name="T26">in </text:span><text:span text:style-name="T27">&gt;&gt; </text:span><text:span text:style-name="T26">person</text:span><text:span text:style-name="T22">.</text:span><text:span text:style-name="T31">name_</text:span><text:span text:style-name="T22">;<text:line-break/><text:tab/></text:span><text:span text:style-name="T26">std</text:span><text:span text:style-name="T22">::</text:span><text:span text:style-name="T26">cout </text:span><text:span text:style-name="T27">&lt;&lt; </text:span><text:span text:style-name="T24">"Enter age: "</text:span><text:span text:style-name="T22">;<text:line-break/><text:tab/></text:span><text:span text:style-name="T26">in </text:span><text:span text:style-name="T27">&gt;&gt; </text:span><text:span text:style-name="T26">person</text:span><text:span text:style-name="T22">.</text:span><text:span text:style-name="T31">age_</text:span><text:span text:style-name="T22">;<text:line-break/><text:tab/></text:span><text:span text:style-name="T25">return </text:span><text:span text:style-name="T26">in</text:span><text:span text:style-name="T22">;<text:line-break/>}<text:line-break/></text:span><text:span text:style-name="T26">std</text:span><text:span text:style-name="T22">::</text:span><text:span text:style-name="T26">ostream</text:span><text:span text:style-name="T22">&amp; </text:span><text:span text:style-name="T25">operator</text:span><text:span text:style-name="T22">&lt;&lt;(</text:span><text:span text:style-name="T26">std</text:span><text:span text:style-name="T22">::</text:span><text:span text:style-name="T26">ostream</text:span><text:span text:style-name="T22">&amp; </text:span><text:span text:style-name="T26">out</text:span><text:span text:style-name="T22">, </text:span><text:span text:style-name="T25">const </text:span><text:span text:style-name="T26">Person</text:span><text:span text:style-name="T22">&amp; </text:span><text:soft-page-break/><text:span text:style-name="T26">person</text:span><text:span text:style-name="T22">) {<text:line-break/><text:tab/></text:span><text:span text:style-name="T26">out </text:span><text:span text:style-name="T27">&lt;&lt; </text:span><text:span text:style-name="T24">"Name: " </text:span><text:span text:style-name="T27">&lt;&lt; </text:span><text:span text:style-name="T26">person</text:span><text:span text:style-name="T22">.</text:span><text:span text:style-name="T31">name_ </text:span><text:span text:style-name="T27">&lt;&lt; </text:span><text:span text:style-name="T24">", Age: " </text:span><text:span text:style-name="T27">&lt;&lt; </text:span><text:span text:style-name="T26">person</text:span><text:span text:style-name="T22">.</text:span><text:span text:style-name="T31">age_</text:span><text:span text:style-name="T22">;<text:line-break/><text:tab/></text:span><text:span text:style-name="T25">return </text:span><text:span text:style-name="T26">out</text:span><text:span text:style-name="T22">;<text:line-break/>}</text:span></text:p>
      <text:p text:style-name="P25" loext:marker-style-name="T32"/>
      <text:p text:style-name="P22">Student.h</text:p>
      <text:p text:style-name="P23" loext:marker-style-name="T22"><text:span text:style-name="T23">#pragma </text:span><text:span text:style-name="T25">once<text:line-break/></text:span><text:span text:style-name="T23">#include </text:span><text:span text:style-name="T24">"Person.h"<text:line-break/><text:line-break/></text:span><text:span text:style-name="T25">class </text:span><text:span text:style-name="T26">Student </text:span><text:span text:style-name="T22">:<text:line-break/> <text:s text:c="3"/></text:span><text:span text:style-name="T25">public </text:span><text:span text:style-name="T26">Person </text:span><text:span text:style-name="T28">//inheriting class definition<text:line-break/></text:span><text:span text:style-name="T22">{<text:line-break/></text:span><text:span text:style-name="T25">protected</text:span><text:span text:style-name="T22">: </text:span><text:span text:style-name="T28">//additional attributes<text:line-break/> <text:s text:c="3"/></text:span><text:span text:style-name="T26">std</text:span><text:span text:style-name="T22">::</text:span><text:span text:style-name="T26">string </text:span><text:span text:style-name="T31">subject_</text:span><text:span text:style-name="T22">;<text:line-break/><text:tab/></text:span><text:span text:style-name="T25">int </text:span><text:span text:style-name="T31">grade_</text:span><text:span text:style-name="T22">;<text:line-break/></text:span><text:span text:style-name="T25">public</text:span><text:span text:style-name="T22">:<text:line-break/><text:tab/></text:span><text:span text:style-name="T28">//class-specific constructors<text:line-break/> <text:s text:c="3"/></text:span><text:span text:style-name="T27">Student</text:span><text:span text:style-name="T22">();<text:line-break/><text:tab/></text:span><text:span text:style-name="T27">Student</text:span><text:span text:style-name="T22">(</text:span><text:span text:style-name="T26">std</text:span><text:span text:style-name="T22">::</text:span><text:span text:style-name="T26">string</text:span><text:span text:style-name="T22">, </text:span><text:span text:style-name="T25">int</text:span><text:span text:style-name="T22">, </text:span><text:span text:style-name="T26">std</text:span><text:span text:style-name="T22">::</text:span><text:span text:style-name="T26">string</text:span><text:span text:style-name="T22">, </text:span><text:span text:style-name="T25">int</text:span><text:span text:style-name="T22">);<text:line-break/><text:tab/></text:span><text:span text:style-name="T27">Student</text:span><text:span text:style-name="T22">(</text:span><text:span text:style-name="T25">const </text:span><text:span text:style-name="T26">Student</text:span><text:span text:style-name="T22">&amp;);<text:line-break/><text:line-break/><text:tab/></text:span><text:span text:style-name="T27">~Student</text:span><text:span text:style-name="T22">(); </text:span><text:span text:style-name="T28">//class-specific destructor<text:line-break/><text:line-break/><text:tab/>//additional getters<text:line-break/><text:tab/></text:span><text:span text:style-name="T26">std</text:span><text:span text:style-name="T22">::</text:span><text:span text:style-name="T26">string </text:span><text:span text:style-name="T27">getSubject</text:span><text:span text:style-name="T22">() </text:span><text:span text:style-name="T25">const</text:span><text:span text:style-name="T22">;<text:line-break/><text:tab/></text:span><text:span text:style-name="T25">int </text:span><text:span text:style-name="T27">getGrade</text:span><text:span text:style-name="T22">() </text:span><text:span text:style-name="T25">const</text:span><text:span text:style-name="T22">;<text:line-break/><text:tab/></text:span><text:span text:style-name="T28">//additional setters<text:line-break/><text:tab/></text:span><text:span text:style-name="T25">void </text:span><text:span text:style-name="T27">setSubject</text:span><text:span text:style-name="T22">(</text:span><text:span text:style-name="T26">std</text:span><text:span text:style-name="T22">::</text:span><text:span text:style-name="T26">string</text:span><text:span text:style-name="T22">);<text:line-break/><text:tab/></text:span><text:span text:style-name="T25">void </text:span><text:span text:style-name="T27">setGrade</text:span><text:span text:style-name="T22">(</text:span><text:span text:style-name="T25">int</text:span><text:span text:style-name="T22">);<text:line-break/><text:tab/></text:span><text:span text:style-name="T28">//grade-checking method<text:line-break/><text:tab/></text:span><text:span text:style-name="T25">bool </text:span><text:span text:style-name="T27">isGradeOkay</text:span><text:span text:style-name="T22">() </text:span><text:span text:style-name="T25">const</text:span><text:span text:style-name="T22">;<text:line-break/><text:tab/></text:span><text:span text:style-name="T28">//assignment overload<text:line-break/><text:tab/></text:span><text:span text:style-name="T26">Student</text:span><text:span text:style-name="T22">&amp; </text:span><text:span text:style-name="T25">operator</text:span><text:span text:style-name="T22">=(</text:span><text:span text:style-name="T25">const </text:span><text:span text:style-name="T26">Student</text:span><text:span text:style-name="T22">&amp;);<text:line-break/><text:tab/></text:span><text:span text:style-name="T28">//stylized i/o overload<text:line-break/><text:tab/></text:span><text:span text:style-name="T25">friend </text:span><text:span text:style-name="T26">std</text:span><text:span text:style-name="T22">::</text:span><text:span text:style-name="T26">istream</text:span><text:span text:style-name="T22">&amp; </text:span><text:span text:style-name="T25">operator</text:span><text:span text:style-name="T22">&gt;&gt;(</text:span><text:span text:style-name="T26">std</text:span><text:span text:style-name="T22">::</text:span><text:span text:style-name="T26">istream</text:span><text:span text:style-name="T22">&amp;, </text:span><text:span text:style-name="T26">Student</text:span><text:span text:style-name="T22">&amp;);<text:line-break/><text:tab/></text:span><text:span text:style-name="T25">friend </text:span><text:span text:style-name="T26">std</text:span><text:span text:style-name="T22">::</text:span><text:span text:style-name="T26">ostream</text:span><text:span text:style-name="T22">&amp; </text:span><text:span text:style-name="T25">operator</text:span><text:span text:style-name="T22">&lt;&lt;(</text:span><text:span text:style-name="T26">std</text:span><text:span text:style-name="T22">::</text:span><text:span text:style-name="T26">ostream</text:span><text:span text:style-name="T22">&amp;, </text:span><text:span text:style-name="T25">const </text:span><text:span text:style-name="T26">Student</text:span><text:span text:style-name="T22">&amp;);<text:line-break/></text:span><text:soft-page-break/><text:span text:style-name="T22">};<text:line-break/></text:span></text:p>
      <text:p text:style-name="P22">Student.cpp</text:p>
      <text:p text:style-name="P23" loext:marker-style-name="T22"><text:span text:style-name="T23">#include </text:span><text:span text:style-name="T24">"Student.h"<text:line-break/></text:span><text:span text:style-name="T28">//class-specific constructors<text:line-break/></text:span><text:span text:style-name="T26">Student</text:span><text:span text:style-name="T22">::</text:span><text:span text:style-name="T27">Student</text:span><text:span text:style-name="T22">() : </text:span><text:span text:style-name="T33">Person()</text:span><text:span text:style-name="T22">, </text:span><text:span text:style-name="T31">subject_</text:span><text:span text:style-name="T27">(</text:span><text:span text:style-name="T24">""</text:span><text:span text:style-name="T27">)</text:span><text:span text:style-name="T22">, </text:span><text:span text:style-name="T31">grade_</text:span><text:span text:style-name="T22">(</text:span><text:span text:style-name="T30">0</text:span><text:span text:style-name="T22">) {}<text:line-break/></text:span><text:span text:style-name="T26">Student</text:span><text:span text:style-name="T22">::</text:span><text:span text:style-name="T27">Student</text:span><text:span text:style-name="T22">(</text:span><text:span text:style-name="T26">std</text:span><text:span text:style-name="T22">::</text:span><text:span text:style-name="T26">string s</text:span><text:span text:style-name="T22">, </text:span><text:span text:style-name="T25">int </text:span><text:span text:style-name="T26">i</text:span><text:span text:style-name="T22">, </text:span><text:span text:style-name="T26">std</text:span><text:span text:style-name="T22">::</text:span><text:span text:style-name="T26">string s2</text:span><text:span text:style-name="T22">, </text:span><text:span text:style-name="T25">int </text:span><text:span text:style-name="T26">i2</text:span><text:span text:style-name="T22">) : </text:span><text:span text:style-name="T26">Person</text:span><text:span text:style-name="T27">(</text:span><text:span text:style-name="T26">s</text:span><text:span text:style-name="T22">, </text:span><text:span text:style-name="T26">i</text:span><text:span text:style-name="T27">)</text:span><text:span text:style-name="T22">, </text:span><text:span text:style-name="T31">subject_</text:span><text:span text:style-name="T27">(</text:span><text:span text:style-name="T26">s2</text:span><text:span text:style-name="T27">)</text:span><text:span text:style-name="T22">, </text:span><text:span text:style-name="T31">grade_</text:span><text:span text:style-name="T22">(</text:span><text:span text:style-name="T26">i2</text:span><text:span text:style-name="T22">) {}</text:span><text:span text:style-name="T33">;<text:line-break/></text:span><text:span text:style-name="T26">Student</text:span><text:span text:style-name="T22">::</text:span><text:span text:style-name="T27">Student</text:span><text:span text:style-name="T22">(</text:span><text:span text:style-name="T25">const </text:span><text:span text:style-name="T26">Student</text:span><text:span text:style-name="T22">&amp; </text:span><text:span text:style-name="T26">other</text:span><text:span text:style-name="T22">) {<text:line-break/><text:tab/></text:span><text:span text:style-name="T31">name_ </text:span><text:span text:style-name="T27">= </text:span><text:span text:style-name="T26">other</text:span><text:span text:style-name="T22">.</text:span><text:span text:style-name="T31">name_</text:span><text:span text:style-name="T22">;<text:line-break/><text:tab/></text:span><text:span text:style-name="T31">age_ </text:span><text:span text:style-name="T22">= </text:span><text:span text:style-name="T26">other</text:span><text:span text:style-name="T22">.</text:span><text:span text:style-name="T31">age_</text:span><text:span text:style-name="T22">;<text:line-break/><text:tab/></text:span><text:span text:style-name="T31">subject_ </text:span><text:span text:style-name="T27">= </text:span><text:span text:style-name="T26">other</text:span><text:span text:style-name="T22">.</text:span><text:span text:style-name="T31">subject_</text:span><text:span text:style-name="T22">;<text:line-break/><text:tab/></text:span><text:span text:style-name="T31">grade_ </text:span><text:span text:style-name="T22">= </text:span><text:span text:style-name="T26">other</text:span><text:span text:style-name="T22">.</text:span><text:span text:style-name="T31">grade_</text:span><text:span text:style-name="T22">;<text:line-break/>}<text:line-break/></text:span><text:span text:style-name="T28">//class-specific destructor<text:line-break/></text:span><text:span text:style-name="T26">Student</text:span><text:span text:style-name="T22">::</text:span><text:span text:style-name="T27">~Student</text:span><text:span text:style-name="T22">() {}<text:line-break/></text:span><text:span text:style-name="T28">//additional getters<text:line-break/></text:span><text:span text:style-name="T26">std</text:span><text:span text:style-name="T22">::</text:span><text:span text:style-name="T26">string Student</text:span><text:span text:style-name="T22">::</text:span><text:span text:style-name="T27">getSubject</text:span><text:span text:style-name="T22">() </text:span><text:span text:style-name="T25">const </text:span><text:span text:style-name="T22">{<text:line-break/><text:tab/></text:span><text:span text:style-name="T25">return </text:span><text:span text:style-name="T31">subject_</text:span><text:span text:style-name="T22">;<text:line-break/>}<text:line-break/></text:span><text:span text:style-name="T25">int </text:span><text:span text:style-name="T26">Student</text:span><text:span text:style-name="T22">::</text:span><text:span text:style-name="T27">getGrade</text:span><text:span text:style-name="T22">() </text:span><text:span text:style-name="T25">const </text:span><text:span text:style-name="T22">{<text:line-break/><text:tab/></text:span><text:span text:style-name="T25">return </text:span><text:span text:style-name="T31">grade_</text:span><text:span text:style-name="T22">;<text:line-break/>}<text:line-break/></text:span><text:span text:style-name="T28">//additional setters<text:line-break/></text:span><text:span text:style-name="T25">void </text:span><text:span text:style-name="T26">Student</text:span><text:span text:style-name="T22">::</text:span><text:span text:style-name="T27">setSubject</text:span><text:span text:style-name="T22">(</text:span><text:span text:style-name="T26">std</text:span><text:span text:style-name="T22">::</text:span><text:span text:style-name="T26">string subject</text:span><text:span text:style-name="T22">) {<text:line-break/><text:tab/></text:span><text:span text:style-name="T31">subject_ </text:span><text:span text:style-name="T27">= </text:span><text:span text:style-name="T26">subject</text:span><text:span text:style-name="T22">;<text:line-break/>}<text:line-break/></text:span><text:span text:style-name="T25">void </text:span><text:span text:style-name="T26">Student</text:span><text:span text:style-name="T22">::</text:span><text:span text:style-name="T27">setGrade</text:span><text:span text:style-name="T22">(</text:span><text:span text:style-name="T25">int </text:span><text:span text:style-name="T26">grade</text:span><text:span text:style-name="T22">) {<text:line-break/><text:tab/></text:span><text:span text:style-name="T31">grade_ </text:span><text:span text:style-name="T22">= </text:span><text:span text:style-name="T26">grade</text:span><text:span text:style-name="T22">;<text:line-break/>}<text:line-break/></text:span><text:span text:style-name="T28">//assignment overload<text:line-break/></text:span><text:span text:style-name="T26">Student</text:span><text:span text:style-name="T22">&amp; </text:span><text:span text:style-name="T26">Student</text:span><text:span text:style-name="T22">::</text:span><text:span text:style-name="T25">operator</text:span><text:span text:style-name="T22">=(</text:span><text:span text:style-name="T25">const </text:span><text:span text:style-name="T26">Student</text:span><text:span text:style-name="T22">&amp; </text:span><text:span text:style-name="T26">other</text:span><text:span text:style-name="T22">) {<text:line-break/><text:tab/></text:span><text:span text:style-name="T25">if </text:span><text:span text:style-name="T22">(</text:span><text:span text:style-name="T25">this </text:span><text:span text:style-name="T22">!= &amp;</text:span><text:span text:style-name="T26">other</text:span><text:span text:style-name="T22">) { </text:span><text:span text:style-name="T28">//self-assignment defense<text:line-break/><text:tab/><text:tab/></text:span><text:span text:style-name="T31">name_ </text:span><text:span text:style-name="T27">= </text:span><text:span text:style-name="T26">other</text:span><text:span text:style-name="T22">.</text:span><text:span text:style-name="T31">name_</text:span><text:span text:style-name="T22">;<text:line-break/><text:tab/><text:tab/></text:span><text:span text:style-name="T31">age_ </text:span><text:span text:style-name="T22">= </text:span><text:span text:style-name="T26">other</text:span><text:span text:style-name="T22">.</text:span><text:span text:style-name="T31">age_</text:span><text:span text:style-name="T22">;<text:line-break/><text:tab/><text:tab/></text:span><text:span text:style-name="T31">subject_ </text:span><text:span text:style-name="T27">= </text:span><text:span text:style-name="T26">other</text:span><text:span text:style-name="T22">.</text:span><text:span text:style-name="T31">subject_</text:span><text:span text:style-name="T22">;<text:line-break/><text:tab/><text:tab/></text:span><text:span text:style-name="T31">grade_ </text:span><text:span text:style-name="T22">= </text:span><text:span text:style-name="T26">other</text:span><text:span text:style-name="T22">.</text:span><text:span text:style-name="T31">grade_</text:span><text:span text:style-name="T22">;<text:line-break/><text:tab/>}<text:line-break/><text:tab/></text:span><text:span text:style-name="T25">return </text:span><text:span text:style-name="T22">*</text:span><text:span text:style-name="T25">this</text:span><text:span text:style-name="T22">;<text:line-break/></text:span><text:soft-page-break/><text:span text:style-name="T22">}<text:line-break/></text:span><text:span text:style-name="T28">//stylized i/o overload<text:line-break/></text:span><text:span text:style-name="T26">std</text:span><text:span text:style-name="T22">::</text:span><text:span text:style-name="T26">istream</text:span><text:span text:style-name="T22">&amp; </text:span><text:span text:style-name="T25">operator</text:span><text:span text:style-name="T22">&gt;&gt;(</text:span><text:span text:style-name="T26">std</text:span><text:span text:style-name="T22">::</text:span><text:span text:style-name="T26">istream</text:span><text:span text:style-name="T22">&amp; </text:span><text:span text:style-name="T26">in</text:span><text:span text:style-name="T22">, </text:span><text:span text:style-name="T26">Student</text:span><text:span text:style-name="T22">&amp; </text:span><text:span text:style-name="T26">s</text:span><text:span text:style-name="T22">) {<text:line-break/><text:tab/></text:span><text:span text:style-name="T26">std</text:span><text:span text:style-name="T22">::</text:span><text:span text:style-name="T26">cout </text:span><text:span text:style-name="T27">&lt;&lt; </text:span><text:span text:style-name="T24">"Enter name: "</text:span><text:span text:style-name="T22">;<text:line-break/><text:tab/></text:span><text:span text:style-name="T26">in </text:span><text:span text:style-name="T27">&gt;&gt; </text:span><text:span text:style-name="T26">s</text:span><text:span text:style-name="T22">.</text:span><text:span text:style-name="T31">name_</text:span><text:span text:style-name="T22">;<text:line-break/><text:tab/></text:span><text:span text:style-name="T26">std</text:span><text:span text:style-name="T22">::</text:span><text:span text:style-name="T26">cout </text:span><text:span text:style-name="T27">&lt;&lt; </text:span><text:span text:style-name="T24">"Enter age: "</text:span><text:span text:style-name="T22">; </text:span><text:span text:style-name="T26">in </text:span><text:span text:style-name="T27">&gt;&gt; </text:span><text:span text:style-name="T26">s</text:span><text:span text:style-name="T22">.</text:span><text:span text:style-name="T31">age_</text:span><text:span text:style-name="T22">;<text:line-break/><text:tab/></text:span><text:span text:style-name="T26">std</text:span><text:span text:style-name="T22">::</text:span><text:span text:style-name="T26">cout </text:span><text:span text:style-name="T27">&lt;&lt; </text:span><text:span text:style-name="T24">"Enter subject: "</text:span><text:span text:style-name="T22">;<text:line-break/><text:tab/></text:span><text:span text:style-name="T26">in </text:span><text:span text:style-name="T27">&gt;&gt; </text:span><text:span text:style-name="T26">s</text:span><text:span text:style-name="T22">.</text:span><text:span text:style-name="T31">subject_</text:span><text:span text:style-name="T22">;<text:line-break/><text:tab/></text:span><text:span text:style-name="T26">std</text:span><text:span text:style-name="T22">::</text:span><text:span text:style-name="T26">cout </text:span><text:span text:style-name="T27">&lt;&lt; </text:span><text:span text:style-name="T24">"Enter grade: "</text:span><text:span text:style-name="T22">; </text:span><text:span text:style-name="T26">in </text:span><text:span text:style-name="T27">&gt;&gt; </text:span><text:span text:style-name="T26">s</text:span><text:span text:style-name="T22">.</text:span><text:span text:style-name="T31">grade_</text:span><text:span text:style-name="T22">;<text:line-break/><text:tab/></text:span><text:span text:style-name="T25">return </text:span><text:span text:style-name="T26">in</text:span><text:span text:style-name="T22">;<text:line-break/>}<text:line-break/></text:span><text:span text:style-name="T26">std</text:span><text:span text:style-name="T22">::</text:span><text:span text:style-name="T26">ostream</text:span><text:span text:style-name="T22">&amp; </text:span><text:span text:style-name="T25">operator</text:span><text:span text:style-name="T22">&lt;&lt;(</text:span><text:span text:style-name="T26">std</text:span><text:span text:style-name="T22">::</text:span><text:span text:style-name="T26">ostream</text:span><text:span text:style-name="T22">&amp; </text:span><text:span text:style-name="T26">out</text:span><text:span text:style-name="T22">, </text:span><text:span text:style-name="T25">const </text:span><text:span text:style-name="T26">Student</text:span><text:span text:style-name="T22">&amp; </text:span><text:span text:style-name="T26">s</text:span><text:span text:style-name="T22">) {<text:line-break/><text:tab/></text:span><text:span text:style-name="T26">out </text:span><text:span text:style-name="T27">&lt;&lt; </text:span><text:span text:style-name="T24">"Name: " </text:span><text:span text:style-name="T27">&lt;&lt; </text:span><text:span text:style-name="T26">s</text:span><text:span text:style-name="T22">.</text:span><text:span text:style-name="T31">name_ </text:span><text:span text:style-name="T27">&lt;&lt; </text:span><text:span text:style-name="T24">", Age: " </text:span><text:span text:style-name="T27">&lt;&lt; </text:span><text:span text:style-name="T26">s</text:span><text:span text:style-name="T22">.</text:span><text:span text:style-name="T31">age_ </text:span><text:span text:style-name="T27">&lt;&lt; </text:span><text:span text:style-name="T24">", Subject: " </text:span><text:span text:style-name="T27">&lt;&lt; </text:span><text:span text:style-name="T26">s</text:span><text:span text:style-name="T22">.</text:span><text:span text:style-name="T31">subject_ </text:span><text:span text:style-name="T27">&lt;&lt; </text:span><text:span text:style-name="T24">", Grade: " </text:span><text:span text:style-name="T27">&lt;&lt; </text:span><text:span text:style-name="T26">s</text:span><text:span text:style-name="T22">.</text:span><text:span text:style-name="T31">grade_</text:span><text:span text:style-name="T22">;<text:line-break/><text:tab/></text:span><text:span text:style-name="T25">return </text:span><text:span text:style-name="T26">out</text:span><text:span text:style-name="T22">;<text:line-break/>}<text:line-break/></text:span><text:span text:style-name="T28">//grade-checking metod. Any grade lower than 3 is a bad grade<text:line-break/></text:span><text:span text:style-name="T25">bool </text:span><text:span text:style-name="T26">Student</text:span><text:span text:style-name="T22">::</text:span><text:span text:style-name="T27">isGradeOkay</text:span><text:span text:style-name="T22">() </text:span><text:span text:style-name="T25">const </text:span><text:span text:style-name="T22">{<text:line-break/><text:tab/></text:span><text:span text:style-name="T25">if </text:span><text:span text:style-name="T22">(</text:span><text:span text:style-name="T31">grade_ </text:span><text:span text:style-name="T22">&lt;= </text:span><text:span text:style-name="T30">2</text:span><text:span text:style-name="T22">) {<text:line-break/><text:tab/><text:tab/></text:span><text:span text:style-name="T26">std</text:span><text:span text:style-name="T22">::</text:span><text:span text:style-name="T26">cout </text:span><text:span text:style-name="T27">&lt;&lt; </text:span><text:span text:style-name="T24">"That's a bad grade!</text:span><text:span text:style-name="T29">\n</text:span><text:span text:style-name="T24">"</text:span><text:span text:style-name="T22">;<text:line-break/><text:tab/>}<text:line-break/><text:tab/></text:span><text:span text:style-name="T25">return </text:span><text:span text:style-name="T31">grade_ </text:span><text:span text:style-name="T22">&gt; </text:span><text:span text:style-name="T30">2</text:span><text:span text:style-name="T22">;<text:line-break/>}</text:span></text:p>
      <text:p text:style-name="P26" loext:marker-style-name="T32"/>
      <text:p text:style-name="P27" loext:marker-style-name="T1">Решение</text:p>
      <text:p text:style-name="P28" loext:marker-style-name="T1"><draw:frame draw:style-name="fr2" draw:name="Изображение4" text:anchor-type="as-char" svg:width="5.4327in" svg:height="3.7319in" draw:z-index="1"><draw:image xlink:href="Pictures/10000001000002640000012D14FD2A7D.png" xlink:type="simple" xlink:show="embed" xlink:actuate="onLoad" draw:mime-type="image/png"/></draw:frame></text:p>
      <text:p text:style-name="P28" loext:marker-style-name="T1"><draw:frame draw:style-name="fr2" draw:name="Изображение4 Копия 1" text:anchor-type="as-char" svg:width="5.4535in" svg:height="4.0673in" draw:z-index="3"><draw:image xlink:href="Pictures/1000000100000228000001355600C77B.png" xlink:type="simple" xlink:show="embed" xlink:actuate="onLoad" draw:mime-type="image/png"/></draw:frame></text:p>
      <text:p text:style-name="P29" loext:marker-style-name="T1">Контрольные вопросы</text:p>
      <text:p text:style-name="P30"><text:span text:style-name="T15">1. </text:span><text:span text:style-name="T18">Для чего используется механизм наследования? – </text:span><text:span text:style-name="T15">для создания новых классов на основании уже существующих, расширения функционала базовых классов, неповторения и структуризации кода, реализации абстракции</text:span></text:p>
      <text:p text:style-name="P31">2. Каким образом наследуются компоненты класса, описанные со спецификатором public? – <text:span text:style-name="T34">доступ остается неизменным, публичные методы родителя становятся публичными методами ребенка</text:span></text:p>
      <text:p text:style-name="P31">3. Каким образом наследуются компоненты класса, описанные со спецификатором private? – <text:span text:style-name="T34">доступ ребенка к полям класса-родителя теряется</text:span></text:p>
      <text:p text:style-name="P31">4. Каким образом наследуются компоненты класса, описанные со спецификатором protected? – <text:span text:style-name="T34">доступ ребенка к полям класса-родителя сохраняется, но остается недоступным для всех остальных областей видимости</text:span></text:p>
      <text:p text:style-name="P31">5. Каким образом описывается производный класс? <text:span text:style-name="T34">Через оператор наследования «:» </text:span><text:span text:style-name="T35">и ключевое слово </text:span><text:span text:style-name="T36">доступа</text:span><text:span text:style-name="T35"> </text:span><text:span text:style-name="T37">public </text:span><text:span text:style-name="T36">или </text:span><text:span text:style-name="T38">private</text:span></text:p>
      <text:p text:style-name="P31"/>
      <text:p text:style-name="P32">class child : public parent {};</text:p>
      <text:p text:style-name="P31"/>
      <text:p text:style-name="P31">6. Наследуются ли конструкторы? - <text:span text:style-name="T35">Нет</text:span></text:p>
      <text:p text:style-name="P31"><text:span text:style-name="T34">7</text:span>. Наследуются ли деструкторы? - <text:span text:style-name="T35">Нет</text:span></text:p>
      <text:p text:style-name="P31">8. В каком порядке конструируются объекты производных классов? – <text:span text:style-name="T35">сначала родительский класс, затем поля эксклюзивные для ребенка</text:span></text:p>
      <text:p text:style-name="P31">9. В каком порядке уничтожаются объекты производных классов? – <text:span text:style-name="T35">сначала вызываются деструкторы производных классов, затем по завершении вызываются деструкторы родителей</text:span></text:p>
      <text:p text:style-name="P31">10. Что представляют собой виртуальные функции и механизм позднего связывания? – <text:span text:style-name="T35">виртуальные функции могут быть переопределены в детях класса, нужны для реализации полиморфизма. Механизм позднего связывания — имя метода связывается с адресом его реализации во время работы программы, а не на этапе наследования, что позволяет работать с объектами разных классов в иерархии наследования гибко</text:span></text:p>
      <text:p text:style-name="P31">11. Могут ли быть виртуальными конструкторы? Деструкторы? – <text:span text:style-name="T36">конструкторы виртуальными быть не могут, деструкторы — могут и это желательно при работе с иерархией классов где существуют чисто виртуальные классы</text:span></text:p>
      <text:p text:style-name="P31">12. Наследуется ли спецификатор virtual? – <text:span text:style-name="T36">Да</text:span></text:p>
      <text:p text:style-name="P33">13. Какое отношение устанавливает между классами открытое наследование? <text:s/>- <text:span text:style-name="T36">«Является». Класс-наследник расширяет функционал класса-родителя, являя собой более конкретную его версию</text:span></text:p>
      <text:p text:style-name="P31"><text:soft-page-break/>14. Какое отношение устанавливает между классами закрытое наследование? – “<text:span text:style-name="T36">Реализован при помощи</text:span>”. <text:span text:style-name="T36">Класс-наследник не получает доступа к приватным и защищенным полям родителя, класс-наследник не является разновидностью класса-родителя</text:span></text:p>
      <text:p text:style-name="P31">15. В чем заключается принцип подстановки? – <text:span text:style-name="T36">объекты типов-наследников должны быть взаимозаменяемы с объектами их базовых типов без изменения ожидаемого поведения программы.</text:span></text:p>
      <text:p text:style-name="P31">16. Имеется иерархия классов: class Student { int age; public: string name; ... }; class Employee : public Student { protected: string post; ... }; class Teacher : public Employee { protected: int stage; ... }; Teacher x; Какие компонентные данные будет иметь объект х? – <text:span text:style-name="T38">age, post, stage, </text:span><text:span text:style-name="T36">где </text:span><text:span text:style-name="T38">age </text:span><text:span text:style-name="T36">и </text:span><text:span text:style-name="T38">post </text:span><text:span text:style-name="T36">наследуются от </text:span><text:span text:style-name="T38">Employee, </text:span><text:span text:style-name="T36">где </text:span><text:span text:style-name="T38">age </text:span><text:span text:style-name="T36">наследуется от </text:span><text:span text:style-name="T38">Student</text:span></text:p>
      <text:p text:style-name="P34">17. Для классов Student, Employee и Teacher написать конструкторы без параметров.</text:p>
      <text:p text:style-name="P35"><text:s/>- Student() : age(0) {}</text:p>
      <text:p text:style-name="P35"><text:s/>- Employee() : Student(), post(“”) {}</text:p>
      <text:p text:style-name="P35"><text:s/>- Teacher() : Employee(), <text:span text:style-name="T39">s</text:span>tage(0) {}</text:p>
      <text:p text:style-name="P34">18. Для классов Student, Employee и Teacher написать конструкторы с параметрами.</text:p>
      <text:p text:style-name="P36"><text:s/>- Student(int age_) : age(age_) {}</text:p>
      <text:p text:style-name="P36"><text:s/>- Employee(int age_, const string&amp; post_) : Student(age_). post(post_) {}</text:p>
      <text:p text:style-name="P36"><text:s/>- Teacher(int age_, const string&amp; post_, int stage_) : Employee(age_, post_), stage(stage_)</text:p>
      <text:p text:style-name="P34">19. Для классов Student, Employee и Teacher написать конструкторы копирования.</text:p>
      <text:p text:style-name="P34"><text:s/>- <text:span text:style-name="T40">Student(const Student&amp; other) : age(other.age) {}</text:span></text:p>
      <text:p text:style-name="P37"><text:s/>- Employee(const Employee&amp; other) : age(other.age), post(other.post) {}</text:p>
      <text:p text:style-name="P37"><text:s/>- Teacher(const Teacher&amp; other) : age(other.age), post(other.post), stage(other.stage) {}</text:p>
      <text:p text:style-name="P34">20. Для классов Student, Employee и Teacher определить операцию присваивания.</text:p>
      <text:p text:style-name="P34"><text:s/>- <text:span text:style-name="T40">Student&amp; operator=(const Student&amp; other) {</text:span></text:p>
      <text:p text:style-name="P36">if (this == &amp;other) return *this;</text:p>
      <text:p text:style-name="P36">age = other.age;</text:p>
      <text:p text:style-name="P36">return *this;</text:p>
      <text:p text:style-name="P38"><text:s/>- <text:span text:style-name="T39">E</text:span><text:span text:style-name="T40">mployee&amp; operator=(const Employee&amp; other) {</text:span></text:p>
      <text:p text:style-name="P36">if (this == &amp;other) return *this;</text:p>
      <text:p text:style-name="P36">age = other.age;</text:p>
      <text:p text:style-name="P36">post = other.post</text:p>
      <text:p text:style-name="P36"><text:soft-page-break/>return *this;</text:p>
      <text:p text:style-name="P38"><text:s/>- <text:span text:style-name="T39">T</text:span><text:span text:style-name="T40">eacher&amp; operator=(const </text:span><text:span text:style-name="T41">Teacher</text:span><text:span text:style-name="T40">&amp; other) {</text:span></text:p>
      <text:p text:style-name="P36">if (this == &amp;other) return *this;</text:p>
      <text:p text:style-name="P36">age = other.age;</text:p>
      <text:p text:style-name="P36">post = other.post</text:p>
      <text:p text:style-name="P36">stage = other.stage</text:p>
      <text:p text:style-name="P36">return *this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54</meta:editing-cycles>
    <meta:creation-date>2025-12-13T14:37:00</meta:creation-date>
    <dc:date>2026-05-03T11:00:48.483104981</dc:date>
    <meta:editing-duration>PT16H54M18S</meta:editing-duration>
    <meta:generator>LibreOffice/25.8.5.2$Linux_X86_64 LibreOffice_project/580$Build-2</meta:generator>
    <meta:document-statistic meta:table-count="0" meta:image-count="3" meta:object-count="0" meta:page-count="14" meta:paragraph-count="93" meta:word-count="1453" meta:character-count="11337" meta:non-whitespace-character-count="9804"/>
    <meta:user-defined meta:name="AppVersion">16.0000</meta:user-defined>
    <meta:template xlink:type="simple" xlink:actuate="onRequest" xlink:title="Normal" xlink:href=""/>
  </office:meta>
</office:document-meta>
</file>