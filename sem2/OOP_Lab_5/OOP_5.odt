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8000001B0E5EED5C5.png" manifest:media-type="image/png"/>
  <manifest:file-entry manifest:full-path="Pictures/1000000100000B4400000EC0B8AB533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dc61f" style:font-size-asian="14pt" style:font-name-complex="Times New Roman1" style:font-size-complex="14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  <style:text-properties officeooo:rsid="0017070d" officeooo:paragraph-rsid="0017070d"/>
    </style:style>
    <style:style style:name="P8" style:family="paragraph" style:parent-style-name="List_20_Paragraph">
      <style:paragraph-properties fo:margin-left="0in" fo:text-align="justify" style:justify-single-word="false" fo:text-indent="0.4925in" style:auto-text-indent="false" fo:break-before="page"/>
      <style:text-properties officeooo:paragraph-rsid="00482439"/>
    </style:style>
    <style:style style:name="P9" style:family="paragraph" style:parent-style-name="List_20_Paragraph">
      <style:paragraph-properties fo:margin-left="0in" fo:text-align="justify" style:justify-single-word="false" fo:text-indent="0in" style:auto-text-indent="false"/>
      <style:text-properties officeooo:paragraph-rsid="004af9d1"/>
    </style:style>
    <style:style style:name="P10" style:family="paragraph" style:parent-style-name="Standard">
      <style:paragraph-properties fo:margin-left="0in" fo:text-align="justify" style:justify-single-word="false" fo:text-indent="0in" style:auto-text-indent="false"/>
      <style:text-properties officeooo:paragraph-rsid="004af9d1"/>
    </style:style>
    <style:style style:name="P11" style:family="paragraph" style:parent-style-name="Standard">
      <style:paragraph-properties fo:margin-left="0in" fo:text-align="justify" style:justify-single-word="false" fo:text-indent="0in" style:auto-text-indent="false"/>
      <style:text-properties fo:color="#000000" loext:opacity="100%" style:font-name="Times New Roman" fo:font-size="12pt" fo:font-style="normal" fo:font-weight="normal" officeooo:paragraph-rsid="004af9d1" style:font-size-asian="12pt" style:font-style-asian="normal" style:font-weight-asian="normal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4" style:family="paragraph" style:parent-style-name="List_20_Paragraph">
      <style:paragraph-properties fo:margin-left="0in" fo:text-align="justify" style:justify-single-word="false" fo:text-indent="0.4925in" style:auto-text-indent="false"/>
    </style:style>
    <style:style style:name="P15" style:family="paragraph" style:parent-style-name="Text_20_body" style:list-style-name="WWNum25">
      <style:paragraph-properties fo:margin-left="0.4925in" fo:text-align="justify" style:justify-single-word="false" fo:text-indent="-0.4925in" style:auto-text-indent="false"/>
      <style:text-properties style:font-name="Times New Roman" fo:font-size="14pt" fo:language="ru" fo:country="RU" officeooo:rsid="0051f43c" officeooo:paragraph-rsid="0051f43c" style:font-size-asian="14pt" style:font-name-complex="Times New Roman1" style:font-size-complex="14pt"/>
    </style:style>
    <style:style style:name="P16" style:family="paragraph" style:parent-style-name="Text_20_body" style:list-style-name="WWNum25">
      <style:paragraph-properties fo:margin-left="0.4925in" fo:text-align="justify" style:justify-single-word="false" fo:text-indent="-0.4925in" style:auto-text-indent="false"/>
      <style:text-properties style:font-name="Times New Roman" fo:font-size="14pt" fo:language="ru" fo:country="RU" officeooo:rsid="003adf73" officeooo:paragraph-rsid="003adf73" style:font-size-asian="14pt" style:font-name-complex="Times New Roman1" style:font-size-complex="14pt"/>
    </style:style>
    <style:style style:name="P17" style:family="paragraph" style:parent-style-name="Text_20_body" style:list-style-name="WWNum25">
      <style:paragraph-properties fo:margin-left="0.4925in" fo:text-align="justify" style:justify-single-word="false" fo:text-indent="-0.4925in" style:auto-text-indent="false"/>
      <style:text-properties style:font-name="Times New Roman" fo:font-size="14pt" fo:language="ru" fo:country="RU" officeooo:rsid="00419a16" officeooo:paragraph-rsid="00419a16" style:font-size-asian="14pt" style:font-name-complex="Times New Roman1" style:font-size-complex="14pt"/>
    </style:style>
    <style:style style:name="P18" style:family="paragraph" style:parent-style-name="Text_20_body" style:list-style-name="WWNum25">
      <style:paragraph-properties fo:margin-left="0.4925in" fo:text-align="justify" style:justify-single-word="false" fo:text-indent="-0.4925in" style:auto-text-indent="false"/>
      <style:text-properties style:font-name="Times New Roman" fo:font-size="14pt" fo:language="ru" fo:country="RU" officeooo:rsid="003adf73" officeooo:paragraph-rsid="004ba345" style:font-size-asian="14pt" style:font-name-complex="Times New Roman1" style:font-size-complex="14pt"/>
    </style:style>
    <style:style style:name="P19" style:family="paragraph" style:parent-style-name="Text_20_body" style:list-style-name="WWNum25">
      <style:paragraph-properties fo:margin-left="0.4925in" fo:text-align="justify" style:justify-single-word="false" fo:text-indent="-0.4925in" style:auto-text-indent="false"/>
      <style:text-properties style:font-name="Times New Roman" fo:font-size="14pt" fo:language="ru" fo:country="RU" officeooo:rsid="00419a16" officeooo:paragraph-rsid="004ba345" style:font-size-asian="14pt" style:font-name-complex="Times New Roman1" style:font-size-complex="14pt"/>
    </style:style>
    <style:style style:name="P20" style:family="paragraph" style:parent-style-name="List_20_Paragraph">
      <style:paragraph-properties fo:margin-left="0in" fo:text-align="center" style:justify-single-word="false" fo:break-before="page"/>
      <style:text-properties style:font-name="Times New Roman" fo:font-size="14pt" fo:language="en" fo:country="US" fo:font-weight="bold" officeooo:rsid="003adf73" officeooo:paragraph-rsid="003adf73" style:font-size-asian="14pt" style:font-weight-asian="bold" style:font-name-complex="Times New Roman1" style:font-size-complex="14pt" style:font-weight-complex="bold"/>
    </style:style>
    <style:style style:name="P21" style:family="paragraph" style:parent-style-name="List_20_Paragraph">
      <style:paragraph-properties fo:margin-left="0in" fo:text-align="center" style:justify-single-word="false"/>
      <style:text-properties style:font-name="Times New Roman" fo:font-size="14pt" fo:font-weight="bold" officeooo:paragraph-rsid="0033bc22" style:font-size-asian="14pt" style:font-weight-asian="bold" style:font-name-complex="Times New Roman1" style:font-size-complex="14pt" style:font-weight-complex="bold"/>
    </style:style>
    <style:style style:name="P22" style:family="paragraph" style:parent-style-name="List_20_Paragraph">
      <style:paragraph-properties fo:margin-left="0in" fo:text-align="center" style:justify-single-word="false"/>
      <style:text-properties style:font-name="Times New Roman" fo:font-size="14pt" fo:font-weight="bold" officeooo:rsid="0051fa66" officeooo:paragraph-rsid="0051fa66" style:font-size-asian="14pt" style:font-weight-asian="bold" style:font-name-complex="Times New Roman1" style:font-size-complex="14pt" style:font-weight-complex="bold"/>
    </style:style>
    <style:style style:name="P23" style:family="paragraph" style:parent-style-name="List_20_Paragraph">
      <style:paragraph-properties fo:margin-left="0in" fo:text-align="center" style:justify-single-word="false" fo:break-before="page"/>
      <style:text-properties style:font-name="Times New Roman" fo:font-size="14pt" officeooo:paragraph-rsid="001bab08" style:font-size-asian="14pt" style:font-name-complex="Times New Roman1" style:font-size-complex="14pt"/>
    </style:style>
    <style:style style:name="P24" style:family="paragraph" style:parent-style-name="Standard">
      <style:text-properties fo:color="#000000" loext:opacity="100%" style:font-name="Cascadia Mono" fo:font-size="9.5pt" fo:language="en" fo:country="US" officeooo:rsid="004f79b3" officeooo:paragraph-rsid="004f79b3" fo:background-color="#ffffff" style:font-size-asian="9.5pt"/>
    </style:style>
    <style:style style:name="P25" style:family="paragraph" style:parent-style-name="Standard">
      <loext:graphic-properties draw:fill="solid" draw:fill-color="#ffffff"/>
      <style:paragraph-properties fo:background-color="#ffffff" fo:padding="0in" fo:border="none" style:shadow="none"/>
    </style:style>
    <style:style style:name="P26" style:family="paragraph" style:parent-style-name="Standard">
      <style:text-properties fo:color="#000000" loext:opacity="100%" style:font-name="Cascadia Mono" fo:font-size="9.5pt" fo:background-color="#ffffff" style:font-size-asian="9.5pt"/>
    </style:style>
    <style:style style:name="P27" style:family="paragraph" style:parent-style-name="Standard">
      <style:text-properties fo:color="#a31515" loext:opacity="100%" style:font-name="Cascadia Mono" fo:font-size="9.5pt" fo:language="en" fo:country="US" officeooo:rsid="004f79b3" fo:background-color="#ffffff" style:font-size-asian="9.5pt"/>
    </style:style>
    <style:style style:name="P28" style:family="paragraph" style:parent-style-name="List_20_Paragraph">
      <style:paragraph-properties fo:margin-left="0in" fo:text-align="center" style:justify-single-word="false" fo:break-before="page"/>
      <style:text-properties style:font-name="Times New Roman" fo:font-size="14pt" fo:font-weight="bold" officeooo:rsid="001a7dbe" officeooo:paragraph-rsid="001a7dbe" style:font-size-asian="14pt" style:font-weight-asian="bold" style:font-name-complex="Times New Roman1" style:font-size-complex="14pt" style:font-weight-complex="bold"/>
    </style:style>
    <style:style style:name="P29" style:family="paragraph" style:parent-style-name="List_20_Paragraph">
      <style:paragraph-properties fo:margin-left="0in" fo:text-align="center" style:justify-single-word="false"/>
      <style:text-properties officeooo:paragraph-rsid="001a7dbe"/>
    </style:style>
    <style:style style:name="P30" style:family="paragraph" style:parent-style-name="List_20_Paragraph">
      <style:paragraph-properties fo:margin-left="0in" fo:text-align="center" style:justify-single-word="false" fo:break-before="page"/>
      <style:text-properties style:font-name="Times New Roman" fo:font-size="14pt" fo:font-weight="bold" officeooo:rsid="003d601d" officeooo:paragraph-rsid="003d601d" style:font-size-asian="14pt" style:font-weight-asian="bold" style:font-name-complex="Times New Roman1" style:font-size-complex="14pt" style:font-weight-complex="bold"/>
    </style:style>
    <style:style style:name="P31" style:family="paragraph" style:parent-style-name="List_20_Paragraph">
      <style:paragraph-properties fo:margin-left="0in" fo:text-align="start" style:justify-single-word="false"/>
      <style:text-properties style:font-name="Times New Roman" fo:font-size="14pt" officeooo:rsid="00419a16" officeooo:paragraph-rsid="004ba345" style:font-size-asian="14pt" style:font-name-complex="Times New Roman1" style:font-size-complex="14pt"/>
    </style:style>
    <style:style style:name="P32" style:family="paragraph" style:parent-style-name="Text_20_body">
      <style:paragraph-properties fo:margin-left="0in" fo:margin-right="0in" fo:line-height="116%" fo:orphans="2" fo:widows="2" fo:text-indent="0in" style:auto-text-indent="false"/>
      <style:text-properties style:font-name="Times New Roman" fo:font-size="14pt" officeooo:rsid="00419a16" officeooo:paragraph-rsid="005010f2" style:font-size-asian="14pt" style:font-name-complex="Times New Roman1" style:font-size-complex="14pt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16%" fo:orphans="2" fo:widows="2" fo:text-indent="0in" style:auto-text-indent="false"/>
      <style:text-properties style:font-name="Times New Roman" fo:font-size="14pt" officeooo:rsid="00419a16" style:font-size-asian="14pt" style:font-name-complex="Times New Roman1" style:font-size-complex="14pt"/>
    </style:style>
    <style:style style:name="P34" style:family="paragraph" style:parent-style-name="List_20_Paragraph">
      <style:paragraph-properties fo:margin-left="0in" fo:text-align="start" style:justify-single-word="false"/>
      <style:text-properties style:font-name="Times New Roman" fo:font-size="14pt" fo:language="ru" fo:country="RU" fo:font-weight="normal" officeooo:rsid="00419a16" officeooo:paragraph-rsid="004ba345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ru" fo:country="RU" fo:font-weight="bold" officeooo:rsid="004ef383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officeooo:rsid="001a7dbe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en" fo:country="US" fo:font-weight="normal" officeooo:rsid="004af9d1" style:font-size-asian="14pt" style:font-weight-asian="normal" style:font-name-complex="Times New Roman1" style:font-size-complex="14pt" style:font-weight-complex="normal"/>
    </style:style>
    <style:style style:name="T11" style:family="text">
      <style:text-properties fo:color="#000000" loext:opacity="100%" style:font-name="Times New Roman" fo:font-size="12pt" fo:font-style="normal" fo:font-weight="normal" style:font-size-asian="12pt" style:font-style-asian="normal" style:font-weight-asian="normal"/>
    </style:style>
    <style:style style:name="T12" style:family="text">
      <style:text-properties fo:color="#000000" loext:opacity="100%" style:font-name="Times New Roman" fo:font-size="12pt" fo:language="en" fo:country="US" fo:font-style="normal" fo:font-weight="normal" officeooo:rsid="004af9d1" style:font-size-asian="12pt" style:font-style-asian="normal" style:font-weight-asian="normal"/>
    </style:style>
    <style:style style:name="T13" style:family="text">
      <style:text-properties fo:color="#000000" loext:opacity="100%" style:font-name="Times New Roman" fo:font-size="12pt" fo:font-style="normal" fo:font-weight="normal" officeooo:rsid="004af9d1" style:font-size-asian="12pt" style:font-style-asian="normal" style:font-weight-asian="normal"/>
    </style:style>
    <style:style style:name="T14" style:family="text">
      <style:text-properties fo:color="#000000" loext:opacity="100%" fo:font-family="'Times New Roman'" fo:font-size="12pt" fo:font-weight="normal" style:font-family-asian="'Times New Roman'" style:font-size-asian="12pt" style:font-weight-asian="normal" style:font-family-complex="'Times New Roman'" style:font-size-complex="12pt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officeooo:rsid="004ba345"/>
    </style:style>
    <style:style style:name="T17" style:family="text">
      <style:text-properties officeooo:rsid="0051f43c"/>
    </style:style>
    <style:style style:name="T18" style:family="text">
      <style:text-properties fo:language="en" fo:country="US" officeooo:rsid="004ba345"/>
    </style:style>
    <style:style style:name="T19" style:family="text">
      <style:text-properties fo:language="en" fo:country="US" officeooo:rsid="00482439"/>
    </style:style>
    <style:style style:name="T20" style:family="text">
      <style:text-properties officeooo:rsid="00482439"/>
    </style:style>
    <style:style style:name="T21" style:family="text">
      <style:text-properties fo:font-weight="bold" officeooo:rsid="001c65e1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080808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4" style:family="text">
      <style:text-properties fo:color="#9e880d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5" style:family="text">
      <style:text-properties fo:color="#067d17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6" style:family="text">
      <style:text-properties fo:color="#0033b3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7" style:family="text">
      <style:text-properties fo:color="#000000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8" style:family="text">
      <style:text-properties fo:color="#00627a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9" style:family="text">
      <style:text-properties fo:color="#8c8c8c" loext:opacity="100%" fo:font-family="'JetBrains Mono'" style:font-family-generic="roman" style:font-pitch="variable" fo:font-size="12pt" fo:font-style="italic" fo:font-weight="normal" style:font-size-asian="12pt" style:font-style-asian="italic" style:font-weight-asian="normal"/>
    </style:style>
    <style:style style:name="T30" style:family="text">
      <style:text-properties fo:color="#0037a6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31" style:family="text">
      <style:text-properties fo:color="#1750eb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32" style:family="text">
      <style:text-properties fo:color="#871094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33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34" style:family="text">
      <style:text-properties fo:color="#808080" loext:opacity="100%" style:font-name="Cascadia Mono" fo:font-size="9.5pt" fo:background-color="#ffffff" loext:char-shading-value="0" style:font-size-asian="9.5pt"/>
    </style:style>
    <style:style style:name="T35" style:family="text">
      <style:text-properties fo:color="#a31515" loext:opacity="100%" style:font-name="Cascadia Mono" fo:font-size="9.5pt" fo:background-color="#ffffff" loext:char-shading-value="0" style:font-size-asian="9.5pt"/>
    </style:style>
    <style:style style:name="T36" style:family="text">
      <style:text-properties fo:color="#2b91af" loext:opacity="100%" style:font-name="Cascadia Mono" fo:font-size="9.5pt" fo:background-color="#ffffff" loext:char-shading-value="0" style:font-size-asian="9.5pt"/>
    </style:style>
    <style:style style:name="T37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38" style:family="text">
      <style:text-properties fo:color="#008080" loext:opacity="100%" style:font-name="Cascadia Mono" fo:font-size="9.5pt" fo:background-color="#ffffff" loext:char-shading-value="0" style:font-size-asian="9.5pt"/>
    </style:style>
    <style:style style:name="T39" style:family="text">
      <style:text-properties fo:color="#808080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40" style:family="text">
      <style:text-properties fo:language="ru" fo:country="RU" fo:font-weight="normal" officeooo:rsid="004ba345" style:font-weight-asian="normal" style:font-weight-complex="normal"/>
    </style:style>
    <style:style style:name="T41" style:family="text">
      <style:text-properties fo:font-variant="normal" fo:text-transform="none" fo:color="#222222" loext:opacity="100%" fo:font-family="'times new roman', serif" fo:letter-spacing="normal" fo:font-style="normal" fo:font-weight="normal"/>
    </style:style>
    <style:style style:name="T42" style:family="text">
      <style:text-properties fo:font-variant="normal" fo:text-transform="none" fo:color="#222222" loext:opacity="100%" fo:letter-spacing="normal" fo:font-style="normal" fo:font-weight="normal"/>
    </style:style>
    <style:style style:name="T43" style:family="text">
      <style:text-properties fo:font-variant="normal" fo:text-transform="none" fo:color="#0f1115" loext:opacity="100%" fo:font-family="'times new roman', serif" fo:letter-spacing="normal" fo:font-style="normal" fo:font-weight="normal"/>
    </style:style>
    <style:style style:name="T44" style:family="text">
      <style:text-properties fo:font-variant="normal" fo:text-transform="none" fo:color="#0f1115" loext:opacity="100%" fo:font-family="'times new roman', serif" fo:letter-spacing="normal" fo:language="en" fo:country="US" fo:font-style="normal" fo:font-weight="normal" officeooo:rsid="005010f2"/>
    </style:style>
    <style:style style:name="T45" style:family="text">
      <style:text-properties fo:font-variant="normal" fo:text-transform="none" fo:color="#222222" loext:opacity="100%" fo:font-family="'times new roman', serif" fo:letter-spacing="normal" fo:language="en" fo:country="US" fo:font-style="normal" fo:font-weight="normal" officeooo:rsid="005010f2"/>
    </style:style>
    <style:style style:name="T46" style:family="text">
      <style:text-properties fo:font-variant="normal" fo:text-transform="none" fo:color="#222222" loext:opacity="100%" fo:font-family="'times new roman', serif" fo:letter-spacing="normal" fo:language="en" fo:country="US" fo:font-style="normal" fo:font-weight="normal"/>
    </style:style>
    <style:style style:name="T47" style:family="text">
      <style:text-properties fo:font-variant="normal" fo:text-transform="none" fo:color="#0f1115" loext:opacity="100%" fo:font-family="'times new roman', serif" fo:letter-spacing="normal" fo:font-style="normal" fo:font-weight="normal" fo:background-color="#ffffff" loext:char-shading-value="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102in" fo:min-width="1.1744in" fo:padding-top="0in" fo:padding-bottom="0in" fo:padding-left="0in" fo:padding-right="0in" loext:decorative="false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102in" fo:min-width="1.6862in" fo:padding-top="0in" fo:padding-bottom="0in" fo:padding-left="0in" fo:padding-right="0in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102in" fo:min-width="1.4791in" fo:padding-top="0in" fo:padding-bottom="0in" fo:padding-left="0in" fo:padding-right="0in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102in" fo:min-width="1.4035in" fo:padding-top="0in" fo:padding-bottom="0in" fo:padding-left="0in" fo:padding-right="0in" loext:decorative="false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102in" fo:min-width="2.9484in" fo:padding-top="0in" fo:padding-bottom="0in" fo:padding-left="0in" fo:padding-right="0in" loext:decorative="false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102in" fo:min-width="6.3307in" fo:padding-top="0in" fo:padding-bottom="0in" fo:padding-left="0in" fo:padding-right="0in" loext:decorative="false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102in" fo:min-width="5.6646in" fo:padding-top="0in" fo:padding-bottom="0in" fo:padding-left="0in" fo:padding-right="0in" loext:decorative="false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102in" fo:min-width="2.3602in" fo:padding-top="0in" fo:padding-bottom="0in" fo:padding-left="0in" fo:padding-right="0in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217066912"/><text:span text:style-name="T1">Министерство науки и высшего образования Российской Федерации</text:span><text:span text:style-name="T1"/></text:p>
      <text:p text:style-name="P1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1" loext:marker-style-name="T1"><text:span text:style-name="T1">«Пермский национальный исследовательский политехнический университет»</text:span><text:span text:style-name="T1"/></text:p>
      <text:p text:style-name="P2" loext:marker-style-name="T2"/>
      <text:p text:style-name="P1" loext:marker-style-name="T2"><text:span text:style-name="T2">Электротехнический факультет</text:span><text:span text:style-name="T2"/></text:p>
      <text:p text:style-name="Standard" loext:marker-style-name="T3"><text:span text:style-name="T2">Выпускающая кафедра: </text:span><text:span text:style-name="T3">информационные технологии и автоматизированные системы (ИТАС)</text:span></text:p>
      <text:p text:style-name="Standard" loext:marker-style-name="T3"><text:span text:style-name="T2">Направление подготовки: </text:span><text:span text:style-name="T3">09.03.04 Программная инженерия</text:span></text:p>
      <text:p text:style-name="P3" loext:marker-style-name="T2"/>
      <text:p text:style-name="P4" loext:marker-style-name="T1"/>
      <text:p text:style-name="P1" loext:marker-style-name="T1"><text:span text:style-name="T1">ОТЧЕТ</text:span><text:span text:style-name="T1"/></text:p>
      <text:p text:style-name="P1" loext:marker-style-name="T4"><text:span text:style-name="T1">Лабораторная работа</text:span></text:p>
      <text:p text:style-name="P1" loext:marker-style-name="T1"><text:span text:style-name="T1">«</text:span><text:span text:style-name="T5">Наследование. Виртуальные функции. Полиморфизм</text:span><text:span text:style-name="T1">»</text:span></text:p>
      <text:p text:style-name="P1" loext:marker-style-name="T1"><text:span text:style-name="T1">По дисциплине «Основы алгоритмизации и программирования»</text:span><text:span text:style-name="T1"/></text:p>
      <text:p text:style-name="P5" loext:marker-style-name="T6"/>
      <text:p text:style-name="P2" loext:marker-style-name="T2"/>
      <text:p text:style-name="P2" loext:marker-style-name="T2"/>
      <text:p text:style-name="P2" loext:marker-style-name="T2"/>
      <text:p text:style-name="P6" loext:marker-style-name="T2"><text:span text:style-name="T2">Выполнил студент группы РИС-25-2б</text:span><text:span text:style-name="T2"/></text:p>
      <text:p text:style-name="P7" loext:marker-style-name="T2"><text:span text:style-name="T2">Фокин Алексей Дмитриевич</text:span></text:p>
      <text:p text:style-name="P6" loext:marker-style-name="T2"><text:span text:style-name="T2">Принял: Доц. Полякова О.А.</text:span><text:span text:style-name="T2"/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1" loext:marker-style-name="T7"><text:span text:style-name="T2">Пермь 202</text:span><text:span text:style-name="T8">6</text:span></text:p>
      <text:p text:style-name="P8" loext:marker-style-name="T9"><text:span text:style-name="T1">Постановка задачи</text:span><text:span text:style-name="T9">:</text:span></text:p>
      <text:p text:style-name="P9"><text:span text:style-name="T10">1. </text:span><text:span text:style-name="T11">Определить пользовательский класс. <text:s/></text:span></text:p>
      <text:p text:style-name="P10"><text:span text:style-name="T10">2. </text:span><text:span text:style-name="T11">Определить в классе следующие конструкторы: без параметров, с параметрами, копирования</text:span></text:p>
      <text:p text:style-name="P10"><text:span text:style-name="T12">3. </text:span><text:span text:style-name="T11">Определить в классе деструктор. </text:span></text:p>
      <text:p text:style-name="P10"><text:span text:style-name="T12">4. </text:span><text:span text:style-name="T11">Определить в классе компоненты-функции для просмотра и установки полей данных (селекторы и модификаторы). </text:span></text:p>
      <text:p text:style-name="P10"><text:span text:style-name="T13">5. </text:span><text:span text:style-name="T11">Перегрузить операцию присваивания. </text:span></text:p>
      <text:p text:style-name="P10"><text:span text:style-name="T13">6. </text:span><text:span text:style-name="T11">Перегрузить операции ввода и вывода объектов с помощью потоков. </text:span></text:p>
      <text:p text:style-name="P10"><text:span text:style-name="T13">7. </text:span><text:span text:style-name="T11">Определить производный класс. </text:span></text:p>
      <text:p text:style-name="P10"><text:span text:style-name="T13">8. </text:span><text:span text:style-name="T11">Написать программу, в которой продемонстрировать создание объектов и работу всех перегруженных операций. </text:span></text:p>
      <text:p text:style-name="P10"><text:span text:style-name="T13">9. </text:span><text:span text:style-name="T11">Реализовать функции, получающие и возвращающие объект базового класса. Продемонстрировать принцип подстановки.</text:span></text:p>
      <text:p text:style-name="P11"/>
      <text:p text:style-name="P11"><draw:g text:anchor-type="as-char" svg:y="-0.9701in" draw:z-index="2" draw:name="Групповой объект 1" draw:style-name="gr1"><draw:frame draw:style-name="gr2" draw:text-style-name="P13" svg:width="1.1748in" svg:height="0.2106in" svg:x="0in" svg:y="0in"><draw:text-box><text:p text:style-name="P12"><text:span text:style-name="T14">Базовый класс: </text:span></text:p></draw:text-box></draw:frame><draw:frame draw:style-name="gr3" draw:text-style-name="P13" svg:width="1.6862in" svg:height="0.2106in" svg:x="0in" svg:y="0.2189in"><draw:text-box><text:p text:style-name="P12"><text:span text:style-name="T14">ЧЕЛОВЕК (PERSON) </text:span></text:p></draw:text-box></draw:frame><draw:frame draw:style-name="gr4" draw:text-style-name="P13" svg:width="1.4795in" svg:height="0.2106in" svg:x="0in" svg:y="0.4346in"><draw:text-box><text:p text:style-name="P12"><text:span text:style-name="T14">Имя (name) – string </text:span></text:p></draw:text-box></draw:frame><draw:frame draw:style-name="gr5" draw:text-style-name="P13" svg:width="1.4039in" svg:height="0.2106in" svg:x="0in" svg:y="0.6543in"><draw:text-box><text:p text:style-name="P12"><text:span text:style-name="T14">Возраст (age) – int </text:span></text:p></draw:text-box></draw:frame><draw:frame draw:style-name="gr6" draw:text-style-name="P13" svg:width="2.9488in" svg:height="0.2106in" svg:x="0in" svg:y="0.8693in"><draw:text-box><text:p text:style-name="P12"><text:span text:style-name="T14">Определить методы изменения полей. <text:s/></text:span></text:p></draw:text-box></draw:frame><draw:frame draw:style-name="gr7" draw:text-style-name="P13" svg:width="6.3307in" svg:height="0.2106in" svg:x="0in" svg:y="1.089in"><draw:text-box><text:p text:style-name="P12"><text:span text:style-name="T14">Создать производный класс STUDENT, имеющий поля Предмет – string и Оценка – </text:span></text:p></draw:text-box></draw:frame><draw:frame draw:style-name="gr8" draw:text-style-name="P13" svg:width="5.665in" svg:height="0.2106in" svg:x="0in" svg:y="1.3047in"><draw:text-box><text:p text:style-name="P12"><text:span text:style-name="T14">int. Определить методы изменения полей и метод, выдающий сообщение о </text:span></text:p></draw:text-box></draw:frame><draw:frame draw:style-name="gr9" draw:text-style-name="P13" svg:width="2.3606in" svg:height="0.2106in" svg:x="0in" svg:y="1.5236in"><draw:text-box><text:p text:style-name="P12"><text:span text:style-name="T14">неудовлетворительной оценке. </text:span></text:p></draw:text-box></draw:frame></draw:g></text:p>
      <text:p text:style-name="P14" loext:marker-style-name="T9"><text:span text:style-name="T1">Анализ задачи</text:span><text:span text:style-name="T9">:</text:span></text:p>
      <text:list text:style-name="WWNum25">
        <text:list-item>
          <text:p text:style-name="P15">Реализуем чисто абстрактный базовый класс <text:span text:style-name="T15">Object </text:span>с виртуальным деструктором</text:p>
        </text:list-item>
        <text:list-item>
          <text:p text:style-name="P16">Реализуем<text:span text:style-name="T16"> класс-</text:span><text:span text:style-name="T17">ребенок</text:span><text:span text:style-name="T16"> P</text:span><text:span text:style-name="T18">erson </text:span><text:span text:style-name="T16">с указанными полями</text:span></text:p>
        </text:list-item>
        <text:list-item>
          <text:p text:style-name="P17">С модификатором <text:span text:style-name="T15">public </text:span>реализуем конструкторы (без параметров, с параметрами, копирования), деструктор (все поля — типы по умолчанию поэтому определение оставляем пустым), Реализуем <text:span text:style-name="T19">2</text:span> геттера (по одному на поле), реализуем <text:span text:style-name="T19">2</text:span> сеттера (по одному на поле). <text:span text:style-name="T20">Переопределим операц</text:span><text:span text:style-name="T16">ию</text:span><text:span text:style-name="T20"> присваивания, в качестве дружественных функций переопределим взаимодействие с потоками </text:span><text:span text:style-name="T19">iostream</text:span></text:p>
        </text:list-item>
        <text:list-item>
          <text:p text:style-name="P18">Реализуем<text:span text:style-name="T16"> класс-ребенок S</text:span><text:span text:style-name="T18">tudent</text:span><text:span text:style-name="T16"> наслеующий у</text:span><text:span text:style-name="T18"> Person </text:span><text:span text:style-name="T16">с указанными полями</text:span></text:p>
        </text:list-item>
        <text:list-item>
          <text:p text:style-name="P19"><text:soft-page-break/>С модификатором <text:span text:style-name="T15">public </text:span>реализуем конструкторы (без параметров, с параметрами, копирования), деструктор (все поля — типы по умолчанию поэтому определение оставляем пустым), Реализуем <text:span text:style-name="T19">2</text:span> геттера (по одному на поле), реализуем <text:span text:style-name="T19">2</text:span> сеттера (по одному на поле). <text:span text:style-name="T20">Переопределим операц</text:span><text:span text:style-name="T16">ию</text:span><text:span text:style-name="T20"> присваивания, в качестве дружественных функций переопределим взаимодействие с потоками </text:span><text:span text:style-name="T19">iostream. </text:span><text:span text:style-name="T16">Также определим </text:span><text:span text:style-name="T18">bool-</text:span><text:span text:style-name="T16">функцию для проверки оценки студента на удовлетворительность (3+)</text:span></text:p>
        </text:list-item>
        <text:list-item>
          <text:p text:style-name="P15">Реализуем класс-контейнер Вектор состоящий переменной-счетчика размера и статического массива элементов класса O<text:span text:style-name="T15">bject</text:span></text:p>
        </text:list-item>
        <text:list-item>
          <text:p text:style-name="P15">Для вектора определим конструкторы и деструктор, операцию добавления элемента, а также вывода (через дружественную функцию</text:p>
        </text:list-item>
        <text:list-item>
          <text:p text:style-name="P17">Реализуем главную функцию с тестированием всего вышеперечисленного</text:p>
        </text:list-item>
      </text:list>
      <text:p text:style-name="P20">UML</text:p>
      <text:p text:style-name="P21" loext:marker-style-name="T1"><draw:frame draw:style-name="fr1" draw:name="Изображение1" text:anchor-type="as-char" svg:y="-2.5866in" svg:width="5.7339in" svg:height="8.0929in" draw:z-index="0"><draw:image xlink:href="Pictures/1000000100000B4400000EC0B8AB533F.png" xlink:type="simple" xlink:show="embed" xlink:actuate="onLoad" draw:mime-type="image/png"/></draw:frame></text:p>
      <text:p text:style-name="P22" loext:marker-style-name="T1">Person — наследник Object</text:p>
      <text:p text:style-name="P22" loext:marker-style-name="T1">Student — наследник Person</text:p>
      <text:p text:style-name="P22" loext:marker-style-name="T1">Object — хранятся в контейнере, но могут существовать независимо</text:p>
      <text:p text:style-name="P23" loext:marker-style-name="T1"><text:span text:style-name="T21">К</text:span><text:span text:style-name="T22">од</text:span></text:p>
      <text:p text:style-name="P24">main.cpp</text:p>
      <text:p text:style-name="P25" loext:marker-style-name="T23"><text:span text:style-name="T24">#include </text:span><text:span text:style-name="T25">&lt;iostream&gt;<text:line-break/></text:span><text:span text:style-name="T24">#include </text:span><text:span text:style-name="T25">"Person.h"<text:line-break/></text:span><text:span text:style-name="T24">#include </text:span><text:span text:style-name="T25">"Student.h"<text:line-break/></text:span><text:span text:style-name="T24">#include </text:span><text:span text:style-name="T25">"Vector.h"<text:line-break/></text:span><text:span text:style-name="T26">using namespace </text:span><text:span text:style-name="T27">std</text:span><text:span text:style-name="T23">;<text:line-break/><text:line-break/></text:span><text:span text:style-name="T26">int </text:span><text:span text:style-name="T28">main</text:span><text:span text:style-name="T23">()<text:line-break/>{<text:line-break/><text:tab/></text:span><text:span text:style-name="T29">//from here - repeat of tests from the Lab 4<text:line-break/><text:tab/></text:span><text:span text:style-name="T27">Person a</text:span><text:span text:style-name="T23">;<text:line-break/><text:tab/></text:span><text:span text:style-name="T27">cin </text:span><text:span text:style-name="T28">&gt;&gt; </text:span><text:span text:style-name="T27">a</text:span><text:span text:style-name="T23">;<text:line-break/><text:tab/></text:span><text:span text:style-name="T27">cout </text:span><text:span text:style-name="T28">&lt;&lt; </text:span><text:span text:style-name="T27">a </text:span><text:span text:style-name="T28">&lt;&lt; </text:span><text:span text:style-name="T25">"</text:span><text:span text:style-name="T30">\n</text:span><text:span text:style-name="T25">"</text:span><text:span text:style-name="T23">;<text:line-break/><text:tab/></text:span><text:span text:style-name="T27">Person b</text:span><text:span text:style-name="T28">(</text:span><text:span text:style-name="T25">"Alice"</text:span><text:span text:style-name="T23">, </text:span><text:span text:style-name="T31">30</text:span><text:span text:style-name="T28">)</text:span><text:span text:style-name="T23">;<text:line-break/><text:tab/></text:span><text:span text:style-name="T27">cout </text:span><text:span text:style-name="T28">&lt;&lt; </text:span><text:span text:style-name="T27">b </text:span><text:span text:style-name="T28">&lt;&lt; </text:span><text:span text:style-name="T25">"</text:span><text:span text:style-name="T30">\n</text:span><text:span text:style-name="T25">"</text:span><text:span text:style-name="T23">;<text:line-break/><text:tab/></text:span><text:span text:style-name="T27">a </text:span><text:span text:style-name="T28">= </text:span><text:span text:style-name="T27">b</text:span><text:span text:style-name="T23">;<text:line-break/><text:tab/></text:span><text:span text:style-name="T27">cout </text:span><text:span text:style-name="T28">&lt;&lt; </text:span><text:span text:style-name="T27">a </text:span><text:span text:style-name="T28">&lt;&lt; </text:span><text:span text:style-name="T25">"</text:span><text:span text:style-name="T30">\n</text:span><text:span text:style-name="T25">"</text:span><text:span text:style-name="T23">;<text:line-break/><text:line-break/><text:tab/></text:span><text:span text:style-name="T27">Student s</text:span><text:span text:style-name="T23">;<text:line-break/><text:tab/></text:span><text:span text:style-name="T27">cin </text:span><text:span text:style-name="T28">&gt;&gt; </text:span><text:span text:style-name="T27">s</text:span><text:span text:style-name="T23">;<text:line-break/><text:tab/></text:span><text:span text:style-name="T27">cout </text:span><text:span text:style-name="T28">&lt;&lt; </text:span><text:span text:style-name="T27">s </text:span><text:span text:style-name="T28">&lt;&lt; </text:span><text:span text:style-name="T25">"</text:span><text:span text:style-name="T30">\n</text:span><text:span text:style-name="T25">"</text:span><text:span text:style-name="T23">;<text:line-break/><text:tab/></text:span><text:span text:style-name="T27">s</text:span><text:span text:style-name="T23">.</text:span><text:span text:style-name="T28">isGradeOkay</text:span><text:span text:style-name="T23">();<text:line-break/><text:tab/></text:span><text:span text:style-name="T29">//from here - original test<text:line-break/><text:tab/></text:span><text:span text:style-name="T27">Vector v</text:span><text:span text:style-name="T28">(</text:span><text:span text:style-name="T31">5</text:span><text:span text:style-name="T28">)</text:span><text:span text:style-name="T23">; </text:span><text:span text:style-name="T29">//initializing a Vector object<text:line-break/><text:tab/>//Initializing a Person and a Student - both share heritage with Object<text:line-break/><text:tab/></text:span><text:span text:style-name="T27">Person q</text:span><text:span text:style-name="T23">;<text:line-break/><text:tab/></text:span><text:span text:style-name="T27">cin </text:span><text:span text:style-name="T28">&gt;&gt; </text:span><text:span text:style-name="T27">q</text:span><text:span text:style-name="T23">;<text:line-break/><text:tab/></text:span><text:span text:style-name="T27">Student w</text:span><text:span text:style-name="T23">;<text:line-break/><text:tab/></text:span><text:span text:style-name="T27">cin </text:span><text:span text:style-name="T28">&gt;&gt; </text:span><text:span text:style-name="T27">w</text:span><text:span text:style-name="T23">;<text:line-break/><text:line-break/><text:tab/></text:span><text:span text:style-name="T27">Object</text:span><text:span text:style-name="T23">* </text:span><text:span text:style-name="T27">p </text:span><text:span text:style-name="T23">= &amp;</text:span><text:span text:style-name="T27">q</text:span><text:span text:style-name="T23">; </text:span><text:span text:style-name="T29">//creating a pointer to our Person<text:line-break/><text:tab/></text:span><text:span text:style-name="T27">v</text:span><text:span text:style-name="T23">.</text:span><text:span text:style-name="T28">Add</text:span><text:span text:style-name="T23">(</text:span><text:span text:style-name="T27">p</text:span><text:span text:style-name="T23">); </text:span><text:span text:style-name="T29">// add Person<text:line-break/><text:tab/></text:span><text:span text:style-name="T27">p </text:span><text:span text:style-name="T23">= &amp;</text:span><text:span text:style-name="T27">b</text:span><text:span text:style-name="T23">; </text:span><text:span text:style-name="T29">//now points to a Student<text:line-break/><text:tab/></text:span><text:span text:style-name="T27">v</text:span><text:span text:style-name="T23">.</text:span><text:span text:style-name="T28">Add</text:span><text:span text:style-name="T23">(</text:span><text:span text:style-name="T27">p</text:span><text:span text:style-name="T23">); </text:span><text:span text:style-name="T29">// add Student<text:line-break/><text:tab/></text:span><text:span text:style-name="T27">cout </text:span><text:span text:style-name="T28">&lt;&lt; </text:span><text:span text:style-name="T27">v</text:span><text:span text:style-name="T23">; </text:span><text:span text:style-name="T29">//Vector output<text:line-break/><text:tab/></text:span><text:span text:style-name="T26">return </text:span><text:span text:style-name="T31">0</text:span><text:span text:style-name="T23">;<text:line-break/>}</text:span></text:p>
      <text:p text:style-name="P24"><text:soft-page-break/>Object.h</text:p>
      <text:p text:style-name="P25" loext:marker-style-name="T23"><text:span text:style-name="T24">#pragma </text:span><text:span text:style-name="T26">once<text:line-break/>class </text:span><text:span text:style-name="T27">Object </text:span><text:span text:style-name="T29">//fully abstract class<text:line-break/></text:span><text:span text:style-name="T23">{<text:line-break/></text:span><text:span text:style-name="T26">public</text:span><text:span text:style-name="T23">:<text:line-break/><text:tab/></text:span><text:span text:style-name="T28">Object</text:span><text:span text:style-name="T23">();<text:line-break/><text:tab/></text:span><text:span text:style-name="T28">~Object</text:span><text:span text:style-name="T23">();<text:line-break/><text:tab/></text:span><text:span text:style-name="T26">virtual void </text:span><text:span text:style-name="T28">Show</text:span><text:span text:style-name="T23">() = </text:span><text:span text:style-name="T31">0</text:span><text:span text:style-name="T23">;<text:line-break/>};</text:span></text:p>
      <text:p text:style-name="P24">Person.h</text:p>
      <text:p text:style-name="P25" loext:marker-style-name="T23"><text:span text:style-name="T24">#pragma </text:span><text:span text:style-name="T26">once<text:line-break/></text:span><text:span text:style-name="T24">#include </text:span><text:span text:style-name="T25">"Object.h"<text:line-break/></text:span><text:span text:style-name="T24">#include </text:span><text:span text:style-name="T25">&lt;string&gt;<text:line-break/></text:span><text:span text:style-name="T24">#include </text:span><text:span text:style-name="T25">&lt;iostream&gt;<text:line-break/><text:line-break/></text:span><text:span text:style-name="T26">class </text:span><text:span text:style-name="T27">Person </text:span><text:span text:style-name="T23">: </text:span><text:span text:style-name="T26">public </text:span><text:span text:style-name="T27">Object </text:span><text:span text:style-name="T23">{ </text:span><text:span text:style-name="T29">//Same class definition as in Lab 4, now inheriting from Object<text:line-break/></text:span><text:span text:style-name="T26">protected</text:span><text:span text:style-name="T23">:<text:line-break/><text:tab/></text:span><text:span text:style-name="T27">std</text:span><text:span text:style-name="T23">::</text:span><text:span text:style-name="T27">string </text:span><text:span text:style-name="T32">name_</text:span><text:span text:style-name="T23">;<text:line-break/><text:tab/></text:span><text:span text:style-name="T26">int </text:span><text:span text:style-name="T32">age_</text:span><text:span text:style-name="T23">;<text:line-break/></text:span><text:span text:style-name="T26">public</text:span><text:span text:style-name="T23">:<text:line-break/><text:tab/></text:span><text:span text:style-name="T28">Person</text:span><text:span text:style-name="T23">();<text:line-break/><text:tab/></text:span><text:span text:style-name="T28">Person</text:span><text:span text:style-name="T23">(</text:span><text:span text:style-name="T27">std</text:span><text:span text:style-name="T23">::</text:span><text:span text:style-name="T27">string</text:span><text:span text:style-name="T23">, </text:span><text:span text:style-name="T26">int</text:span><text:span text:style-name="T23">);<text:line-break/><text:tab/></text:span><text:span text:style-name="T28">Person</text:span><text:span text:style-name="T23">(</text:span><text:span text:style-name="T26">const </text:span><text:span text:style-name="T27">Person</text:span><text:span text:style-name="T23">&amp;);<text:line-break/><text:tab/></text:span><text:span text:style-name="T26">virtual </text:span><text:span text:style-name="T28">~Person</text:span><text:span text:style-name="T23">();<text:line-break/><text:line-break/><text:tab/></text:span><text:span text:style-name="T27">std</text:span><text:span text:style-name="T23">::</text:span><text:span text:style-name="T27">string </text:span><text:span text:style-name="T28">getName</text:span><text:span text:style-name="T23">() </text:span><text:span text:style-name="T26">const</text:span><text:span text:style-name="T23">;<text:line-break/><text:tab/></text:span><text:span text:style-name="T26">int </text:span><text:span text:style-name="T28">getAge</text:span><text:span text:style-name="T23">() </text:span><text:span text:style-name="T26">const</text:span><text:span text:style-name="T23">;<text:line-break/><text:line-break/><text:tab/></text:span><text:span text:style-name="T26">void </text:span><text:span text:style-name="T28">setName</text:span><text:span text:style-name="T23">(</text:span><text:span text:style-name="T27">std</text:span><text:span text:style-name="T23">::</text:span><text:span text:style-name="T27">string</text:span><text:span text:style-name="T23">);<text:line-break/><text:tab/></text:span><text:span text:style-name="T26">void </text:span><text:span text:style-name="T28">setAge</text:span><text:span text:style-name="T23">(</text:span><text:span text:style-name="T26">int</text:span><text:span text:style-name="T23">);<text:line-break/><text:line-break/><text:tab/></text:span><text:span text:style-name="T27">Person</text:span><text:span text:style-name="T23">&amp; </text:span><text:span text:style-name="T26">operator</text:span><text:span text:style-name="T23">=(</text:span><text:span text:style-name="T26">const </text:span><text:span text:style-name="T27">Person</text:span><text:span text:style-name="T23">&amp;);<text:line-break/><text:line-break/><text:tab/></text:span><text:span text:style-name="T26">friend </text:span><text:span text:style-name="T27">std</text:span><text:span text:style-name="T23">::</text:span><text:span text:style-name="T27">istream</text:span><text:span text:style-name="T23">&amp; </text:span><text:span text:style-name="T26">operator</text:span><text:span text:style-name="T23">&gt;&gt;(</text:span><text:span text:style-name="T27">std</text:span><text:span text:style-name="T23">::</text:span><text:span text:style-name="T27">istream</text:span><text:span text:style-name="T23">&amp;, </text:span><text:span text:style-name="T27">Person</text:span><text:span text:style-name="T23">&amp;);<text:line-break/><text:tab/></text:span><text:span text:style-name="T26">friend </text:span><text:span text:style-name="T27">std</text:span><text:span text:style-name="T23">::</text:span><text:span text:style-name="T27">ostream</text:span><text:span text:style-name="T23">&amp; </text:span><text:span text:style-name="T26">operator</text:span><text:span text:style-name="T23">&lt;&lt;(</text:span><text:span text:style-name="T27">std</text:span><text:span text:style-name="T23">::</text:span><text:span text:style-name="T27">ostream</text:span><text:span text:style-name="T23">&amp;, </text:span><text:span text:style-name="T26">const </text:span><text:span text:style-name="T27">Person</text:span><text:span text:style-name="T23">&amp;);<text:line-break/><text:line-break/></text:span><text:soft-page-break/><text:span text:style-name="T23"><text:tab/></text:span><text:span text:style-name="T26">void </text:span><text:span text:style-name="T28">Show</text:span><text:span text:style-name="T23">();<text:line-break/>};</text:span></text:p>
      <text:p text:style-name="P24">Person.cpp</text:p>
      <text:p text:style-name="Standard" loext:marker-style-name="T33"><text:span text:style-name="T34">#include</text:span><text:span text:style-name="T33"> </text:span><text:span text:style-name="T35">"Person.h"</text:span></text:p>
      <text:p text:style-name="Standard" loext:marker-style-name="T33"><text:span text:style-name="T34">#include</text:span><text:span text:style-name="T33"> </text:span><text:span text:style-name="T35">&lt;string&gt;</text:span></text:p>
      <text:p text:style-name="Standard" loext:marker-style-name="T33"><text:span text:style-name="T34">#include</text:span><text:span text:style-name="T33"> </text:span><text:span text:style-name="T35">&lt;iostream&gt;</text:span></text:p>
      <text:p text:style-name="P26" loext:marker-style-name="T33"/>
      <text:p text:style-name="Standard" loext:marker-style-name="T33"><text:span text:style-name="T36">Person</text:span><text:span text:style-name="T33">::Person() : name_(</text:span><text:span text:style-name="T35">""</text:span><text:span text:style-name="T33">), age_(0) {}</text:span></text:p>
      <text:p text:style-name="Standard" loext:marker-style-name="T33"><text:span text:style-name="T36">Person</text:span><text:span text:style-name="T33">::Person(std::</text:span><text:span text:style-name="T36">string</text:span><text:span text:style-name="T33"> </text:span><text:span text:style-name="T34">name</text:span><text:span text:style-name="T33">, </text:span><text:span text:style-name="T37">int</text:span><text:span text:style-name="T33"> </text:span><text:span text:style-name="T34">age</text:span><text:span text:style-name="T33">) : name_(</text:span><text:span text:style-name="T34">name</text:span><text:span text:style-name="T33">), age_(</text:span><text:span text:style-name="T34">age</text:span><text:span text:style-name="T33">) {}</text:span></text:p>
      <text:p text:style-name="Standard" loext:marker-style-name="T33"><text:span text:style-name="T36">Person</text:span><text:span text:style-name="T33">::Person(</text:span><text:span text:style-name="T37">const</text:span><text:span text:style-name="T33"> </text:span><text:span text:style-name="T36">Person</text:span><text:span text:style-name="T33">&amp; </text:span><text:span text:style-name="T34">other</text:span><text:span text:style-name="T33">) : name_(</text:span><text:span text:style-name="T34">other</text:span><text:span text:style-name="T33">.name_), age_(</text:span><text:span text:style-name="T34">other</text:span><text:span text:style-name="T33">.age_) {}</text:span></text:p>
      <text:p text:style-name="P26" loext:marker-style-name="T33"/>
      <text:p text:style-name="Standard" loext:marker-style-name="T33"><text:span text:style-name="T36">Person</text:span><text:span text:style-name="T33">::~Person() {}</text:span></text:p>
      <text:p text:style-name="P26" loext:marker-style-name="T33"/>
      <text:p text:style-name="Standard" loext:marker-style-name="T33"><text:span text:style-name="T33">std::</text:span><text:span text:style-name="T36">string</text:span><text:span text:style-name="T33"> </text:span><text:span text:style-name="T36">Person</text:span><text:span text:style-name="T33">::getName() </text:span><text:span text:style-name="T37">const</text:span><text:span text:style-name="T33"> {</text:span></text:p>
      <text:p text:style-name="Standard" loext:marker-style-name="T33"><text:span text:style-name="T33"><text:tab/></text:span><text:span text:style-name="T37">return</text:span><text:span text:style-name="T33"> name_;</text:span></text:p>
      <text:p text:style-name="Standard" loext:marker-style-name="T33"><text:span text:style-name="T33">}</text:span><text:span text:style-name="T33"/></text:p>
      <text:p text:style-name="Standard" loext:marker-style-name="T33"><text:span text:style-name="T37">int</text:span><text:span text:style-name="T33"> </text:span><text:span text:style-name="T36">Person</text:span><text:span text:style-name="T33">::getAge() </text:span><text:span text:style-name="T37">const</text:span><text:span text:style-name="T33"> {</text:span></text:p>
      <text:p text:style-name="Standard" loext:marker-style-name="T33"><text:span text:style-name="T33"><text:tab/></text:span><text:span text:style-name="T37">return</text:span><text:span text:style-name="T33"> age_;</text:span></text:p>
      <text:p text:style-name="Standard" loext:marker-style-name="T33"><text:span text:style-name="T33">}</text:span><text:span text:style-name="T33"/></text:p>
      <text:p text:style-name="Standard" loext:marker-style-name="T33"><text:span text:style-name="T37">void</text:span><text:span text:style-name="T33"> </text:span><text:span text:style-name="T36">Person</text:span><text:span text:style-name="T33">::setName(std::</text:span><text:span text:style-name="T36">string</text:span><text:span text:style-name="T33"> </text:span><text:span text:style-name="T34">name</text:span><text:span text:style-name="T33">) {</text:span></text:p>
      <text:p text:style-name="Standard" loext:marker-style-name="T33"><text:span text:style-name="T33"><text:tab/>name_ </text:span><text:span text:style-name="T38">=</text:span><text:span text:style-name="T33"> </text:span><text:span text:style-name="T34">name</text:span><text:span text:style-name="T33">;</text:span></text:p>
      <text:p text:style-name="Standard" loext:marker-style-name="T33"><text:span text:style-name="T33">}</text:span><text:span text:style-name="T33"/></text:p>
      <text:p text:style-name="Standard" loext:marker-style-name="T33"><text:span text:style-name="T37">void</text:span><text:span text:style-name="T33"> </text:span><text:span text:style-name="T36">Person</text:span><text:span text:style-name="T33">::setAge(</text:span><text:span text:style-name="T37">int</text:span><text:span text:style-name="T33"> </text:span><text:span text:style-name="T34">age</text:span><text:span text:style-name="T33">) {</text:span></text:p>
      <text:p text:style-name="Standard" loext:marker-style-name="T33"><text:span text:style-name="T33"><text:tab/>age_ = </text:span><text:span text:style-name="T34">age</text:span><text:span text:style-name="T33">;</text:span></text:p>
      <text:p text:style-name="Standard" loext:marker-style-name="T33"><text:span text:style-name="T33">}</text:span><text:span text:style-name="T33"/></text:p>
      <text:p text:style-name="P26" loext:marker-style-name="T33"/>
      <text:p text:style-name="Standard" loext:marker-style-name="T33"><text:span text:style-name="T36">Person</text:span><text:span text:style-name="T33">&amp; </text:span><text:span text:style-name="T36">Person</text:span><text:span text:style-name="T33">::</text:span><text:span text:style-name="T38">operator=</text:span><text:span text:style-name="T33">(</text:span><text:span text:style-name="T37">const</text:span><text:span text:style-name="T33"> </text:span><text:span text:style-name="T36">Person</text:span><text:span text:style-name="T33">&amp; </text:span><text:span text:style-name="T34">other</text:span><text:span text:style-name="T33">) {</text:span></text:p>
      <text:p text:style-name="Standard" loext:marker-style-name="T33"><text:span text:style-name="T33"><text:tab/></text:span><text:span text:style-name="T37">if</text:span><text:span text:style-name="T33"> (</text:span><text:span text:style-name="T37">this</text:span><text:span text:style-name="T33"> != &amp;</text:span><text:span text:style-name="T34">other</text:span><text:span text:style-name="T33">) {</text:span></text:p>
      <text:p text:style-name="Standard" loext:marker-style-name="T33"><text:span text:style-name="T33"><text:tab/><text:tab/>name_ </text:span><text:span text:style-name="T38">=</text:span><text:span text:style-name="T33"> </text:span><text:span text:style-name="T34">other</text:span><text:span text:style-name="T33">.name_;</text:span></text:p>
      <text:p text:style-name="Standard" loext:marker-style-name="T33"><text:span text:style-name="T33"><text:tab/><text:tab/>age_ = </text:span><text:span text:style-name="T34">other</text:span><text:span text:style-name="T33">.age_;</text:span></text:p>
      <text:p text:style-name="Standard" loext:marker-style-name="T33"><text:span text:style-name="T33"><text:tab/>}</text:span><text:span text:style-name="T33"/></text:p>
      <text:p text:style-name="Standard" loext:marker-style-name="T33"><text:span text:style-name="T33"><text:tab/></text:span><text:span text:style-name="T37">return</text:span><text:span text:style-name="T33"> *</text:span><text:span text:style-name="T37">this</text:span><text:span text:style-name="T33">;</text:span></text:p>
      <text:p text:style-name="Standard" loext:marker-style-name="T33"><text:soft-page-break/><text:span text:style-name="T33">}</text:span><text:span text:style-name="T33"/></text:p>
      <text:p text:style-name="P26" loext:marker-style-name="T33"/>
      <text:p text:style-name="Standard" loext:marker-style-name="T33"><text:span text:style-name="T33">std::</text:span><text:span text:style-name="T36">istream</text:span><text:span text:style-name="T33">&amp; </text:span><text:span text:style-name="T38">operator&gt;&gt;</text:span><text:span text:style-name="T33">(std::</text:span><text:span text:style-name="T36">istream</text:span><text:span text:style-name="T33">&amp; </text:span><text:span text:style-name="T34">in</text:span><text:span text:style-name="T33">, </text:span><text:span text:style-name="T36">Person</text:span><text:span text:style-name="T33">&amp; </text:span><text:span text:style-name="T34">person</text:span><text:span text:style-name="T33">) {</text:span></text:p>
      <text:p text:style-name="Standard" loext:marker-style-name="T33"><text:span text:style-name="T33"><text:tab/>std::cout </text:span><text:span text:style-name="T38">&lt;&lt;</text:span><text:span text:style-name="T33"> </text:span><text:span text:style-name="T35">"Enter name: "</text:span><text:span text:style-name="T33">;</text:span></text:p>
      <text:p text:style-name="Standard" loext:marker-style-name="T33"><text:span text:style-name="T33"><text:tab/></text:span><text:span text:style-name="T34">in</text:span><text:span text:style-name="T33"> </text:span><text:span text:style-name="T38">&gt;&gt;</text:span><text:span text:style-name="T33"> </text:span><text:span text:style-name="T34">person</text:span><text:span text:style-name="T33">.name_;</text:span></text:p>
      <text:p text:style-name="Standard" loext:marker-style-name="T33"><text:span text:style-name="T33"><text:tab/>std::cout </text:span><text:span text:style-name="T38">&lt;&lt;</text:span><text:span text:style-name="T33"> </text:span><text:span text:style-name="T35">"Enter age: "</text:span><text:span text:style-name="T33">;</text:span></text:p>
      <text:p text:style-name="Standard" loext:marker-style-name="T33"><text:span text:style-name="T33"><text:tab/></text:span><text:span text:style-name="T34">in</text:span><text:span text:style-name="T33"> </text:span><text:span text:style-name="T38">&gt;&gt;</text:span><text:span text:style-name="T33"> </text:span><text:span text:style-name="T34">person</text:span><text:span text:style-name="T33">.age_;</text:span></text:p>
      <text:p text:style-name="Standard" loext:marker-style-name="T33"><text:span text:style-name="T33"><text:tab/></text:span><text:span text:style-name="T37">return</text:span><text:span text:style-name="T33"> </text:span><text:span text:style-name="T34">in</text:span><text:span text:style-name="T33">;</text:span></text:p>
      <text:p text:style-name="Standard" loext:marker-style-name="T33"><text:span text:style-name="T33">}</text:span><text:span text:style-name="T33"/></text:p>
      <text:p text:style-name="Standard" loext:marker-style-name="T33"><text:span text:style-name="T33">std::</text:span><text:span text:style-name="T36">ostream</text:span><text:span text:style-name="T33">&amp; </text:span><text:span text:style-name="T38">operator&lt;&lt;</text:span><text:span text:style-name="T33">(std::</text:span><text:span text:style-name="T36">ostream</text:span><text:span text:style-name="T33">&amp; </text:span><text:span text:style-name="T34">out</text:span><text:span text:style-name="T33">, </text:span><text:span text:style-name="T37">const</text:span><text:span text:style-name="T33"> </text:span><text:span text:style-name="T36">Person</text:span><text:span text:style-name="T33">&amp; </text:span><text:span text:style-name="T34">person</text:span><text:span text:style-name="T33">) {</text:span></text:p>
      <text:p text:style-name="Standard" loext:marker-style-name="T33"><text:span text:style-name="T33"><text:tab/></text:span><text:span text:style-name="T34">out</text:span><text:span text:style-name="T33"> </text:span><text:span text:style-name="T38">&lt;&lt;</text:span><text:span text:style-name="T33"> </text:span><text:span text:style-name="T35">"Name: "</text:span><text:span text:style-name="T33"> </text:span><text:span text:style-name="T38">&lt;&lt;</text:span><text:span text:style-name="T33"> </text:span><text:span text:style-name="T34">person</text:span><text:span text:style-name="T33">.name_ </text:span><text:span text:style-name="T38">&lt;&lt;</text:span><text:span text:style-name="T33"> </text:span><text:span text:style-name="T35">", Age: "</text:span><text:span text:style-name="T33"> </text:span><text:span text:style-name="T38">&lt;&lt;</text:span><text:span text:style-name="T33"> </text:span><text:span text:style-name="T34">person</text:span><text:span text:style-name="T33">.age_;</text:span></text:p>
      <text:p text:style-name="Standard" loext:marker-style-name="T33"><text:span text:style-name="T33"><text:tab/></text:span><text:span text:style-name="T37">return</text:span><text:span text:style-name="T33"> </text:span><text:span text:style-name="T34">out</text:span><text:span text:style-name="T33">;</text:span></text:p>
      <text:p text:style-name="Standard" loext:marker-style-name="T33"><text:span text:style-name="T33">}</text:span><text:span text:style-name="T33"/></text:p>
      <text:p text:style-name="Standard" loext:marker-style-name="T33"><text:span text:style-name="T37">void</text:span><text:span text:style-name="T33"> </text:span><text:span text:style-name="T36">Person</text:span><text:span text:style-name="T33">::Show() {</text:span></text:p>
      <text:p text:style-name="Standard" loext:marker-style-name="T33"><text:span text:style-name="T33"><text:tab/>std::cout </text:span><text:span text:style-name="T38">&lt;&lt;</text:span><text:span text:style-name="T33"> </text:span><text:span text:style-name="T35">"Name: "</text:span><text:span text:style-name="T33"> </text:span><text:span text:style-name="T38">&lt;&lt;</text:span><text:span text:style-name="T33"> name_ </text:span><text:span text:style-name="T38">&lt;&lt;</text:span><text:span text:style-name="T33"> </text:span><text:span text:style-name="T35">", Age: "</text:span><text:span text:style-name="T33"> </text:span><text:span text:style-name="T38">&lt;&lt;</text:span><text:span text:style-name="T33"> age_ </text:span><text:span text:style-name="T38">&lt;&lt;</text:span><text:span text:style-name="T33"> std::endl;</text:span></text:p>
      <text:p text:style-name="P24">}</text:p>
      <text:p text:style-name="P24">Student.h</text:p>
      <text:p text:style-name="P25" loext:marker-style-name="T23"><text:span text:style-name="T24">#pragma </text:span><text:span text:style-name="T26">once<text:line-break/></text:span><text:span text:style-name="T24">#include </text:span><text:span text:style-name="T25">"Person.h"<text:line-break/><text:line-break/></text:span><text:span text:style-name="T26">class </text:span><text:span text:style-name="T27">Student </text:span><text:span text:style-name="T23">: </text:span><text:span text:style-name="T29">//Same class definition as Lab 4<text:line-break/> <text:s text:c="3"/></text:span><text:span text:style-name="T26">public </text:span><text:span text:style-name="T27">Person<text:line-break/></text:span><text:span text:style-name="T23">{<text:line-break/></text:span><text:span text:style-name="T26">protected</text:span><text:span text:style-name="T23">:<text:line-break/> <text:s text:c="3"/></text:span><text:span text:style-name="T27">std</text:span><text:span text:style-name="T23">::</text:span><text:span text:style-name="T27">string </text:span><text:span text:style-name="T32">subject_</text:span><text:span text:style-name="T23">;<text:line-break/><text:tab/></text:span><text:span text:style-name="T26">int </text:span><text:span text:style-name="T32">grade_</text:span><text:span text:style-name="T23">;<text:line-break/></text:span><text:span text:style-name="T26">public</text:span><text:span text:style-name="T23">:<text:line-break/> <text:s text:c="3"/></text:span><text:span text:style-name="T28">Student</text:span><text:span text:style-name="T23">();<text:line-break/><text:tab/></text:span><text:span text:style-name="T28">Student</text:span><text:span text:style-name="T23">(</text:span><text:span text:style-name="T27">std</text:span><text:span text:style-name="T23">::</text:span><text:span text:style-name="T27">string</text:span><text:span text:style-name="T23">, </text:span><text:span text:style-name="T26">int</text:span><text:span text:style-name="T23">, </text:span><text:span text:style-name="T27">std</text:span><text:span text:style-name="T23">::</text:span><text:span text:style-name="T27">string</text:span><text:span text:style-name="T23">, </text:span><text:span text:style-name="T26">int</text:span><text:span text:style-name="T23">);<text:line-break/><text:tab/></text:span><text:span text:style-name="T28">Student</text:span><text:span text:style-name="T23">(</text:span><text:span text:style-name="T26">const </text:span><text:span text:style-name="T27">Student</text:span><text:span text:style-name="T23">&amp;);<text:line-break/><text:line-break/><text:tab/></text:span><text:span text:style-name="T28">~Student</text:span><text:span text:style-name="T23">();<text:line-break/><text:line-break/><text:tab/></text:span><text:span text:style-name="T27">std</text:span><text:span text:style-name="T23">::</text:span><text:span text:style-name="T27">string </text:span><text:span text:style-name="T28">getSubject</text:span><text:span text:style-name="T23">() </text:span><text:span text:style-name="T26">const</text:span><text:span text:style-name="T23">;<text:line-break/><text:tab/></text:span><text:span text:style-name="T26">int </text:span><text:span text:style-name="T28">getGrade</text:span><text:span text:style-name="T23">() </text:span><text:span text:style-name="T26">const</text:span><text:span text:style-name="T23">;<text:line-break/></text:span><text:soft-page-break/><text:span text:style-name="T23"><text:line-break/><text:tab/></text:span><text:span text:style-name="T26">void </text:span><text:span text:style-name="T28">setSubject</text:span><text:span text:style-name="T23">(</text:span><text:span text:style-name="T27">std</text:span><text:span text:style-name="T23">::</text:span><text:span text:style-name="T27">string</text:span><text:span text:style-name="T23">);<text:line-break/><text:tab/></text:span><text:span text:style-name="T26">void </text:span><text:span text:style-name="T28">setGrade</text:span><text:span text:style-name="T23">(</text:span><text:span text:style-name="T26">int</text:span><text:span text:style-name="T23">);<text:line-break/><text:line-break/><text:tab/></text:span><text:span text:style-name="T26">bool </text:span><text:span text:style-name="T28">isGradeOkay</text:span><text:span text:style-name="T23">() </text:span><text:span text:style-name="T26">const</text:span><text:span text:style-name="T23">;<text:line-break/><text:line-break/><text:tab/></text:span><text:span text:style-name="T27">Student</text:span><text:span text:style-name="T23">&amp; </text:span><text:span text:style-name="T26">operator</text:span><text:span text:style-name="T23">=(</text:span><text:span text:style-name="T26">const </text:span><text:span text:style-name="T27">Student</text:span><text:span text:style-name="T23">&amp;);<text:line-break/><text:line-break/><text:tab/></text:span><text:span text:style-name="T26">friend </text:span><text:span text:style-name="T27">std</text:span><text:span text:style-name="T23">::</text:span><text:span text:style-name="T27">istream</text:span><text:span text:style-name="T23">&amp; </text:span><text:span text:style-name="T26">operator</text:span><text:span text:style-name="T23">&gt;&gt;(</text:span><text:span text:style-name="T27">std</text:span><text:span text:style-name="T23">::</text:span><text:span text:style-name="T27">istream</text:span><text:span text:style-name="T23">&amp;, </text:span><text:span text:style-name="T27">Student</text:span><text:span text:style-name="T23">&amp;);<text:line-break/><text:tab/></text:span><text:span text:style-name="T26">friend </text:span><text:span text:style-name="T27">std</text:span><text:span text:style-name="T23">::</text:span><text:span text:style-name="T27">ostream</text:span><text:span text:style-name="T23">&amp; </text:span><text:span text:style-name="T26">operator</text:span><text:span text:style-name="T23">&lt;&lt;(</text:span><text:span text:style-name="T27">std</text:span><text:span text:style-name="T23">::</text:span><text:span text:style-name="T27">ostream</text:span><text:span text:style-name="T23">&amp;, </text:span><text:span text:style-name="T26">const </text:span><text:span text:style-name="T27">Student</text:span><text:span text:style-name="T23">&amp;);<text:line-break/><text:line-break/><text:tab/></text:span><text:span text:style-name="T26">void </text:span><text:span text:style-name="T28">Show</text:span><text:span text:style-name="T23">();<text:line-break/>};</text:span></text:p>
      <text:p text:style-name="P24">Student.cpp</text:p>
      <text:p text:style-name="Standard" loext:marker-style-name="T33"><text:span text:style-name="T34">#include</text:span><text:span text:style-name="T33"> </text:span><text:span text:style-name="T37">"Student.h"</text:span></text:p>
      <text:p text:style-name="P26" loext:marker-style-name="T33"/>
      <text:p text:style-name="Standard" loext:marker-style-name="T33"><text:span text:style-name="T36">Student</text:span><text:span text:style-name="T33">::Student() : </text:span><text:span text:style-name="T36">Person</text:span><text:span text:style-name="T33">(), subject_(</text:span><text:span text:style-name="T35">""</text:span><text:span text:style-name="T33">), grade_(0) {}</text:span></text:p>
      <text:p text:style-name="Standard" loext:marker-style-name="T33"><text:span text:style-name="T36">Student</text:span><text:span text:style-name="T33">::Student(std::</text:span><text:span text:style-name="T36">string</text:span><text:span text:style-name="T33"> </text:span><text:span text:style-name="T34">s</text:span><text:span text:style-name="T33">, </text:span><text:span text:style-name="T37">int</text:span><text:span text:style-name="T33"> </text:span><text:span text:style-name="T34">i</text:span><text:span text:style-name="T33">, std::</text:span><text:span text:style-name="T36">string</text:span><text:span text:style-name="T33"> </text:span><text:span text:style-name="T34">s2</text:span><text:span text:style-name="T33">, </text:span><text:span text:style-name="T37">int</text:span><text:span text:style-name="T33"> </text:span><text:span text:style-name="T34">i2</text:span><text:span text:style-name="T33">) : </text:span><text:span text:style-name="T36">Person</text:span><text:span text:style-name="T33">(</text:span><text:span text:style-name="T34">s</text:span><text:span text:style-name="T33">, </text:span><text:span text:style-name="T34">i</text:span><text:span text:style-name="T33">), subject_(</text:span><text:span text:style-name="T34">s2</text:span><text:span text:style-name="T33">), grade_(</text:span><text:span text:style-name="T34">i2</text:span><text:span text:style-name="T33">) {};</text:span></text:p>
      <text:p text:style-name="Standard" loext:marker-style-name="T33"><text:span text:style-name="T36">Student</text:span><text:span text:style-name="T33">::Student(</text:span><text:span text:style-name="T37">const</text:span><text:span text:style-name="T33"> </text:span><text:span text:style-name="T36">Student</text:span><text:span text:style-name="T33">&amp; </text:span><text:span text:style-name="T34">other</text:span><text:span text:style-name="T33">) {</text:span></text:p>
      <text:p text:style-name="Standard" loext:marker-style-name="T33"><text:span text:style-name="T33"><text:tab/>name_ </text:span><text:span text:style-name="T38">=</text:span><text:span text:style-name="T33"> </text:span><text:span text:style-name="T34">other</text:span><text:span text:style-name="T33">.name_;</text:span></text:p>
      <text:p text:style-name="Standard" loext:marker-style-name="T33"><text:span text:style-name="T33"><text:tab/>age_ = </text:span><text:span text:style-name="T34">other</text:span><text:span text:style-name="T33">.age_;</text:span></text:p>
      <text:p text:style-name="Standard" loext:marker-style-name="T33"><text:span text:style-name="T33"><text:tab/>subject_ </text:span><text:span text:style-name="T38">=</text:span><text:span text:style-name="T33"> </text:span><text:span text:style-name="T34">other</text:span><text:span text:style-name="T33">.subject_;</text:span></text:p>
      <text:p text:style-name="Standard" loext:marker-style-name="T33"><text:span text:style-name="T33"><text:tab/>grade_ = </text:span><text:span text:style-name="T34">other</text:span><text:span text:style-name="T33">.grade_;</text:span></text:p>
      <text:p text:style-name="Standard" loext:marker-style-name="T33"><text:span text:style-name="T33">}</text:span><text:span text:style-name="T33"/></text:p>
      <text:p text:style-name="P26" loext:marker-style-name="T33"/>
      <text:p text:style-name="Standard" loext:marker-style-name="T33"><text:span text:style-name="T36">Student</text:span><text:span text:style-name="T33">::~Student() {}</text:span></text:p>
      <text:p text:style-name="P26" loext:marker-style-name="T33"/>
      <text:p text:style-name="Standard" loext:marker-style-name="T33"><text:span text:style-name="T33">std::</text:span><text:span text:style-name="T36">string</text:span><text:span text:style-name="T33"> </text:span><text:span text:style-name="T36">Student</text:span><text:span text:style-name="T33">::getSubject() </text:span><text:span text:style-name="T37">const</text:span><text:span text:style-name="T33"> {</text:span></text:p>
      <text:p text:style-name="Standard" loext:marker-style-name="T33"><text:span text:style-name="T33"><text:tab/></text:span><text:span text:style-name="T37">return</text:span><text:span text:style-name="T33"> subject_;</text:span></text:p>
      <text:p text:style-name="Standard" loext:marker-style-name="T33"><text:span text:style-name="T33">}</text:span><text:span text:style-name="T33"/></text:p>
      <text:p text:style-name="Standard" loext:marker-style-name="T33"><text:span text:style-name="T37">int</text:span><text:span text:style-name="T33"> </text:span><text:span text:style-name="T36">Student</text:span><text:span text:style-name="T33">::getGrade() </text:span><text:span text:style-name="T37">const</text:span><text:span text:style-name="T33"> {</text:span></text:p>
      <text:p text:style-name="Standard" loext:marker-style-name="T33"><text:span text:style-name="T33"><text:tab/></text:span><text:span text:style-name="T37">return</text:span><text:span text:style-name="T33"> grade_;</text:span></text:p>
      <text:p text:style-name="Standard" loext:marker-style-name="T33"><text:span text:style-name="T33">}</text:span><text:span text:style-name="T33"/></text:p>
      <text:p text:style-name="P26" loext:marker-style-name="T33"><text:soft-page-break/></text:p>
      <text:p text:style-name="Standard" loext:marker-style-name="T33"><text:span text:style-name="T37">void</text:span><text:span text:style-name="T33"> </text:span><text:span text:style-name="T36">Student</text:span><text:span text:style-name="T33">::setSubject(std::</text:span><text:span text:style-name="T36">string</text:span><text:span text:style-name="T33"> </text:span><text:span text:style-name="T34">subject</text:span><text:span text:style-name="T33">) {</text:span></text:p>
      <text:p text:style-name="Standard" loext:marker-style-name="T33"><text:span text:style-name="T33"><text:tab/>subject_ </text:span><text:span text:style-name="T38">=</text:span><text:span text:style-name="T33"> </text:span><text:span text:style-name="T34">subject</text:span><text:span text:style-name="T33">;</text:span></text:p>
      <text:p text:style-name="Standard" loext:marker-style-name="T33"><text:span text:style-name="T33">}</text:span><text:span text:style-name="T33"/></text:p>
      <text:p text:style-name="Standard" loext:marker-style-name="T33"><text:span text:style-name="T37">void</text:span><text:span text:style-name="T33"> </text:span><text:span text:style-name="T36">Student</text:span><text:span text:style-name="T33">::setGrade(</text:span><text:span text:style-name="T37">int</text:span><text:span text:style-name="T33"> </text:span><text:span text:style-name="T34">grade</text:span><text:span text:style-name="T33">) {</text:span></text:p>
      <text:p text:style-name="Standard" loext:marker-style-name="T33"><text:span text:style-name="T33"><text:tab/>grade_ = </text:span><text:span text:style-name="T34">grade</text:span><text:span text:style-name="T33">;</text:span></text:p>
      <text:p text:style-name="Standard" loext:marker-style-name="T33"><text:span text:style-name="T33">}</text:span><text:span text:style-name="T33"/></text:p>
      <text:p text:style-name="P26" loext:marker-style-name="T33"/>
      <text:p text:style-name="Standard" loext:marker-style-name="T33"><text:span text:style-name="T36">Student</text:span><text:span text:style-name="T33">&amp; </text:span><text:span text:style-name="T36">Student</text:span><text:span text:style-name="T33">::</text:span><text:span text:style-name="T38">operator=</text:span><text:span text:style-name="T33">(</text:span><text:span text:style-name="T37">const</text:span><text:span text:style-name="T33"> </text:span><text:span text:style-name="T36">Student</text:span><text:span text:style-name="T33">&amp; </text:span><text:span text:style-name="T34">other</text:span><text:span text:style-name="T33">) {</text:span></text:p>
      <text:p text:style-name="Standard" loext:marker-style-name="T33"><text:span text:style-name="T33"><text:tab/></text:span><text:span text:style-name="T37">if</text:span><text:span text:style-name="T33"> (</text:span><text:span text:style-name="T37">this</text:span><text:span text:style-name="T33"> != &amp;</text:span><text:span text:style-name="T34">other</text:span><text:span text:style-name="T33">) {</text:span></text:p>
      <text:p text:style-name="Standard" loext:marker-style-name="T33"><text:span text:style-name="T33"><text:tab/><text:tab/>name_ </text:span><text:span text:style-name="T38">=</text:span><text:span text:style-name="T33"> </text:span><text:span text:style-name="T34">other</text:span><text:span text:style-name="T33">.name_;</text:span></text:p>
      <text:p text:style-name="Standard" loext:marker-style-name="T33"><text:span text:style-name="T33"><text:tab/><text:tab/>age_ = </text:span><text:span text:style-name="T34">other</text:span><text:span text:style-name="T33">.age_;</text:span></text:p>
      <text:p text:style-name="Standard" loext:marker-style-name="T33"><text:span text:style-name="T33"><text:tab/><text:tab/>subject_ </text:span><text:span text:style-name="T38">=</text:span><text:span text:style-name="T33"> </text:span><text:span text:style-name="T34">other</text:span><text:span text:style-name="T33">.subject_;</text:span></text:p>
      <text:p text:style-name="Standard" loext:marker-style-name="T33"><text:span text:style-name="T33"><text:tab/><text:tab/>grade_ = </text:span><text:span text:style-name="T34">other</text:span><text:span text:style-name="T33">.grade_;</text:span></text:p>
      <text:p text:style-name="Standard" loext:marker-style-name="T33"><text:span text:style-name="T33"><text:tab/>}</text:span><text:span text:style-name="T33"/></text:p>
      <text:p text:style-name="Standard" loext:marker-style-name="T33"><text:span text:style-name="T33"><text:tab/></text:span><text:span text:style-name="T37">return</text:span><text:span text:style-name="T33"> *</text:span><text:span text:style-name="T37">this</text:span><text:span text:style-name="T33">;</text:span></text:p>
      <text:p text:style-name="Standard" loext:marker-style-name="T33"><text:span text:style-name="T33">}</text:span><text:span text:style-name="T33"/></text:p>
      <text:p text:style-name="P26" loext:marker-style-name="T33"/>
      <text:p text:style-name="Standard" loext:marker-style-name="T33"><text:span text:style-name="T33">std::</text:span><text:span text:style-name="T36">istream</text:span><text:span text:style-name="T33">&amp; </text:span><text:span text:style-name="T38">operator&gt;&gt;</text:span><text:span text:style-name="T33">(std::</text:span><text:span text:style-name="T36">istream</text:span><text:span text:style-name="T33">&amp; </text:span><text:span text:style-name="T34">in</text:span><text:span text:style-name="T33">, </text:span><text:span text:style-name="T36">Student</text:span><text:span text:style-name="T33">&amp; </text:span><text:span text:style-name="T34">s</text:span><text:span text:style-name="T33">) {</text:span></text:p>
      <text:p text:style-name="Standard" loext:marker-style-name="T33"><text:span text:style-name="T33"><text:tab/>std::cout </text:span><text:span text:style-name="T38">&lt;&lt;</text:span><text:span text:style-name="T33"> </text:span><text:span text:style-name="T35">"Enter name: "</text:span><text:span text:style-name="T33">;</text:span></text:p>
      <text:p text:style-name="Standard" loext:marker-style-name="T33"><text:span text:style-name="T33"><text:tab/></text:span><text:span text:style-name="T34">in</text:span><text:span text:style-name="T33"> </text:span><text:span text:style-name="T38">&gt;&gt;</text:span><text:span text:style-name="T33"> </text:span><text:span text:style-name="T34">s</text:span><text:span text:style-name="T33">.name_;</text:span></text:p>
      <text:p text:style-name="Standard" loext:marker-style-name="T33"><text:span text:style-name="T33"><text:tab/>std::cout </text:span><text:span text:style-name="T38">&lt;&lt;</text:span><text:span text:style-name="T33"> </text:span><text:span text:style-name="T35">"Enter age: "</text:span><text:span text:style-name="T33">; </text:span><text:span text:style-name="T34">in</text:span><text:span text:style-name="T33"> </text:span><text:span text:style-name="T38">&gt;&gt;</text:span><text:span text:style-name="T33"> </text:span><text:span text:style-name="T34">s</text:span><text:span text:style-name="T33">.age_;</text:span></text:p>
      <text:p text:style-name="Standard" loext:marker-style-name="T33"><text:span text:style-name="T33"><text:tab/>std::cout </text:span><text:span text:style-name="T38">&lt;&lt;</text:span><text:span text:style-name="T33"> </text:span><text:span text:style-name="T35">"Enter subject: "</text:span><text:span text:style-name="T33">;</text:span></text:p>
      <text:p text:style-name="Standard" loext:marker-style-name="T33"><text:span text:style-name="T33"><text:tab/></text:span><text:span text:style-name="T34">in</text:span><text:span text:style-name="T33"> </text:span><text:span text:style-name="T38">&gt;&gt;</text:span><text:span text:style-name="T33"> </text:span><text:span text:style-name="T34">s</text:span><text:span text:style-name="T33">.subject_;</text:span></text:p>
      <text:p text:style-name="Standard" loext:marker-style-name="T33"><text:span text:style-name="T33"><text:tab/>std::cout </text:span><text:span text:style-name="T38">&lt;&lt;</text:span><text:span text:style-name="T33"> </text:span><text:span text:style-name="T35">"Enter grade: "</text:span><text:span text:style-name="T33">; </text:span><text:span text:style-name="T34">in</text:span><text:span text:style-name="T33"> </text:span><text:span text:style-name="T38">&gt;&gt;</text:span><text:span text:style-name="T33"> </text:span><text:span text:style-name="T34">s</text:span><text:span text:style-name="T33">.grade_;</text:span></text:p>
      <text:p text:style-name="Standard" loext:marker-style-name="T33"><text:span text:style-name="T33"><text:tab/></text:span><text:span text:style-name="T37">return</text:span><text:span text:style-name="T33"> </text:span><text:span text:style-name="T34">in</text:span><text:span text:style-name="T33">;</text:span></text:p>
      <text:p text:style-name="Standard" loext:marker-style-name="T33"><text:span text:style-name="T33">}</text:span><text:span text:style-name="T33"/></text:p>
      <text:p text:style-name="Standard" loext:marker-style-name="T33"><text:span text:style-name="T33">std::</text:span><text:span text:style-name="T36">ostream</text:span><text:span text:style-name="T33">&amp; </text:span><text:span text:style-name="T38">operator&lt;&lt;</text:span><text:span text:style-name="T33">(std::</text:span><text:span text:style-name="T36">ostream</text:span><text:span text:style-name="T33">&amp; </text:span><text:span text:style-name="T34">out</text:span><text:span text:style-name="T33">, </text:span><text:span text:style-name="T37">const</text:span><text:span text:style-name="T33"> </text:span><text:span text:style-name="T36">Student</text:span><text:span text:style-name="T33">&amp; </text:span><text:span text:style-name="T34">s</text:span><text:span text:style-name="T33">) {</text:span></text:p>
      <text:p text:style-name="Standard" loext:marker-style-name="T33"><text:span text:style-name="T33"><text:tab/></text:span><text:span text:style-name="T34">out</text:span><text:span text:style-name="T33"> </text:span><text:span text:style-name="T38">&lt;&lt;</text:span><text:span text:style-name="T33"> </text:span><text:span text:style-name="T35">"Name: "</text:span><text:span text:style-name="T33"> </text:span><text:span text:style-name="T38">&lt;&lt;</text:span><text:span text:style-name="T33"> </text:span><text:span text:style-name="T34">s</text:span><text:span text:style-name="T33">.name_ </text:span><text:span text:style-name="T38">&lt;&lt;</text:span><text:span text:style-name="T33"> </text:span><text:span text:style-name="T35">", Age: "</text:span><text:span text:style-name="T33"> </text:span><text:span text:style-name="T38">&lt;&lt;</text:span><text:span text:style-name="T33"> </text:span><text:span text:style-name="T34">s</text:span><text:span text:style-name="T33">.age_ </text:span><text:span text:style-name="T38">&lt;&lt;</text:span><text:span text:style-name="T33"> </text:span><text:span text:style-name="T35">", Subject: "</text:span><text:span text:style-name="T33"> </text:span><text:span text:style-name="T38">&lt;&lt;</text:span><text:span text:style-name="T33"> </text:span><text:span text:style-name="T34">s</text:span><text:span text:style-name="T33">.subject_ </text:span><text:span text:style-name="T38">&lt;&lt;</text:span><text:span text:style-name="T33"> </text:span><text:span text:style-name="T35">", Grade: "</text:span><text:span text:style-name="T33"> </text:span><text:span text:style-name="T38">&lt;&lt;</text:span><text:span text:style-name="T33"> </text:span><text:span text:style-name="T34">s</text:span><text:span text:style-name="T33">.grade_;</text:span></text:p>
      <text:p text:style-name="Standard" loext:marker-style-name="T33"><text:span text:style-name="T33"><text:tab/></text:span><text:span text:style-name="T37">return</text:span><text:span text:style-name="T33"> </text:span><text:span text:style-name="T34">out</text:span><text:span text:style-name="T33">;</text:span></text:p>
      <text:p text:style-name="Standard" loext:marker-style-name="T33"><text:span text:style-name="T33">}</text:span><text:span text:style-name="T33"/></text:p>
      <text:p text:style-name="P26" loext:marker-style-name="T33"><text:soft-page-break/></text:p>
      <text:p text:style-name="Standard" loext:marker-style-name="T33"><text:span text:style-name="T37">bool</text:span><text:span text:style-name="T33"> </text:span><text:span text:style-name="T36">Student</text:span><text:span text:style-name="T33">::isGradeOkay() </text:span><text:span text:style-name="T37">const</text:span><text:span text:style-name="T33"> {</text:span></text:p>
      <text:p text:style-name="Standard" loext:marker-style-name="T33"><text:span text:style-name="T33"><text:tab/></text:span><text:span text:style-name="T37">if</text:span><text:span text:style-name="T33"> (grade_ &lt;= 2) {</text:span></text:p>
      <text:p text:style-name="Standard" loext:marker-style-name="T33"><text:span text:style-name="T33"><text:tab/><text:tab/>std::cout </text:span><text:span text:style-name="T38">&lt;&lt;</text:span><text:span text:style-name="T33"> </text:span><text:span text:style-name="T35">"That's a bad grade!\n"</text:span><text:span text:style-name="T33">;</text:span></text:p>
      <text:p text:style-name="Standard" loext:marker-style-name="T33"><text:span text:style-name="T33"><text:tab/>}</text:span><text:span text:style-name="T33"/></text:p>
      <text:p text:style-name="Standard" loext:marker-style-name="T33"><text:span text:style-name="T33"><text:tab/></text:span><text:span text:style-name="T37">return</text:span><text:span text:style-name="T33"> grade_ &gt; 2;</text:span></text:p>
      <text:p text:style-name="Standard" loext:marker-style-name="T33"><text:span text:style-name="T33">}</text:span><text:span text:style-name="T33"/></text:p>
      <text:p text:style-name="P26" loext:marker-style-name="T33"/>
      <text:p text:style-name="Standard" loext:marker-style-name="T33"><text:span text:style-name="T37">void</text:span><text:span text:style-name="T33"> </text:span><text:span text:style-name="T36">Student</text:span><text:span text:style-name="T33">::Show() {</text:span></text:p>
      <text:p text:style-name="Standard" loext:marker-style-name="T33"><text:span text:style-name="T33"><text:tab/>std::cout </text:span><text:span text:style-name="T38">&lt;&lt;</text:span><text:span text:style-name="T33"> </text:span><text:span text:style-name="T35">"Name: "</text:span><text:span text:style-name="T33"> </text:span><text:span text:style-name="T38">&lt;&lt;</text:span><text:span text:style-name="T33"> name_ </text:span><text:span text:style-name="T38">&lt;&lt;</text:span><text:span text:style-name="T33"> </text:span><text:span text:style-name="T35">", Age: "</text:span><text:span text:style-name="T33"> </text:span><text:span text:style-name="T38">&lt;&lt;</text:span><text:span text:style-name="T33"> age_ </text:span><text:span text:style-name="T38">&lt;&lt;</text:span><text:span text:style-name="T33"> </text:span><text:span text:style-name="T35">", Subject: "</text:span><text:span text:style-name="T33"> </text:span><text:span text:style-name="T38">&lt;&lt;</text:span><text:span text:style-name="T33"> subject_ </text:span><text:span text:style-name="T38">&lt;&lt;</text:span><text:span text:style-name="T33"> </text:span><text:span text:style-name="T35">", Grade: "</text:span><text:span text:style-name="T33"> </text:span><text:span text:style-name="T38">&lt;&lt;</text:span><text:span text:style-name="T33"> grade_ </text:span><text:span text:style-name="T38">&lt;&lt;</text:span><text:span text:style-name="T33"> std::endl;</text:span></text:p>
      <text:p text:style-name="P24">}</text:p>
      <text:p text:style-name="P24">Vector.h</text:p>
      <text:p text:style-name="P25" loext:marker-style-name="T23"><text:span text:style-name="T24">#pragma </text:span><text:span text:style-name="T26">once<text:line-break/></text:span><text:span text:style-name="T24">#include </text:span><text:span text:style-name="T25">"Object.h"<text:line-break/></text:span><text:span text:style-name="T24">#include </text:span><text:span text:style-name="T25">&lt;iostream&gt;<text:line-break/><text:line-break/></text:span><text:span text:style-name="T26">class </text:span><text:span text:style-name="T27">Vector </text:span><text:span text:style-name="T29">//container class definition<text:line-break/></text:span><text:span text:style-name="T23">{<text:line-break/></text:span><text:span text:style-name="T39">private:<text:line-break/><text:tab/></text:span><text:span text:style-name="T27">Object</text:span><text:span text:style-name="T23">** </text:span><text:span text:style-name="T32">head_</text:span><text:span text:style-name="T23">; </text:span><text:span text:style-name="T29">//an attribute to store an array of pointers to Objects (Object is a fully abstract class and couldn't be stored directly)<text:line-break/><text:tab/></text:span><text:span text:style-name="T26">int </text:span><text:span text:style-name="T32">size_</text:span><text:span text:style-name="T23">; </text:span><text:span text:style-name="T29">//size of the array / max size of the vector<text:line-break/><text:tab/></text:span><text:span text:style-name="T26">int </text:span><text:span text:style-name="T32">cur_</text:span><text:span text:style-name="T23">; </text:span><text:span text:style-name="T29">//current size of the vector<text:line-break/></text:span><text:span text:style-name="T26">public</text:span><text:span text:style-name="T23">:<text:line-break/><text:tab/></text:span><text:span text:style-name="T29">//basic constructors and a destructor<text:line-break/><text:tab/></text:span><text:span text:style-name="T28">Vector</text:span><text:span text:style-name="T23">();<text:line-break/><text:tab/></text:span><text:span text:style-name="T28">Vector</text:span><text:span text:style-name="T23">(</text:span><text:span text:style-name="T26">int</text:span><text:span text:style-name="T23">);<text:line-break/><text:tab/></text:span><text:span text:style-name="T28">~Vector</text:span><text:span text:style-name="T23">();<text:line-break/><text:tab/></text:span><text:span text:style-name="T29">//A method to add an element into the container<text:line-break/><text:tab/></text:span><text:span text:style-name="T26">void </text:span><text:span text:style-name="T28">Add</text:span><text:span text:style-name="T23">(</text:span><text:span text:style-name="T27">Object</text:span><text:span text:style-name="T23">*);<text:line-break/><text:tab/></text:span><text:span text:style-name="T29">//console output overload<text:line-break/><text:tab/></text:span><text:span text:style-name="T26">friend </text:span><text:span text:style-name="T27">std</text:span><text:span text:style-name="T23">::</text:span><text:span text:style-name="T27">ostream</text:span><text:span text:style-name="T23">&amp; </text:span><text:span text:style-name="T26">operator</text:span><text:span text:style-name="T23">&lt;&lt;(</text:span><text:span text:style-name="T27">std</text:span><text:span text:style-name="T23">::</text:span><text:span text:style-name="T27">ostream</text:span><text:span text:style-name="T23">&amp;, </text:span><text:span text:style-name="T26">const </text:span><text:span text:style-name="T27">Vector</text:span><text:span text:style-name="T23">&amp;);<text:line-break/>};<text:line-break/></text:span></text:p>
      <text:p text:style-name="P24"><text:soft-page-break/>Vector.cpp</text:p>
      <text:p text:style-name="P25" loext:marker-style-name="T23"><text:span text:style-name="T24">#include </text:span><text:span text:style-name="T25">"Vector.h"<text:line-break/><text:line-break/></text:span><text:span text:style-name="T27">Vector</text:span><text:span text:style-name="T23">::</text:span><text:span text:style-name="T28">Vector</text:span><text:span text:style-name="T23">() : </text:span><text:span text:style-name="T32">head_</text:span><text:span text:style-name="T23">(</text:span><text:span text:style-name="T26">nullptr</text:span><text:span text:style-name="T23">), </text:span><text:span text:style-name="T32">size_</text:span><text:span text:style-name="T23">(</text:span><text:span text:style-name="T31">0</text:span><text:span text:style-name="T23">), </text:span><text:span text:style-name="T32">cur_</text:span><text:span text:style-name="T23">(</text:span><text:span text:style-name="T31">0</text:span><text:span text:style-name="T23">) {}<text:line-break/></text:span><text:span text:style-name="T27">Vector</text:span><text:span text:style-name="T23">::</text:span><text:span text:style-name="T28">Vector</text:span><text:span text:style-name="T23">(</text:span><text:span text:style-name="T26">int </text:span><text:span text:style-name="T27">size</text:span><text:span text:style-name="T23">) : </text:span><text:span text:style-name="T32">head_</text:span><text:span text:style-name="T23">(</text:span><text:span text:style-name="T26">new </text:span><text:span text:style-name="T27">Object</text:span><text:span text:style-name="T23">* [</text:span><text:span text:style-name="T27">size</text:span><text:span text:style-name="T23">]), </text:span><text:span text:style-name="T32">size_</text:span><text:span text:style-name="T23">(</text:span><text:span text:style-name="T27">size</text:span><text:span text:style-name="T23">), </text:span><text:span text:style-name="T32">cur_</text:span><text:span text:style-name="T23">(</text:span><text:span text:style-name="T31">0</text:span><text:span text:style-name="T23">) {}<text:line-break/><text:line-break/></text:span><text:span text:style-name="T27">Vector</text:span><text:span text:style-name="T23">::</text:span><text:span text:style-name="T28">~Vector</text:span><text:span text:style-name="T23">() { </text:span><text:span text:style-name="T29">//when destructing we should delete pointers that are stored in the array<text:line-break/><text:tab/></text:span><text:span text:style-name="T26">if </text:span><text:span text:style-name="T23">(</text:span><text:span text:style-name="T32">head_ </text:span><text:span text:style-name="T23">!= </text:span><text:span text:style-name="T26">nullptr</text:span><text:span text:style-name="T23">) {<text:line-break/><text:tab/><text:tab/></text:span><text:span text:style-name="T26">delete</text:span><text:span text:style-name="T23">[] </text:span><text:span text:style-name="T32">head_</text:span><text:span text:style-name="T23">;<text:line-break/><text:tab/><text:tab/></text:span><text:span text:style-name="T32">head_ </text:span><text:span text:style-name="T23">= </text:span><text:span text:style-name="T26">nullptr</text:span><text:span text:style-name="T23">;<text:line-break/><text:tab/>}<text:line-break/>}<text:line-break/><text:line-break/></text:span><text:span text:style-name="T26">void </text:span><text:span text:style-name="T27">Vector</text:span><text:span text:style-name="T23">::</text:span><text:span text:style-name="T28">Add</text:span><text:span text:style-name="T23">(</text:span><text:span text:style-name="T27">Object</text:span><text:span text:style-name="T23">* </text:span><text:span text:style-name="T27">obj</text:span><text:span text:style-name="T23">) {<text:line-break/><text:tab/></text:span><text:span text:style-name="T26">if </text:span><text:span text:style-name="T23">(</text:span><text:span text:style-name="T32">cur_ </text:span><text:span text:style-name="T23">&lt; </text:span><text:span text:style-name="T32">size_</text:span><text:span text:style-name="T23">) { </text:span><text:span text:style-name="T29">//if we still haven't hit the maximum, add the element to the end of the array, then move our integer-pointer to the next position<text:line-break/><text:tab/><text:tab/></text:span><text:span text:style-name="T32">head_</text:span><text:span text:style-name="T23">[</text:span><text:span text:style-name="T32">cur_</text:span><text:span text:style-name="T23">] = </text:span><text:span text:style-name="T27">obj</text:span><text:span text:style-name="T23">;<text:line-break/><text:tab/><text:tab/></text:span><text:span text:style-name="T32">cur_</text:span><text:span text:style-name="T23">++;<text:line-break/><text:tab/>}<text:line-break/><text:tab/></text:span><text:span text:style-name="T26">else </text:span><text:span text:style-name="T23">{<text:line-break/><text:tab/><text:tab/></text:span><text:span text:style-name="T27">std</text:span><text:span text:style-name="T23">::</text:span><text:span text:style-name="T27">cout </text:span><text:span text:style-name="T28">&lt;&lt; </text:span><text:span text:style-name="T25">"Vector is full. Cannot add more objects.</text:span><text:span text:style-name="T30">\n</text:span><text:span text:style-name="T25">"</text:span><text:span text:style-name="T23">;<text:line-break/><text:tab/>}<text:line-break/>}<text:line-break/><text:line-break/></text:span><text:span text:style-name="T29">//console output overload<text:line-break/></text:span><text:span text:style-name="T27">std</text:span><text:span text:style-name="T23">::</text:span><text:span text:style-name="T27">ostream</text:span><text:span text:style-name="T23">&amp; </text:span><text:span text:style-name="T26">operator</text:span><text:span text:style-name="T23">&lt;&lt;(</text:span><text:span text:style-name="T27">std</text:span><text:span text:style-name="T23">::</text:span><text:span text:style-name="T27">ostream</text:span><text:span text:style-name="T23">&amp; </text:span><text:span text:style-name="T27">out</text:span><text:span text:style-name="T23">, </text:span><text:span text:style-name="T26">const </text:span><text:span text:style-name="T27">Vector</text:span><text:span text:style-name="T23">&amp; </text:span><text:span text:style-name="T27">v</text:span><text:span text:style-name="T23">) {<text:line-break/><text:tab/></text:span><text:span text:style-name="T26">if </text:span><text:span text:style-name="T23">(</text:span><text:span text:style-name="T27">v</text:span><text:span text:style-name="T23">.</text:span><text:span text:style-name="T32">size_ </text:span><text:span text:style-name="T23">== </text:span><text:span text:style-name="T31">0</text:span><text:span text:style-name="T23">) {<text:line-break/><text:tab/><text:tab/></text:span><text:span text:style-name="T27">out </text:span><text:span text:style-name="T28">&lt;&lt; </text:span><text:span text:style-name="T25">"Vector is empty.</text:span><text:span text:style-name="T30">\n</text:span><text:span text:style-name="T25">"</text:span><text:span text:style-name="T23">;<text:line-break/><text:tab/><text:tab/></text:span><text:span text:style-name="T26">return </text:span><text:span text:style-name="T27">out</text:span><text:span text:style-name="T23">;<text:line-break/><text:tab/>}<text:line-break/><text:tab/></text:span><text:span text:style-name="T27">Object</text:span><text:span text:style-name="T23">** </text:span><text:span text:style-name="T27">c </text:span><text:span text:style-name="T23">= </text:span><text:span text:style-name="T27">v</text:span><text:span text:style-name="T23">.</text:span><text:span text:style-name="T32">head_</text:span><text:span text:style-name="T23">;<text:line-break/><text:tab/></text:span><text:span text:style-name="T26">for </text:span><text:span text:style-name="T23">(</text:span><text:span text:style-name="T26">int </text:span><text:span text:style-name="T27">i </text:span><text:span text:style-name="T23">= </text:span><text:span text:style-name="T31">0</text:span><text:span text:style-name="T23">; </text:span><text:span text:style-name="T27">i </text:span><text:span text:style-name="T23">&lt; </text:span><text:span text:style-name="T27">v</text:span><text:span text:style-name="T23">.</text:span><text:span text:style-name="T32">cur_</text:span><text:span text:style-name="T23">; </text:span><text:span text:style-name="T27">i</text:span><text:span text:style-name="T23">++) { </text:span><text:span text:style-name="T29">//if the vector isn't empty we show each element of the array, one by one<text:line-break/><text:tab/><text:tab/></text:span><text:span text:style-name="T23">(*</text:span><text:span text:style-name="T27">c</text:span><text:span text:style-name="T23">)-&gt;</text:span><text:span text:style-name="T28">Show</text:span><text:span text:style-name="T23">();<text:line-break/><text:tab/><text:tab/></text:span><text:span text:style-name="T27">c</text:span><text:span text:style-name="T23">++;<text:line-break/></text:span><text:soft-page-break/><text:span text:style-name="T23"><text:tab/>}<text:line-break/><text:tab/></text:span><text:span text:style-name="T26">return </text:span><text:span text:style-name="T27">out</text:span><text:span text:style-name="T23">;<text:line-break/>}</text:span></text:p>
      <text:p text:style-name="P27" loext:marker-style-name="T33"/>
      <text:p text:style-name="P28" loext:marker-style-name="T1">Решение</text:p>
      <text:p text:style-name="P29" loext:marker-style-name="T1"><draw:frame draw:style-name="fr2" draw:name="Изображение4" text:anchor-type="as-char" svg:width="5.4327in" svg:height="4.0772in" draw:z-index="1"><draw:image xlink:href="Pictures/1000000100000258000001B0E5EED5C5.png" xlink:type="simple" xlink:show="embed" xlink:actuate="onLoad" draw:mime-type="image/png"/></draw:frame></text:p>
      <text:p text:style-name="P29" loext:marker-style-name="T1"/>
      <text:p text:style-name="P30" loext:marker-style-name="T1">Контрольные вопросы</text:p>
      <text:p text:style-name="P31"><text:span text:style-name="T40">1. </text:span><text:span text:style-name="Strong_20_Emphasis"><text:span text:style-name="T41">Какой метод называется чисто виртуальным? Чем он отличается от виртуального метода?</text:span></text:span></text:p>
      <text:p text:style-name="P32"><text:span text:style-name="Strong_20_Emphasis"><text:span text:style-name="T41">Ответ:</text:span></text:span><text:span text:style-name="T42"> </text:span><text:span text:style-name="T43">чисто виртуальный метод объявляется с = 0 (например, virtual void f() = 0;) и не имеет реализации в данном классе. Отличие от виртуального метода: виртуальный метод имеет реализацию (тело) в базовом классе и может быть переопределён в производном, а чисто виртуальный обязан быть переопределён в производном классе (иначе производный класс тоже станет абстрактным).</text:span></text:p>
      <text:p text:style-name="P32"><text:span text:style-name="Strong_20_Emphasis"><text:span text:style-name="T44">2. </text:span></text:span><text:span text:style-name="Strong_20_Emphasis"><text:span text:style-name="T41">Какой класс называется абстрактным?</text:span></text:span></text:p>
      <text:p text:style-name="P32"><text:span text:style-name="Strong_20_Emphasis"><text:span text:style-name="T41">Ответ: </text:span></text:span><text:span text:style-name="T41">абстрактный класс -  это класс, который содержит хотя бы один чисто виртуальный метод. Объекты такого класса создавать нельзя.</text:span></text:p>
      <text:p text:style-name="P32"><text:span text:style-name="Strong_20_Emphasis"><text:span text:style-name="T45">3. </text:span></text:span><text:span text:style-name="Strong_20_Emphasis"><text:span text:style-name="T41">Для чего предназначены абстрактные классы?</text:span></text:span></text:p>
      <text:p text:style-name="P32"><text:span text:style-name="Strong_20_Emphasis"><text:span text:style-name="T41">Ответ: </text:span></text:span><text:span text:style-name="T41">абстрактные классы служат для задания общего интерфейса (набора методов) для всех производных классов. Они описывают общие понятия, которые предполагается конкретизировать в наследниках. Это позволяет работать с объектами разных производных классов через указатели/ссылки на абстрактный базовый </text:span><text:span text:style-name="T46">класс.</text:span></text:p>
      <text:p text:style-name="P32"><text:span text:style-name="T45">4. </text:span><text:span text:style-name="Strong_20_Emphasis"><text:span text:style-name="T46">Что</text:span></text:span><text:span text:style-name="Strong_20_Emphasis"><text:span text:style-name="T41"> такое полиморфные функции?</text:span></text:span></text:p>
      <text:p text:style-name="P32"><text:span text:style-name="Strong_20_Emphasis"><text:span text:style-name="T41">Ответ: </text:span></text:span><text:span text:style-name="T41">полиморфные функции - это функции, которые могут работать с объектами разных типов в пределах одной иерархии наследования. Обычно они принимают указатель или ссылку на абстрактный базовый класс и вызывают виртуальные методы, что приводит к выполнению кода, соответствующего реальному типу объекта.</text:span></text:p>
      <text:p text:style-name="P32"><text:span text:style-name="Strong_20_Emphasis"><text:span text:style-name="T45">5. </text:span></text:span><text:span text:style-name="Strong_20_Emphasis"><text:span text:style-name="T41">Чем полиморфизм отличается от принципа подстановки?</text:span></text:span></text:p>
      <text:p text:style-name="P32"><text:span text:style-name="Strong_20_Emphasis"><text:span text:style-name="T41">Ответ: </text:span></text:span><text:span text:style-name="T41">принцип подстановки - это правило, позволяющее использовать объект производного класса там, где ожидается объект базового. Полиморфизм - это способность объектов разных классов по-разному реагировать на один и тот же вызов виртуальной функции (через механизм позднего связывания). Полиморфизм реализуется с помощью принципа подстановки (когда указатель базового класса указывает на объект производного) и виртуальных функций</text:span></text:p>
      <text:p text:style-name="P32"><text:span text:style-name="Strong_20_Emphasis"><text:span text:style-name="T45">6. </text:span></text:span><text:span text:style-name="Strong_20_Emphasis"><text:span text:style-name="T41">Привести примеры иерархий с использованием абстрактных классов.</text:span></text:span></text:p>
      <text:p text:style-name="P32"><text:span text:style-name="Strong_20_Emphasis"><text:span text:style-name="T41">Ответ:</text:span></text:span><text:span text:style-name="T42"> </text:span><text:span text:style-name="T41">пример: абстрактный класс Shape с чисто виртуальным методом draw(). Производные: Circle, Rectangle, Triangle - каждый </text:span><text:soft-page-break/><text:span text:style-name="T41">реализует draw() по-своему. Другой пример: абстрактный класс Figure с методами area() и perimeter(), а наследники Square, Ellipse.</text:span></text:p>
      <text:p text:style-name="P32"><text:span text:style-name="Strong_20_Emphasis"><text:span text:style-name="T45">7. </text:span></text:span><text:span text:style-name="Strong_20_Emphasis"><text:span text:style-name="T41">Привести примеры полиморфных функций.</text:span></text:span></text:p>
      <text:p text:style-name="P32"><text:span text:style-name="Strong_20_Emphasis"><text:span text:style-name="T41">Ответ:</text:span></text:span><text:span text:style-name="T42"> </text:span><text:span text:style-name="T41">пример: void printArea(Shape* s) { cout &lt;&lt; s-&gt;area(); } - функция принимает указатель на абстрактный базовый класс Shape и вызывает виртуальный метод area(). В зависимости от фактического типа объекта (Circle, Rectangle) будет вызвана соответствующая реализация.</text:span></text:p>
      <text:p text:style-name="P32"><text:span text:style-name="Strong_20_Emphasis"><text:span text:style-name="T45">8. </text:span></text:span><text:span text:style-name="Strong_20_Emphasis"><text:span text:style-name="T41">В каких случаях используется механизм позднего связывания?</text:span></text:span></text:p>
      <text:p text:style-name="P33"><text:span text:style-name="Strong_20_Emphasis"><text:span text:style-name="T41">Ответ:</text:span></text:span><text:span text:style-name="T42"> </text:span><text:span text:style-name="T47">м</text:span><text:span text:style-name="T41">еханизм позднего (динамического) связывания используется, когда вызов виртуальной функции происходит через указатель или ссылку на базовый класс, а реальный тип объекта определяется во время выполнения. Это необходимо для реализации полиморфизма, когда нужно, чтобы решение о том, какую версию метода вызывать, принималось не на этапе компиляции, а в момент выполнения программы.</text:span></text:p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等线" style:font-size-asian="12pt" style:language-asian="zh" style:country-asian="CN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2pt" fo:language="ru" fo:country="RU" style:letter-kerning="true" style:font-name-asian="等线" style:font-size-asian="12pt" style:language-asian="zh" style:country-asian="CN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等线 Light" style:font-family-asian="'等线 Light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等线 Light" style:font-family-asian="'等线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等线 Light" style:font-family-asian="'等线 Light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102in" style:font-name-asian="等线 Light" style:font-family-asian="'等线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c-lboyjj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Базовый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等线 Light" style:font-family-asian="'等线 Light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等线 Light" style:font-family-asian="'等线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等线 Light" style:font-family-asian="'等线 Light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102in" style:font-name-asian="等线 Light" style:font-family-asian="'等线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c-itonen" style:family="text" style:parent-style-name="Default_20_Paragraph_20_Font"/>
    <style:style style:name="katex-mathml" style:family="text" style:parent-style-name="Default_20_Paragraph_20_Font"/>
    <style:style style:name="mord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Calibri" fo:font-family="Calibri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Calibri" fo:font-family="Calibri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Calibri" fo:font-family="Calibri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family-generic="roman" style:font-pitch="variable" style:font-name-asian="等线" style:font-family-asian="等线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Calibri" fo:font-family="Calibri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Times New Roman" fo:font-family="'Times New Roman'" style:font-family-generic="roman" style:font-pitch="variable" style:font-name-asian="等线" style:font-family-asian="等线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="Times New Roman" fo:font-family="'Times New Roman'" style:font-family-generic="roman" style:font-pitch="variable" style:font-name-asian="等线" style:font-family-asian="等线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font-name="Calibri" fo:font-family="Calibri" style:font-family-generic="roman" style:font-pitch="variable"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text:style-name="ListLabel_20_12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text:style-name="ListLabel_20_13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5" text:style-name="ListLabel_20_14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ListLabel_20_15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7" text:style-name="ListLabel_20_16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8" text:style-name="ListLabel_20_17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9" text:style-name="ListLabel_20_18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2.022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22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22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52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22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22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5.022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22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02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Дарья Альметова</meta:initial-creator>
    <meta:editing-cycles>56</meta:editing-cycles>
    <meta:creation-date>2025-12-13T14:37:00</meta:creation-date>
    <dc:date>2026-05-03T11:19:35.783781391</dc:date>
    <meta:editing-duration>PT17H10M15S</meta:editing-duration>
    <meta:generator>LibreOffice/25.8.5.2$Linux_X86_64 LibreOffice_project/580$Build-2</meta:generator>
    <meta:document-statistic meta:table-count="0" meta:image-count="2" meta:object-count="0" meta:page-count="16" meta:paragraph-count="166" meta:word-count="1585" meta:character-count="11639" meta:non-whitespace-character-count="10027"/>
    <meta:user-defined meta:name="AppVersion">16.0000</meta:user-defined>
    <meta:template xlink:type="simple" xlink:actuate="onRequest" xlink:title="Normal" xlink:href=""/>
  </office:meta>
</office:document-meta>
</file>