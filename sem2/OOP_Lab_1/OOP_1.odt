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60000011F6F756CCA.png" manifest:media-type="image/png"/>
  <manifest:file-entry manifest:full-path="Pictures/10000001000001A000000222A6CFF989.png" manifest:media-type="image/png"/>
  <manifest:file-entry manifest:full-path="Pictures/100000010000018F00000223BDA90D2F.png" manifest:media-type="image/png"/>
  <manifest:file-entry manifest:full-path="Pictures/10000001000001260000016CCA63F105.png" manifest:media-type="image/png"/>
  <manifest:file-entry manifest:full-path="Pictures/100000010000039C00000380371518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dc61f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rsid="0017070d" officeooo:paragraph-rsid="0017070d"/>
    </style:style>
    <style:style style:name="P8" style:family="paragraph" style:parent-style-name="List_20_Paragraph">
      <style:paragraph-properties fo:margin-left="0in" fo:text-align="justify" style:justify-single-word="false" fo:text-indent="0.4925in" style:auto-text-indent="false" fo:break-before="page"/>
    </style:style>
    <style:style style:name="P9" style:family="paragraph" style:parent-style-name="List_20_Paragraph" style:list-style-name="WWNum23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32acfc" officeooo:paragraph-rsid="003adf73" style:font-size-asian="14pt" style:font-name-complex="Times New Roman1" style:font-size-complex="14pt"/>
    </style:style>
    <style:style style:name="P10" style:family="paragraph" style:parent-style-name="List_20_Paragraph" style:list-style-name="WWNum23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fo:font-weight="normal" officeooo:rsid="0032acfc" officeooo:paragraph-rsid="003adf73" style:font-size-asian="14pt" style:font-weight-asian="normal" style:font-name-complex="Times New Roman1" style:font-size-complex="14pt" style:font-weight-complex="normal"/>
    </style:style>
    <style:style style:name="P11" style:family="paragraph" style:parent-style-name="List_20_Paragraph">
      <style:paragraph-properties fo:margin-left="0.7425in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List_20_Paragraph">
      <style:paragraph-properties fo:margin-left="0in" fo:text-align="justify" style:justify-single-word="false" fo:text-indent="0.4925in" style:auto-text-indent="false"/>
    </style:style>
    <style:style style:name="P13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3adf73" officeooo:paragraph-rsid="003adf73" style:font-size-asian="14pt" style:font-name-complex="Times New Roman1" style:font-size-complex="14pt"/>
    </style:style>
    <style:style style:name="P14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language="en" fo:country="US" fo:font-weight="bold" officeooo:rsid="003adf73" officeooo:paragraph-rsid="003adf73" style:font-size-asian="14pt" style:font-weight-asian="bold" style:font-name-complex="Times New Roman1" style:font-size-complex="14pt" style:font-weight-complex="bold"/>
    </style:style>
    <style:style style:name="P16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officeooo:paragraph-rsid="0033bc22" style:font-size-asian="14pt" style:font-weight-asian="bold" style:font-name-complex="Times New Roman1" style:font-size-complex="14pt" style:font-weight-complex="bold"/>
    </style:style>
    <style:style style:name="P17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officeooo:paragraph-rsid="001bab08" style:font-size-asian="14pt" style:font-name-complex="Times New Roman1" style:font-size-complex="14pt"/>
    </style:style>
    <style:style style:name="P18" style:family="paragraph" style:parent-style-name="Standard">
      <style:text-properties fo:color="#000000" loext:opacity="100%" style:font-name="Cascadia Mono" fo:font-size="9.5pt" fo:language="en" fo:country="US" fo:font-weight="bold" officeooo:rsid="003f377c" officeooo:paragraph-rsid="003f377c" fo:background-color="#ffffff" style:font-size-asian="9.5pt" style:font-weight-asian="bold" style:font-name-complex="Times New Roman1" style:font-size-complex="14pt" style:font-weight-complex="bold"/>
    </style:style>
    <style:style style:name="P19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0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officeooo:rsid="001a7dbe" officeooo:paragraph-rsid="001a7dbe" style:font-size-asian="14pt" style:font-weight-asian="bold" style:font-name-complex="Times New Roman1" style:font-size-complex="14pt" style:font-weight-complex="bold"/>
    </style:style>
    <style:style style:name="P21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1a7dbe" officeooo:paragraph-rsid="001a7dbe" style:font-size-asian="14pt" style:font-weight-asian="bold" style:font-name-complex="Times New Roman1" style:font-size-complex="14pt" style:font-weight-complex="bold"/>
    </style:style>
    <style:style style:name="P22" style:family="paragraph" style:parent-style-name="List_20_Paragraph">
      <style:paragraph-properties fo:margin-left="0in" fo:text-align="center" style:justify-single-word="false"/>
      <style:text-properties officeooo:paragraph-rsid="001a7dbe"/>
    </style:style>
    <style:style style:name="P23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3d601d" officeooo:paragraph-rsid="003d601d" style:font-size-asian="14pt" style:font-weight-asian="bold" style:font-name-complex="Times New Roman1" style:font-size-complex="14pt" style:font-weight-complex="bold"/>
    </style:style>
    <style:style style:name="P24" style:family="paragraph" style:parent-style-name="List_20_Paragraph">
      <style:paragraph-properties fo:margin-left="0in" fo:text-align="start" style:justify-single-word="false"/>
      <style:text-properties style:font-name="Times New Roman" fo:font-size="14pt" fo:font-weight="bold" officeooo:rsid="001a7dbe" officeooo:paragraph-rsid="003d601d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3adf73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1a7dbe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3adf73"/>
    </style:style>
    <style:style style:name="T12" style:family="text">
      <style:text-properties fo:font-weight="bold" officeooo:rsid="001c65e1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8080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5" style:family="text">
      <style:text-properties fo:color="#9e880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6" style:family="text">
      <style:text-properties fo:color="#0033b3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8" style:family="text">
      <style:text-properties fo:color="#8c8c8c" loext:opacity="100%" fo:font-family="'JetBrains Mono'" style:font-family-generic="roman" style:font-pitch="variable" fo:font-size="12pt" fo:font-style="italic" fo:font-weight="normal" style:font-size-asian="12pt" style:font-style-asian="italic" style:font-weight-asian="normal"/>
    </style:style>
    <style:style style:name="T19" style:family="text">
      <style:text-properties fo:color="#87109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0" style:family="text">
      <style:text-properties fo:color="#00627a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1" style:family="text">
      <style:text-properties fo:color="#067d17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2" style:family="text">
      <style:text-properties fo:color="#067d17" loext:opacity="100%" fo:font-family="'JetBrains Mono'" style:font-family-generic="roman" style:font-pitch="variable" fo:font-size="12pt" fo:font-style="normal" fo:font-weight="normal" officeooo:rsid="003f377c" style:font-size-asian="12pt" style:font-style-asian="normal" style:font-weight-asian="normal"/>
    </style:style>
    <style:style style:name="T23" style:family="text">
      <style:text-properties fo:color="#0037a6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4" style:family="text">
      <style:text-properties fo:color="#1750eb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d601d" style:font-weight-asian="normal" style:font-weight-complex="normal"/>
    </style:style>
    <style:style style:name="T27" style:family="text">
      <style:text-properties officeooo:rsid="003d601d"/>
    </style:style>
    <style:style style:name="T28" style:family="text">
      <style:text-properties fo:language="en" fo:country="US" fo:font-weight="normal" officeooo:rsid="003d601d" style:font-weight-asian="normal" style:font-weight-complex="normal"/>
    </style:style>
    <style:style style:name="T29" style:family="text">
      <style:text-properties fo:language="en" fo:country="US" fo:font-weight="normal" officeooo:rsid="003daedd" style:font-weight-asian="normal" style:font-weight-complex="normal"/>
    </style:style>
    <style:style style:name="T30" style:family="text">
      <style:text-properties fo:language="ru" fo:country="RU" fo:font-weight="normal" officeooo:rsid="003daedd" style:font-weight-asian="normal" style:font-weight-complex="normal"/>
    </style:style>
    <style:style style:name="T31" style:family="text">
      <style:text-properties fo:font-weight="normal" officeooo:rsid="003daedd" style:font-weight-asian="normal" style:font-weight-complex="normal"/>
    </style:style>
    <style:style style:name="T32" style:family="text">
      <style:text-properties fo:language="en" fo:country="US" officeooo:rsid="003daed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217066912"/><text:span text:style-name="T1">Министерство науки и высшего образования Российской Федерации</text:span><text:span text:style-name="T1"/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" loext:marker-style-name="T1"><text:span text:style-name="T1">«Пермский национальный исследовательский политехнический университет»</text:span><text:span text:style-name="T1"/></text:p>
      <text:p text:style-name="P2" loext:marker-style-name="T2"/>
      <text:p text:style-name="P1" loext:marker-style-name="T2"><text:span text:style-name="T2">Электротехнический факультет</text:span><text:span text:style-name="T2"/></text:p>
      <text:p text:style-name="Standard" loext:marker-style-name="T3"><text:span text:style-name="T2">Выпускающая кафедра: </text:span><text:span text:style-name="T3">информационные технологии и автоматизированные системы (ИТАС)</text:span></text:p>
      <text:p text:style-name="Standard" loext:marker-style-name="T3"><text:span text:style-name="T2">Направление подготовки: </text:span><text:span text:style-name="T3">09.03.04 Программная инженерия</text:span></text:p>
      <text:p text:style-name="P3" loext:marker-style-name="T2"/>
      <text:p text:style-name="P4" loext:marker-style-name="T1"/>
      <text:p text:style-name="P1" loext:marker-style-name="T1"><text:span text:style-name="T1">ОТЧЕТ</text:span><text:span text:style-name="T1"/></text:p>
      <text:p text:style-name="P1" loext:marker-style-name="T4"><text:span text:style-name="T1">Лабораторная работа</text:span></text:p>
      <text:p text:style-name="P1" loext:marker-style-name="T1"><text:span text:style-name="T1">«</text:span><text:span text:style-name="T5">Классы и Объекты. Инкапсуляция</text:span><text:span text:style-name="T1">»</text:span></text:p>
      <text:p text:style-name="P1" loext:marker-style-name="T1"><text:span text:style-name="T1">По дисциплине «Основы алгоритмизации и программирования»</text:span><text:span text:style-name="T1"/></text:p>
      <text:p text:style-name="P5" loext:marker-style-name="T6"/>
      <text:p text:style-name="P2" loext:marker-style-name="T2"/>
      <text:p text:style-name="P2" loext:marker-style-name="T2"/>
      <text:p text:style-name="P2" loext:marker-style-name="T2"/>
      <text:p text:style-name="P6" loext:marker-style-name="T2"><text:span text:style-name="T2">Выполнил студент группы РИС-25-2б</text:span><text:span text:style-name="T2"/></text:p>
      <text:p text:style-name="P7" loext:marker-style-name="T2"><text:span text:style-name="T2">Фокин Алексей Дмитриевич</text:span></text:p>
      <text:p text:style-name="P6" loext:marker-style-name="T2"><text:span text:style-name="T2">Принял: Доц. Полякова О.А.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7"><text:span text:style-name="T2">Пермь 202</text:span><text:span text:style-name="T8">6</text:span></text:p>
      <text:p text:style-name="P8" loext:marker-style-name="T9"><text:span text:style-name="T1">Постановка задачи</text:span><text:span text:style-name="T9">:</text:span></text:p>
      <text:list text:style-name="WWNum23">
        <text:list-header>
          <text:p text:style-name="P9" loext:marker-style-name="T6">Реализовать определение нового класса. Для демонстрации работы с объектами написать главную функцию. Продемонстрировать разные способы создания объектов и массивов объектов.</text:p>
          <text:p text:style-name="P9" loext:marker-style-name="T6">Структура-пара – структура с двумя полями, которые обычно имеют имена first и second. Требуется реализовать тип данных с помощью такой структуры.</text:p>
          <text:p text:style-name="P10">Элемент арифметической прогрессии aj вычисляется по формуле: aj=a0·<text:span text:style-name="T10">r</text:span><text:span text:style-name="T11">^</text:span><text:span text:style-name="T10">j. Поле</text:span> first – дробное число, первый элемент прогрессии a0, поле second – положительное целое число, постоянное отношение r. Реализовать метод element(int j) –вычисление j-го элемента прогрессии.</text:p>
        </text:list-header>
      </text:list>
      <text:p text:style-name="P11" loext:marker-style-name="T2"/>
      <text:p text:style-name="P12" loext:marker-style-name="T9"><text:span text:style-name="T1">Анализ задачи</text:span><text:span text:style-name="T9">:</text:span></text:p>
      <text:list text:style-name="WWNum25">
        <text:list-item>
          <text:p text:style-name="P13">Реализуем структуру-пару с двумя полями, одно — дробное, второе — целочисленное</text:p>
        </text:list-item>
        <text:list-item>
          <text:p text:style-name="P13">Для данной структуры реализуем методы инициализации, чтения, демонстрации, умножения одного члена пары на другой, получения элемента последовательности</text:p>
        </text:list-item>
        <text:list-item>
          <text:p text:style-name="P13">Реализуем функцию для быстрого создания экземпляров структуры <text:span text:style-name="T10">make_fraction</text:span></text:p>
        </text:list-item>
        <text:list-item>
          <text:p text:style-name="P13">В главной функции реализуем демонстрационное тестирование вышеозначенного функционала</text:p>
        </text:list-item>
      </text:list>
      <text:p text:style-name="P14" loext:marker-style-name="T1"/>
      <text:p text:style-name="P15">UML</text:p>
      <text:p text:style-name="P16" loext:marker-style-name="T1"><draw:frame draw:style-name="fr1" draw:name="Изображение1" text:anchor-type="as-char" svg:y="-2.5866in" svg:width="4.2335in" svg:height="4.5457in" draw:z-index="0"><draw:image xlink:href="Pictures/100000010000039C000003803715185A.png" xlink:type="simple" xlink:show="embed" xlink:actuate="onLoad" draw:mime-type="image/png"/></draw:frame></text:p>
      <text:p text:style-name="P17" loext:marker-style-name="T1"><text:span text:style-name="T12">К</text:span><text:span text:style-name="T13">од</text:span></text:p>
      <text:p text:style-name="P18">pair.h:</text:p>
      <text:p text:style-name="P19" loext:marker-style-name="T14"><text:span text:style-name="T15">#pragma </text:span><text:span text:style-name="T16">once<text:line-break/><text:line-break/>struct </text:span><text:span text:style-name="T17">fraction </text:span><text:span text:style-name="T14">{ </text:span><text:span text:style-name="T18">// struct itself /<text:line-break/><text:tab/></text:span><text:span text:style-name="T16">double </text:span><text:span text:style-name="T19">first</text:span><text:span text:style-name="T14">;<text:line-break/><text:tab/></text:span><text:span text:style-name="T16">int </text:span><text:span text:style-name="T19">second</text:span><text:span text:style-name="T14">;<text:line-break/><text:line-break/><text:tab/></text:span><text:span text:style-name="T16">void </text:span><text:span text:style-name="T20">Init</text:span><text:span text:style-name="T14">(</text:span><text:span text:style-name="T16">double</text:span><text:span text:style-name="T14">, </text:span><text:span text:style-name="T16">int</text:span><text:span text:style-name="T14">); </text:span><text:span text:style-name="T18">//Initializer/constructor method<text:line-break/><text:tab/></text:span><text:span text:style-name="T16">void </text:span><text:span text:style-name="T20">Read</text:span><text:span text:style-name="T14">(); </text:span><text:span text:style-name="T18">//Stylized input from console<text:line-break/><text:tab/></text:span><text:span text:style-name="T16">void </text:span><text:span text:style-name="T20">Show</text:span><text:span text:style-name="T14">(); </text:span><text:span text:style-name="T18">//Stylized output into console<text:line-break/><text:tab/></text:span><text:span text:style-name="T16">double </text:span><text:span text:style-name="T20">Power</text:span><text:span text:style-name="T14">(); </text:span><text:span text:style-name="T18">//A function to power the first attribute by second<text:line-break/><text:tab/></text:span><text:span text:style-name="T16">double </text:span><text:span text:style-name="T20">element</text:span><text:span text:style-name="T14">(</text:span><text:span text:style-name="T16">int</text:span><text:span text:style-name="T14">); </text:span><text:span text:style-name="T18">//A function to find an element of the sequence<text:line-break/></text:span><text:span text:style-name="T14">};</text:span></text:p>
      <text:p text:style-name="P18"/>
      <text:p text:style-name="P18">pair.cpp:</text:p>
      <text:p text:style-name="P19" loext:marker-style-name="T14"><text:span text:style-name="T15">#include </text:span><text:span text:style-name="T21">"</text:span><text:span text:style-name="T22">Pair</text:span><text:span text:style-name="T21">.h"<text:line-break/></text:span><text:span text:style-name="T15">#include </text:span><text:span text:style-name="T21">&lt;iostream&gt;<text:line-break/></text:span><text:span text:style-name="T15">#include </text:span><text:span text:style-name="T21">&lt;cmath&gt;<text:line-break/><text:line-break/></text:span><text:span text:style-name="T16">void </text:span><text:span text:style-name="T17">fraction</text:span><text:span text:style-name="T14">::</text:span><text:span text:style-name="T20">Init</text:span><text:span text:style-name="T14">(</text:span><text:span text:style-name="T16">double </text:span><text:span text:style-name="T17">f</text:span><text:span text:style-name="T14">, </text:span><text:span text:style-name="T16">int </text:span><text:span text:style-name="T17">s</text:span><text:span text:style-name="T14">) {<text:line-break/><text:tab/></text:span><text:span text:style-name="T19">first </text:span><text:span text:style-name="T14">= </text:span><text:span text:style-name="T17">f</text:span><text:span text:style-name="T14">;<text:line-break/><text:tab/></text:span><text:span text:style-name="T19">second </text:span><text:span text:style-name="T14">= </text:span><text:span text:style-name="T17">s</text:span><text:span text:style-name="T14">;<text:line-break/>}<text:line-break/><text:line-break/></text:span><text:span text:style-name="T16">void </text:span><text:span text:style-name="T17">fraction</text:span><text:span text:style-name="T14">::</text:span><text:span text:style-name="T20">Read</text:span><text:span text:style-name="T14">() {<text:line-break/><text:tab/></text:span><text:span text:style-name="T17">std</text:span><text:span text:style-name="T14">::</text:span><text:span text:style-name="T17">cout </text:span><text:span text:style-name="T20">&lt;&lt; </text:span><text:span text:style-name="T21">"</text:span><text:span text:style-name="T23">\n</text:span><text:span text:style-name="T21">first: "</text:span><text:span text:style-name="T14">; </text:span><text:span text:style-name="T17">std</text:span><text:span text:style-name="T14">::</text:span><text:span text:style-name="T17">cin </text:span><text:span text:style-name="T20">&gt;&gt; </text:span><text:span text:style-name="T19">first</text:span><text:span text:style-name="T14">;<text:line-break/><text:tab/></text:span><text:span text:style-name="T17">std</text:span><text:span text:style-name="T14">::</text:span><text:span text:style-name="T17">cout </text:span><text:span text:style-name="T20">&lt;&lt; </text:span><text:span text:style-name="T21">"</text:span><text:span text:style-name="T23">\n</text:span><text:span text:style-name="T21">second: "</text:span><text:span text:style-name="T14">; </text:span><text:span text:style-name="T17">std</text:span><text:span text:style-name="T14">::</text:span><text:span text:style-name="T17">cin </text:span><text:span text:style-name="T20">&gt;&gt; </text:span><text:span text:style-name="T19">second</text:span><text:span text:style-name="T14">;<text:line-break/>}<text:line-break/><text:line-break/></text:span><text:span text:style-name="T16">void </text:span><text:span text:style-name="T17">fraction</text:span><text:span text:style-name="T14">::</text:span><text:span text:style-name="T20">Show</text:span><text:span text:style-name="T14">() {<text:line-break/><text:tab/></text:span><text:span text:style-name="T17">std</text:span><text:span text:style-name="T14">::</text:span><text:span text:style-name="T17">cout </text:span><text:span text:style-name="T20">&lt;&lt; </text:span><text:span text:style-name="T21">"</text:span><text:span text:style-name="T23">\n</text:span><text:span text:style-name="T21">first = " </text:span><text:span text:style-name="T20">&lt;&lt; </text:span><text:span text:style-name="T19">first </text:span><text:span text:style-name="T20">&lt;&lt; </text:span><text:span text:style-name="T21">"</text:span><text:span text:style-name="T23">\n</text:span><text:span text:style-name="T21">second = " </text:span><text:span text:style-name="T20">&lt;&lt; </text:span><text:span text:style-name="T19">second </text:span><text:span text:style-name="T20">&lt;&lt; </text:span><text:span text:style-name="T21">"</text:span><text:span text:style-name="T23">\n</text:span><text:span text:style-name="T21">"</text:span><text:span text:style-name="T14">;<text:line-break/>}<text:line-break/><text:line-break/></text:span><text:span text:style-name="T16">double </text:span><text:span text:style-name="T17">fraction</text:span><text:span text:style-name="T14">::</text:span><text:span text:style-name="T20">Power</text:span><text:span text:style-name="T14">() {<text:line-break/></text:span><text:soft-page-break/><text:span text:style-name="T14"><text:tab/></text:span><text:span text:style-name="T16">return </text:span><text:span text:style-name="T17">std</text:span><text:span text:style-name="T14">::</text:span><text:span text:style-name="T20">pow</text:span><text:span text:style-name="T14">(</text:span><text:span text:style-name="T19">first</text:span><text:span text:style-name="T14">, </text:span><text:span text:style-name="T19">second</text:span><text:span text:style-name="T14">); </text:span><text:span text:style-name="T18">//Standard &lt;cmath&gt; powering<text:line-break/></text:span><text:span text:style-name="T14">}<text:line-break/><text:line-break/></text:span><text:span text:style-name="T16">double </text:span><text:span text:style-name="T17">fraction</text:span><text:span text:style-name="T14">::</text:span><text:span text:style-name="T20">element</text:span><text:span text:style-name="T14">(</text:span><text:span text:style-name="T16">int </text:span><text:span text:style-name="T17">j</text:span><text:span text:style-name="T14">) {<text:line-break/><text:tab/></text:span><text:span text:style-name="T16">return </text:span><text:span text:style-name="T19">first </text:span><text:span text:style-name="T14">* </text:span><text:span text:style-name="T17">std</text:span><text:span text:style-name="T14">::</text:span><text:span text:style-name="T20">pow</text:span><text:span text:style-name="T14">(</text:span><text:span text:style-name="T19">second</text:span><text:span text:style-name="T14">, </text:span><text:span text:style-name="T17">j</text:span><text:span text:style-name="T14">); </text:span><text:span text:style-name="T18">//Finding an element using the variant defined formula<text:line-break/></text:span><text:span text:style-name="T14">}</text:span></text:p>
      <text:p text:style-name="P18"/>
      <text:p text:style-name="P18">main.cpp:</text:p>
      <text:p text:style-name="P19" loext:marker-style-name="T14"><text:span text:style-name="T15">#include </text:span><text:span text:style-name="T21">"</text:span><text:span text:style-name="T22">Pair</text:span><text:span text:style-name="T21">.h"<text:line-break/></text:span><text:span text:style-name="T15">#include </text:span><text:span text:style-name="T21">&lt;iostream&gt;<text:line-break/></text:span><text:span text:style-name="T16">using namespace </text:span><text:span text:style-name="T17">std</text:span><text:span text:style-name="T14">;<text:line-break/><text:line-break/></text:span><text:span text:style-name="T17">fraction </text:span><text:span text:style-name="T20">make_fraction</text:span><text:span text:style-name="T14">(</text:span><text:span text:style-name="T16">double </text:span><text:span text:style-name="T17">f</text:span><text:span text:style-name="T14">, </text:span><text:span text:style-name="T16">int </text:span><text:span text:style-name="T17">s</text:span><text:span text:style-name="T14">) { </text:span><text:span text:style-name="T18">//make_ function to create an object of the user type<text:line-break/><text:tab/></text:span><text:span text:style-name="T17">fraction res</text:span><text:span text:style-name="T14">;<text:line-break/><text:tab/></text:span><text:span text:style-name="T17">res</text:span><text:span text:style-name="T14">.</text:span><text:span text:style-name="T20">Init</text:span><text:span text:style-name="T14">(</text:span><text:span text:style-name="T17">f</text:span><text:span text:style-name="T14">, </text:span><text:span text:style-name="T17">s</text:span><text:span text:style-name="T14">);<text:line-break/><text:tab/></text:span><text:span text:style-name="T16">return </text:span><text:span text:style-name="T17">res</text:span><text:span text:style-name="T14">;<text:line-break/>}<text:line-break/><text:line-break/></text:span><text:span text:style-name="T16">int </text:span><text:span text:style-name="T20">main</text:span><text:span text:style-name="T14">() {<text:line-break/><text:tab/></text:span><text:span text:style-name="T17">fraction A</text:span><text:span text:style-name="T14">;<text:line-break/><text:tab/></text:span><text:span text:style-name="T17">fraction B</text:span><text:span text:style-name="T14">;<text:line-break/><text:tab/></text:span><text:span text:style-name="T17">A</text:span><text:span text:style-name="T14">.</text:span><text:span text:style-name="T20">Init</text:span><text:span text:style-name="T14">(</text:span><text:span text:style-name="T24">3.0</text:span><text:span text:style-name="T14">, </text:span><text:span text:style-name="T24">2</text:span><text:span text:style-name="T14">); </text:span><text:span text:style-name="T18">//An example object<text:line-break/><text:tab/></text:span><text:span text:style-name="T17">B</text:span><text:span text:style-name="T14">.</text:span><text:span text:style-name="T20">Read</text:span><text:span text:style-name="T14">(); </text:span><text:span text:style-name="T18">//Checking functionality of readers and showers<text:line-break/><text:tab/></text:span><text:span text:style-name="T17">A</text:span><text:span text:style-name="T14">.</text:span><text:span text:style-name="T20">Show</text:span><text:span text:style-name="T14">();<text:line-break/><text:tab/></text:span><text:span text:style-name="T17">B</text:span><text:span text:style-name="T14">.</text:span><text:span text:style-name="T20">Show</text:span><text:span text:style-name="T14">();<text:line-break/><text:tab/></text:span><text:span text:style-name="T17">cout </text:span><text:span text:style-name="T20">&lt;&lt; </text:span><text:span text:style-name="T21">"A.Power(" </text:span><text:span text:style-name="T20">&lt;&lt; </text:span><text:span text:style-name="T17">A</text:span><text:span text:style-name="T14">.</text:span><text:span text:style-name="T19">first </text:span><text:span text:style-name="T20">&lt;&lt; </text:span><text:span text:style-name="T21">", " </text:span><text:span text:style-name="T20">&lt;&lt; </text:span><text:span text:style-name="T17">A</text:span><text:span text:style-name="T14">.</text:span><text:span text:style-name="T19">second </text:span><text:span text:style-name="T20">&lt;&lt; </text:span><text:span text:style-name="T21">") = " </text:span><text:span text:style-name="T20">&lt;&lt; </text:span><text:span text:style-name="T17">A</text:span><text:span text:style-name="T14">.</text:span><text:span text:style-name="T20">Power</text:span><text:span text:style-name="T14">() </text:span><text:span text:style-name="T20">&lt;&lt; </text:span><text:span text:style-name="T21">"</text:span><text:span text:style-name="T23">\n</text:span><text:span text:style-name="T21">"</text:span><text:span text:style-name="T14">; </text:span><text:span text:style-name="T18">//A test of Power() function<text:line-break/><text:tab/></text:span><text:span text:style-name="T17">cout </text:span><text:span text:style-name="T20">&lt;&lt; </text:span><text:span text:style-name="T21">"B.Power(" </text:span><text:span text:style-name="T20">&lt;&lt; </text:span><text:span text:style-name="T17">B</text:span><text:span text:style-name="T14">.</text:span><text:span text:style-name="T19">first </text:span><text:span text:style-name="T20">&lt;&lt; </text:span><text:span text:style-name="T21">", " </text:span><text:span text:style-name="T20">&lt;&lt; </text:span><text:span text:style-name="T17">B</text:span><text:span text:style-name="T14">.</text:span><text:span text:style-name="T19">second </text:span><text:span text:style-name="T20">&lt;&lt; </text:span><text:span text:style-name="T21">") = " </text:span><text:span text:style-name="T20">&lt;&lt; </text:span><text:span text:style-name="T17">B</text:span><text:span text:style-name="T14">.</text:span><text:span text:style-name="T20">Power</text:span><text:span text:style-name="T14">() </text:span><text:span text:style-name="T20">&lt;&lt; </text:span><text:span text:style-name="T21">"</text:span><text:span text:style-name="T23">\n</text:span><text:span text:style-name="T21">"</text:span><text:span text:style-name="T14">;<text:line-break/><text:line-break/><text:tab/></text:span><text:span text:style-name="T17">fraction</text:span><text:span text:style-name="T14">* </text:span><text:span text:style-name="T17">X </text:span><text:span text:style-name="T14">= </text:span><text:span text:style-name="T16">new </text:span><text:span text:style-name="T17">fraction</text:span><text:span text:style-name="T14">; </text:span><text:span text:style-name="T18">//Pointer to an object<text:line-break/><text:tab/></text:span><text:span text:style-name="T17">X</text:span><text:span text:style-name="T14">-&gt;</text:span><text:span text:style-name="T20">Init</text:span><text:span text:style-name="T14">(</text:span><text:span text:style-name="T24">2.0</text:span><text:span text:style-name="T14">, </text:span><text:span text:style-name="T24">5</text:span><text:span text:style-name="T14">); </text:span><text:span text:style-name="T18">//Same methods but with a different method of access<text:line-break/><text:tab/></text:span><text:span text:style-name="T17">X</text:span><text:span text:style-name="T14">-&gt;</text:span><text:span text:style-name="T20">Show</text:span><text:span text:style-name="T14">();<text:line-break/><text:tab/></text:span><text:span text:style-name="T17">X</text:span><text:span text:style-name="T14">-&gt;</text:span><text:span text:style-name="T20">Power</text:span><text:span text:style-name="T14">();<text:line-break/><text:tab/></text:span><text:span text:style-name="T17">cout </text:span><text:span text:style-name="T20">&lt;&lt; </text:span><text:span text:style-name="T21">"X.Power(" </text:span><text:span text:style-name="T20">&lt;&lt; </text:span><text:span text:style-name="T17">X</text:span><text:span text:style-name="T14">-&gt;</text:span><text:span text:style-name="T19">first </text:span><text:span text:style-name="T20">&lt;&lt; </text:span><text:span text:style-name="T21">", " </text:span><text:span text:style-name="T20">&lt;&lt; </text:span><text:span text:style-name="T17">X</text:span><text:span text:style-name="T14">-&gt;</text:span><text:span text:style-name="T19">second </text:span><text:span text:style-name="T20">&lt;&lt; </text:span><text:span text:style-name="T21">") = </text:span><text:soft-page-break/><text:span text:style-name="T21">" </text:span><text:span text:style-name="T20">&lt;&lt; </text:span><text:span text:style-name="T17">X</text:span><text:span text:style-name="T14">-&gt;</text:span><text:span text:style-name="T20">Power</text:span><text:span text:style-name="T14">() </text:span><text:span text:style-name="T20">&lt;&lt; </text:span><text:span text:style-name="T21">"</text:span><text:span text:style-name="T23">\n</text:span><text:span text:style-name="T21">"</text:span><text:span text:style-name="T14">; </text:span><text:span text:style-name="T18">//Testing power for pointer object<text:line-break/><text:tab/></text:span><text:span text:style-name="T16">delete </text:span><text:span text:style-name="T17">X</text:span><text:span text:style-name="T14">;<text:line-break/><text:line-break/><text:tab/></text:span><text:span text:style-name="T17">fraction arr</text:span><text:span text:style-name="T14">[</text:span><text:span text:style-name="T24">3</text:span><text:span text:style-name="T14">]; </text:span><text:span text:style-name="T18">//Array of the user type<text:line-break/><text:tab/></text:span><text:span text:style-name="T16">for </text:span><text:span text:style-name="T14">(</text:span><text:span text:style-name="T16">int </text:span><text:span text:style-name="T17">i </text:span><text:span text:style-name="T14">= </text:span><text:span text:style-name="T24">0</text:span><text:span text:style-name="T14">; </text:span><text:span text:style-name="T17">i </text:span><text:span text:style-name="T14">&lt; </text:span><text:span text:style-name="T24">3</text:span><text:span text:style-name="T14">; </text:span><text:span text:style-name="T17">i</text:span><text:span text:style-name="T14">++) {<text:line-break/><text:tab/><text:tab/></text:span><text:span text:style-name="T17">arr</text:span><text:span text:style-name="T14">[</text:span><text:span text:style-name="T17">i</text:span><text:span text:style-name="T14">].</text:span><text:span text:style-name="T20">Read</text:span><text:span text:style-name="T14">(); </text:span><text:span text:style-name="T18">//Read into array<text:line-break/><text:tab/></text:span><text:span text:style-name="T14">}<text:line-break/><text:tab/></text:span><text:span text:style-name="T16">for </text:span><text:span text:style-name="T14">(</text:span><text:span text:style-name="T16">int </text:span><text:span text:style-name="T17">i </text:span><text:span text:style-name="T14">= </text:span><text:span text:style-name="T24">0</text:span><text:span text:style-name="T14">; </text:span><text:span text:style-name="T17">i </text:span><text:span text:style-name="T14">&lt; </text:span><text:span text:style-name="T24">3</text:span><text:span text:style-name="T14">; </text:span><text:span text:style-name="T17">i</text:span><text:span text:style-name="T14">++) {<text:line-break/><text:tab/><text:tab/></text:span><text:span text:style-name="T17">arr</text:span><text:span text:style-name="T14">[</text:span><text:span text:style-name="T17">i</text:span><text:span text:style-name="T14">].</text:span><text:span text:style-name="T20">Show</text:span><text:span text:style-name="T14">(); </text:span><text:span text:style-name="T18">//Showing an array<text:line-break/><text:tab/></text:span><text:span text:style-name="T14">}<text:line-break/><text:tab/></text:span><text:span text:style-name="T16">for </text:span><text:span text:style-name="T14">(</text:span><text:span text:style-name="T16">int </text:span><text:span text:style-name="T17">i </text:span><text:span text:style-name="T14">= </text:span><text:span text:style-name="T24">0</text:span><text:span text:style-name="T14">; </text:span><text:span text:style-name="T17">i </text:span><text:span text:style-name="T14">&lt; </text:span><text:span text:style-name="T24">3</text:span><text:span text:style-name="T14">; </text:span><text:span text:style-name="T17">i</text:span><text:span text:style-name="T14">++) {<text:line-break/><text:tab/><text:tab/></text:span><text:span text:style-name="T17">arr</text:span><text:span text:style-name="T14">[</text:span><text:span text:style-name="T17">i</text:span><text:span text:style-name="T14">].</text:span><text:span text:style-name="T20">Power</text:span><text:span text:style-name="T14">(); </text:span><text:span text:style-name="T18">//Powering array elements<text:line-break/><text:tab/><text:tab/></text:span><text:span text:style-name="T17">cout </text:span><text:span text:style-name="T20">&lt;&lt; </text:span><text:span text:style-name="T21">"arr[" </text:span><text:span text:style-name="T20">&lt;&lt; </text:span><text:span text:style-name="T17">i </text:span><text:span text:style-name="T20">&lt;&lt; </text:span><text:span text:style-name="T21">"].Power(" </text:span><text:span text:style-name="T20">&lt;&lt; </text:span><text:span text:style-name="T17">arr</text:span><text:span text:style-name="T14">[</text:span><text:span text:style-name="T17">i</text:span><text:span text:style-name="T14">].</text:span><text:span text:style-name="T19">first </text:span><text:span text:style-name="T20">&lt;&lt; </text:span><text:span text:style-name="T21">", " </text:span><text:span text:style-name="T20">&lt;&lt; </text:span><text:span text:style-name="T17">arr</text:span><text:span text:style-name="T14">[</text:span><text:span text:style-name="T17">i</text:span><text:span text:style-name="T14">].</text:span><text:span text:style-name="T19">second </text:span><text:span text:style-name="T20">&lt;&lt; </text:span><text:span text:style-name="T21">") = " </text:span><text:span text:style-name="T20">&lt;&lt; </text:span><text:span text:style-name="T17">arr</text:span><text:span text:style-name="T14">[</text:span><text:span text:style-name="T17">i</text:span><text:span text:style-name="T14">].</text:span><text:span text:style-name="T20">Power</text:span><text:span text:style-name="T14">() </text:span><text:span text:style-name="T20">&lt;&lt; </text:span><text:span text:style-name="T21">"</text:span><text:span text:style-name="T23">\n</text:span><text:span text:style-name="T21">"</text:span><text:span text:style-name="T14">;<text:line-break/><text:tab/>}<text:line-break/><text:line-break/><text:tab/></text:span><text:span text:style-name="T17">fraction</text:span><text:span text:style-name="T14">* </text:span><text:span text:style-name="T17">p_arr </text:span><text:span text:style-name="T14">= </text:span><text:span text:style-name="T16">new </text:span><text:span text:style-name="T17">fraction</text:span><text:span text:style-name="T14">[</text:span><text:span text:style-name="T24">3</text:span><text:span text:style-name="T14">]; </text:span><text:span text:style-name="T18">//Same as before, but this is an array of pointers<text:line-break/><text:tab/></text:span><text:span text:style-name="T16">for </text:span><text:span text:style-name="T14">(</text:span><text:span text:style-name="T16">int </text:span><text:span text:style-name="T17">i </text:span><text:span text:style-name="T14">= </text:span><text:span text:style-name="T24">0</text:span><text:span text:style-name="T14">; </text:span><text:span text:style-name="T17">i </text:span><text:span text:style-name="T14">&lt; </text:span><text:span text:style-name="T24">3</text:span><text:span text:style-name="T14">; </text:span><text:span text:style-name="T17">i</text:span><text:span text:style-name="T14">++) {<text:line-break/><text:tab/><text:tab/></text:span><text:span text:style-name="T17">p_arr</text:span><text:span text:style-name="T14">[</text:span><text:span text:style-name="T17">i</text:span><text:span text:style-name="T14">].</text:span><text:span text:style-name="T20">Read</text:span><text:span text:style-name="T14">();<text:line-break/><text:tab/>}<text:line-break/><text:tab/></text:span><text:span text:style-name="T16">for </text:span><text:span text:style-name="T14">(</text:span><text:span text:style-name="T16">int </text:span><text:span text:style-name="T17">i </text:span><text:span text:style-name="T14">= </text:span><text:span text:style-name="T24">0</text:span><text:span text:style-name="T14">; </text:span><text:span text:style-name="T17">i </text:span><text:span text:style-name="T14">&lt; </text:span><text:span text:style-name="T24">3</text:span><text:span text:style-name="T14">; </text:span><text:span text:style-name="T17">i</text:span><text:span text:style-name="T14">++) {<text:line-break/><text:tab/><text:tab/></text:span><text:span text:style-name="T17">p_arr</text:span><text:span text:style-name="T14">[</text:span><text:span text:style-name="T17">i</text:span><text:span text:style-name="T14">].</text:span><text:span text:style-name="T20">Show</text:span><text:span text:style-name="T14">();<text:line-break/><text:tab/>}<text:line-break/><text:tab/></text:span><text:span text:style-name="T16">for </text:span><text:span text:style-name="T14">(</text:span><text:span text:style-name="T16">int </text:span><text:span text:style-name="T17">i </text:span><text:span text:style-name="T14">= </text:span><text:span text:style-name="T24">0</text:span><text:span text:style-name="T14">; </text:span><text:span text:style-name="T17">i </text:span><text:span text:style-name="T14">&lt; </text:span><text:span text:style-name="T24">3</text:span><text:span text:style-name="T14">; </text:span><text:span text:style-name="T17">i</text:span><text:span text:style-name="T14">++) {<text:line-break/><text:tab/><text:tab/></text:span><text:span text:style-name="T17">p_arr</text:span><text:span text:style-name="T14">[</text:span><text:span text:style-name="T17">i</text:span><text:span text:style-name="T14">].</text:span><text:span text:style-name="T20">Power</text:span><text:span text:style-name="T14">();<text:line-break/><text:tab/><text:tab/></text:span><text:span text:style-name="T17">cout </text:span><text:span text:style-name="T20">&lt;&lt; </text:span><text:span text:style-name="T21">"p_arr[" </text:span><text:span text:style-name="T20">&lt;&lt; </text:span><text:span text:style-name="T17">i </text:span><text:span text:style-name="T20">&lt;&lt; </text:span><text:span text:style-name="T21">"].Power(" </text:span><text:span text:style-name="T20">&lt;&lt; </text:span><text:span text:style-name="T17">p_arr</text:span><text:span text:style-name="T14">[</text:span><text:span text:style-name="T17">i</text:span><text:span text:style-name="T14">].</text:span><text:span text:style-name="T19">first </text:span><text:span text:style-name="T20">&lt;&lt; </text:span><text:span text:style-name="T21">", " </text:span><text:span text:style-name="T20">&lt;&lt; </text:span><text:span text:style-name="T17">p_arr</text:span><text:span text:style-name="T14">[</text:span><text:span text:style-name="T17">i</text:span><text:span text:style-name="T14">].</text:span><text:span text:style-name="T19">second </text:span><text:span text:style-name="T20">&lt;&lt; </text:span><text:span text:style-name="T21">") = " </text:span><text:span text:style-name="T20">&lt;&lt; </text:span><text:span text:style-name="T17">p_arr</text:span><text:span text:style-name="T14">[</text:span><text:span text:style-name="T17">i</text:span><text:span text:style-name="T14">].</text:span><text:span text:style-name="T20">Power</text:span><text:span text:style-name="T14">() </text:span><text:span text:style-name="T20">&lt;&lt; </text:span><text:span text:style-name="T21">"</text:span><text:span text:style-name="T23">\n</text:span><text:span text:style-name="T21">"</text:span><text:span text:style-name="T14">;<text:line-break/><text:tab/>}<text:line-break/><text:tab/></text:span><text:span text:style-name="T16">delete</text:span><text:span text:style-name="T14">[] </text:span><text:span text:style-name="T17">p_arr</text:span><text:span text:style-name="T14">; </text:span><text:span text:style-name="T18">//Cleaning memory up<text:line-break/><text:line-break/><text:tab/></text:span><text:span text:style-name="T16">double </text:span><text:span text:style-name="T17">y</text:span><text:span text:style-name="T14">;<text:line-break/><text:tab/></text:span><text:span text:style-name="T16">int </text:span><text:span text:style-name="T17">z</text:span><text:span text:style-name="T14">;<text:line-break/><text:tab/></text:span><text:span text:style-name="T17">cout </text:span><text:span text:style-name="T20">&lt;&lt; </text:span><text:span text:style-name="T21">"</text:span><text:span text:style-name="T23">\n</text:span><text:span text:style-name="T21">first: "</text:span><text:span text:style-name="T14">; </text:span><text:span text:style-name="T17">cin </text:span><text:span text:style-name="T20">&gt;&gt; </text:span><text:span text:style-name="T17">y</text:span><text:span text:style-name="T14">;<text:line-break/><text:tab/></text:span><text:span text:style-name="T17">cout </text:span><text:span text:style-name="T20">&lt;&lt; </text:span><text:span text:style-name="T21">"</text:span><text:span text:style-name="T23">\n</text:span><text:span text:style-name="T21">second: "</text:span><text:span text:style-name="T14">; </text:span><text:span text:style-name="T17">cin </text:span><text:span text:style-name="T20">&gt;&gt; </text:span><text:span text:style-name="T17">z</text:span><text:span text:style-name="T14">;<text:line-break/><text:tab/></text:span><text:span text:style-name="T17">fraction F </text:span><text:span text:style-name="T20">= make_fraction</text:span><text:span text:style-name="T14">(</text:span><text:span text:style-name="T17">y</text:span><text:span text:style-name="T14">, </text:span><text:span text:style-name="T17">z</text:span><text:span text:style-name="T14">); </text:span><text:span text:style-name="T18">//Checking how make_ function works<text:line-break/><text:tab/></text:span><text:span text:style-name="T17">F</text:span><text:span text:style-name="T14">.</text:span><text:span text:style-name="T20">Show</text:span><text:span text:style-name="T14">();<text:line-break/></text:span><text:soft-page-break/><text:span text:style-name="T14"><text:line-break/><text:tab/></text:span><text:span text:style-name="T17">fraction J</text:span><text:span text:style-name="T14">;<text:line-break/><text:tab/></text:span><text:span text:style-name="T17">J</text:span><text:span text:style-name="T14">.</text:span><text:span text:style-name="T20">Init</text:span><text:span text:style-name="T14">(</text:span><text:span text:style-name="T24">2.0</text:span><text:span text:style-name="T14">, </text:span><text:span text:style-name="T24">3</text:span><text:span text:style-name="T14">);<text:line-break/><text:tab/></text:span><text:span text:style-name="T16">for </text:span><text:span text:style-name="T14">(</text:span><text:span text:style-name="T16">int </text:span><text:span text:style-name="T17">i </text:span><text:span text:style-name="T14">= </text:span><text:span text:style-name="T24">0</text:span><text:span text:style-name="T14">; </text:span><text:span text:style-name="T17">i </text:span><text:span text:style-name="T14">&lt; </text:span><text:span text:style-name="T24">5</text:span><text:span text:style-name="T14">; </text:span><text:span text:style-name="T17">i</text:span><text:span text:style-name="T14">++) {<text:line-break/><text:tab/><text:tab/></text:span><text:span text:style-name="T17">cout </text:span><text:span text:style-name="T20">&lt;&lt; </text:span><text:span text:style-name="T21">"J.element(" </text:span><text:span text:style-name="T20">&lt;&lt; </text:span><text:span text:style-name="T17">i </text:span><text:span text:style-name="T20">&lt;&lt; </text:span><text:span text:style-name="T21">") = " </text:span><text:span text:style-name="T20">&lt;&lt; </text:span><text:span text:style-name="T17">J</text:span><text:span text:style-name="T14">.</text:span><text:span text:style-name="T20">element</text:span><text:span text:style-name="T14">(</text:span><text:span text:style-name="T17">i</text:span><text:span text:style-name="T14">) </text:span><text:span text:style-name="T20">&lt;&lt; </text:span><text:span text:style-name="T21">"</text:span><text:span text:style-name="T23">\n</text:span><text:span text:style-name="T21">"</text:span><text:span text:style-name="T14">; </text:span><text:span text:style-name="T18">//Checking if variant-defined element() function works<text:line-break/><text:tab/></text:span><text:span text:style-name="T14">}<text:line-break/><text:line-break/><text:tab/></text:span><text:span text:style-name="T16">return </text:span><text:span text:style-name="T24">0</text:span><text:span text:style-name="T14">;<text:line-break/>}</text:span></text:p>
      <text:p text:style-name="P20" loext:marker-style-name="T1"/>
      <text:p text:style-name="P21" loext:marker-style-name="T1">Решение</text:p>
      <text:p text:style-name="P22" loext:marker-style-name="T1"><draw:frame draw:style-name="fr2" draw:name="Изображение4" text:anchor-type="as-char" svg:width="2.8571in" svg:height="2.7071in" draw:z-index="1"><draw:image xlink:href="Pictures/10000001000001260000016CCA63F105.png" xlink:type="simple" xlink:show="embed" xlink:actuate="onLoad" draw:mime-type="image/png"/></draw:frame></text:p>
      <text:p text:style-name="P22" loext:marker-style-name="T1"><draw:frame draw:style-name="fr2" draw:name="Изображение4 Копия 1" text:anchor-type="as-char" svg:width="3.5799in" svg:height="5.0571in" draw:z-index="2"><draw:image xlink:href="Pictures/100000010000018F00000223BDA90D2F.png" xlink:type="simple" xlink:show="embed" xlink:actuate="onLoad" draw:mime-type="image/png"/></draw:frame></text:p>
      <text:p text:style-name="P22" loext:marker-style-name="T1"><text:soft-page-break/><draw:frame draw:style-name="fr2" draw:name="Изображение4 Копия 1 Копия 1" text:anchor-type="as-char" svg:width="3.5799in" svg:height="5.0571in" draw:z-index="3"><draw:image xlink:href="Pictures/10000001000001A000000222A6CFF989.png" xlink:type="simple" xlink:show="embed" xlink:actuate="onLoad" draw:mime-type="image/png"/></draw:frame></text:p>
      <text:p text:style-name="P22" loext:marker-style-name="T1"><draw:frame draw:style-name="fr2" draw:name="Изображение2" text:anchor-type="as-char" svg:width="2.7299in" svg:height="2.9898in" draw:z-index="4"><draw:image xlink:href="Pictures/10000001000001060000011F6F756CCA.png" xlink:type="simple" xlink:show="embed" xlink:actuate="onLoad" draw:mime-type="image/png"/></draw:frame></text:p>
      <text:p text:style-name="P22" loext:marker-style-name="T1"/>
      <text:p text:style-name="P23" loext:marker-style-name="T1">Контрольные вопросы</text:p>
      <text:p text:style-name="P24">1. Что такое класс? <text:span text:style-name="T25">— </text:span><text:span text:style-name="T26">пользовательский тип данных, задающий реализацию полей и методов</text:span></text:p>
      <text:p text:style-name="P24">2. Что такое объект (экземпляр) класса? <text:span text:style-name="T25">— </text:span><text:span text:style-name="T26">сущность, созданная по описанию класса</text:span></text:p>
      <text:p text:style-name="P24">3. Как называются поля класса? —<text:span text:style-name="T25"> </text:span><text:span text:style-name="T26">атрибуты</text:span></text:p>
      <text:p text:style-name="P24">4. Как называются функции класса? <text:span text:style-name="T25">— </text:span><text:span text:style-name="T26">методы</text:span><text:span text:style-name="T27"> </text:span></text:p>
      <text:p text:style-name="P24">5. Для чего используются спецификаторы доступа? <text:span text:style-name="T25">— </text:span><text:span text:style-name="T26">для ограничения видимости атрибутов и методов класса</text:span></text:p>
      <text:p text:style-name="P24">6. Для чего используется спецификатор public? <text:span text:style-name="T25">— </text:span><text:span text:style-name="T26">для предоставления доступа к атрибуту или методу класса из любой точки программы</text:span></text:p>
      <text:p text:style-name="P24">7. Для чего используется спецификатор private? <text:span text:style-name="T25">— </text:span><text:span text:style-name="T26">для предоставления доступа к атрибуту или методу только из методов-компонентов самого класса</text:span></text:p>
      <text:p text:style-name="P24">8. Если описание класса начинается со спецификатора class, то какой спецификатор доступа будет использоваться по умолчанию? <text:span text:style-name="T25">— </text:span><text:span text:style-name="T28">private</text:span></text:p>
      <text:p text:style-name="P24">9. Если описание класса начинается со спецификатора struct, то какой спецификатор доступа будет использоваться по умолчанию? <text:span text:style-name="T25">— </text:span><text:span text:style-name="T28">public </text:span></text:p>
      <text:p text:style-name="P24">10. Какой спецификатор доступа должен использоваться при описании интерфейса класса? Почему?<text:span text:style-name="T25"> — </text:span><text:span text:style-name="T28">pu</text:span><text:span text:style-name="T29">blic, </text:span><text:span text:style-name="T30">для того чтобы обеспечить опосредованный доступ</text:span></text:p>
      <text:p text:style-name="P24">11. Каким образом можно изменить значения атрибутов экземпляра класса? <text:span text:style-name="T25">— </text:span><text:span text:style-name="T31">при помощи сеттеров/модификаторов</text:span></text:p>
      <text:p text:style-name="P24">12. Каким образом можно получить значения атрибутов экземпляра класса? <text:span text:style-name="T25">— </text:span><text:span text:style-name="T31">при помощи геттеров/аксессоров</text:span></text:p>
      <text:p text:style-name="P24">13. Класс описан следующим образом struct Student { string name; int group; ……… }; Объект класса определен следующим образом Student *s=new Student; Как можно обратиться к полю name объекта s? — <text:span text:style-name="T29">s→name </text:span></text:p>
      <text:p text:style-name="P24">14. Класс описан следующим образом struct Student { string name; int group; …….. }; Объект класса определен следующим образом Student s; Как можно обратиться к полю name объекта s? <text:span text:style-name="T25">— </text:span><text:span text:style-name="T29">s.name</text:span></text:p>
      <text:p text:style-name="P24">15. Класс описан следующим образом class Student { string name; int group; ……. }; Объект класса определен следующим образом Student *s=new Student; Как можно обратиться к полю name объекта s? — <text:span text:style-name="T29">s→getName()</text:span></text:p>
      <text:p text:style-name="P24">16. Класс описан следующим образом class Student { string name; int group; public: ….. }; Объект класса определен следующим образом Student s; Как можно обратиться к полю name объекта s? — <text:span text:style-name="T29">s.getName()</text:span></text:p>
      <text:p text:style-name="P24"><text:soft-page-break/>17. Класс описан следующим образом class Student { public: char* name; int group; ……… }; Объект класса определен следующим образом Student *s=new Student; Как можно обратиться к полю name объекта s? –<text:span text:style-name="T32"> </text:span><text:span text:style-name="T29">s→nam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lboyjj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Базовый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itonen" style:family="text" style:parent-style-name="Default_20_Paragraph_20_Font"/>
    <style:style style:name="katex-mathml" style:family="text" style:parent-style-name="Default_20_Paragraph_20_Font"/>
    <style:style style:name="mord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12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13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14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15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1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1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1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арья Альметова</meta:initial-creator>
    <meta:editing-cycles>48</meta:editing-cycles>
    <meta:creation-date>2025-12-13T14:37:00</meta:creation-date>
    <dc:date>2026-05-03T10:08:22.990564613</dc:date>
    <meta:editing-duration>PT16H26M32S</meta:editing-duration>
    <meta:generator>LibreOffice/25.8.5.2$Linux_X86_64 LibreOffice_project/580$Build-2</meta:generator>
    <meta:document-statistic meta:table-count="0" meta:image-count="5" meta:object-count="0" meta:page-count="11" meta:paragraph-count="55" meta:word-count="999" meta:character-count="6816" meta:non-whitespace-character-count="5756"/>
    <meta:user-defined meta:name="AppVersion">16.0000</meta:user-defined>
    <meta:template xlink:type="simple" xlink:actuate="onRequest" xlink:title="Normal" xlink:href=""/>
  </office:meta>
</office:document-meta>
</file>