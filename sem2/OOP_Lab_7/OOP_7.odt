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68000008F8E2382CC0.png" manifest:media-type="image/png"/>
  <manifest:file-entry manifest:full-path="Pictures/10000000000001B1000001B23842968F.png" manifest:media-type="image/png"/>
  <manifest:file-entry manifest:full-path="Pictures/100000000000049D00000150519BE2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scadia Mono" svg:font-family="'Cascadia Mono'" style:font-family-generic="roman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dc61f" style:font-size-asian="14pt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officeooo:rsid="0017070d" officeooo:paragraph-rsid="0017070d"/>
    </style:style>
    <style:style style:name="P8" style:family="paragraph" style:parent-style-name="List_20_Paragraph">
      <style:paragraph-properties fo:margin-left="0in" fo:text-align="justify" style:justify-single-word="false" fo:text-indent="0.4925in" style:auto-text-indent="false" fo:break-before="page"/>
      <style:text-properties officeooo:paragraph-rsid="00482439"/>
    </style:style>
    <style:style style:name="P9" style:family="paragraph" style:parent-style-name="List_20_Paragraph" style:list-style-name="L1">
      <style:paragraph-properties fo:text-align="justify" style:justify-single-word="false"/>
      <style:text-properties fo:color="#000000" loext:opacity="100%" style:font-name="Times New Roman" fo:font-size="12pt" fo:language="en" fo:country="US" fo:font-style="normal" fo:font-weight="normal" officeooo:rsid="004af9d1" officeooo:paragraph-rsid="00543dac" style:font-size-asian="12pt" style:font-style-asian="normal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margin-left="0in" fo:text-align="justify" style:justify-single-word="false" fo:text-indent="0in" style:auto-text-indent="false"/>
      <style:text-properties fo:color="#000000" loext:opacity="100%" style:font-name="Times New Roman" fo:font-size="12pt" fo:font-style="normal" fo:font-weight="normal" officeooo:paragraph-rsid="004af9d1" style:font-size-asian="12pt" style:font-style-asian="normal" style:font-weight-asian="normal"/>
    </style:style>
    <style:style style:name="P11" style:family="paragraph" style:parent-style-name="List_20_Paragraph">
      <style:paragraph-properties fo:margin-left="0in" fo:text-align="justify" style:justify-single-word="false" fo:text-indent="0.4925in" style:auto-text-indent="false"/>
    </style:style>
    <style:style style:name="P12" style:family="paragraph" style:parent-style-name="Text_20_body" style:list-style-name="WWNum25">
      <style:paragraph-properties fo:margin-left="0.4925in" fo:text-align="justify" style:justify-single-word="false" fo:text-indent="-0.4925in" style:auto-text-indent="false"/>
      <style:text-properties style:font-name="Times New Roman" fo:font-size="14pt" fo:language="ru" fo:country="RU" officeooo:rsid="0056fa99" officeooo:paragraph-rsid="0056fa99" style:font-size-asian="14pt" style:font-name-complex="Times New Roman1" style:font-size-complex="14pt"/>
    </style:style>
    <style:style style:name="P13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fo:language="en" fo:country="US" fo:font-weight="bold" officeooo:rsid="003adf73" officeooo:paragraph-rsid="003adf73" style:font-size-asian="14pt" style:font-weight-asian="bold" style:font-name-complex="Times New Roman1" style:font-size-complex="14pt" style:font-weight-complex="bold"/>
    </style:style>
    <style:style style:name="P14" style:family="paragraph" style:parent-style-name="List_20_Paragraph">
      <style:paragraph-properties fo:margin-left="0in" fo:text-align="center" style:justify-single-word="false"/>
      <style:text-properties style:font-name="Times New Roman" fo:font-size="14pt" fo:font-weight="bold" officeooo:paragraph-rsid="0033bc22" style:font-size-asian="14pt" style:font-weight-asian="bold" style:font-name-complex="Times New Roman1" style:font-size-complex="14pt" style:font-weight-complex="bold"/>
    </style:style>
    <style:style style:name="P15" style:family="paragraph" style:parent-style-name="List_20_Paragraph">
      <style:paragraph-properties fo:margin-left="0in" fo:text-align="center" style:justify-single-word="false"/>
      <style:text-properties style:font-name="Times New Roman" fo:font-size="14pt" fo:font-weight="bold" officeooo:rsid="005aa4d1" officeooo:paragraph-rsid="005aa4d1" style:font-size-asian="14pt" style:font-weight-asian="bold" style:font-name-complex="Times New Roman1" style:font-size-complex="14pt" style:font-weight-complex="bold"/>
    </style:style>
    <style:style style:name="P16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officeooo:paragraph-rsid="001bab08" style:font-size-asian="14pt" style:font-name-complex="Times New Roman1" style:font-size-complex="14pt"/>
    </style:style>
    <style:style style:name="P17" style:family="paragraph" style:parent-style-name="Standard">
      <style:text-properties fo:color="#000000" loext:opacity="100%" style:font-name="Cascadia Mono" fo:font-size="9.5pt" fo:language="en" fo:country="US" officeooo:rsid="004f79b3" officeooo:paragraph-rsid="004f79b3" fo:background-color="#ffffff" style:font-size-asian="9.5pt"/>
    </style:style>
    <style:style style:name="P18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P19" style:family="paragraph" style:parent-style-name="Standard">
      <style:text-properties fo:color="#000000" loext:opacity="100%" style:font-name="Cascadia Mono" fo:font-size="9.5pt" fo:language="en" fo:country="US" fo:font-weight="bold" officeooo:rsid="00543dac" officeooo:paragraph-rsid="00543dac" fo:background-color="#ffffff" style:font-size-asian="9.5pt" style:font-weight-asian="bold" style:font-weight-complex="bold"/>
    </style:style>
    <style:style style:name="P2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0pt" fo:font-style="normal" fo:font-weight="normal" officeooo:rsid="005aa4d1" officeooo:paragraph-rsid="005aa4d1" style:font-size-asian="10pt" style:font-style-asian="normal" style:font-weight-asian="normal"/>
    </style:style>
    <style:style style:name="P21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fo:font-weight="bold" officeooo:rsid="001a7dbe" officeooo:paragraph-rsid="001a7dbe" style:font-size-asian="14pt" style:font-weight-asian="bold" style:font-name-complex="Times New Roman1" style:font-size-complex="14pt" style:font-weight-complex="bold"/>
    </style:style>
    <style:style style:name="P22" style:family="paragraph" style:parent-style-name="List_20_Paragraph">
      <style:paragraph-properties fo:margin-left="0in" fo:text-align="center" style:justify-single-word="false"/>
      <style:text-properties officeooo:paragraph-rsid="001a7dbe"/>
    </style:style>
    <style:style style:name="P23" style:family="paragraph" style:parent-style-name="List_20_Paragraph">
      <style:paragraph-properties fo:margin-left="0in" fo:text-align="center" style:justify-single-word="false" fo:break-before="page"/>
      <style:text-properties style:font-name="Times New Roman" fo:font-size="14pt" fo:font-weight="bold" officeooo:rsid="003d601d" officeooo:paragraph-rsid="003d601d" style:font-size-asian="14pt" style:font-weight-asian="bold" style:font-name-complex="Times New Roman1" style:font-size-complex="14pt" style:font-weight-complex="bold"/>
    </style:style>
    <style:style style:name="P24" style:family="paragraph" style:parent-style-name="List_20_Paragraph">
      <style:paragraph-properties fo:margin-left="0in" fo:text-align="start" style:justify-single-word="false"/>
      <style:text-properties style:font-name="Times New Roman" fo:font-size="14pt" fo:language="ru" fo:country="RU" fo:font-weight="normal" officeooo:rsid="00419a16" officeooo:paragraph-rsid="004ba345" style:font-size-asian="14pt" style:font-weight-asian="normal" style:font-name-complex="Times New Roman1" style:font-size-complex="14pt" style:font-weight-complex="normal"/>
    </style:style>
    <style:style style:name="P25" style:family="paragraph" style:parent-style-name="List_20_Paragraph">
      <style:paragraph-properties fo:margin-left="0in" fo:text-align="start" style:justify-single-word="false"/>
      <style:text-properties style:font-name="Times New Roman" fo:font-size="14pt" fo:language="ru" fo:country="RU" fo:font-weight="normal" officeooo:rsid="00419a16" officeooo:paragraph-rsid="0056fa99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ru" fo:country="RU" fo:font-weight="bold" officeooo:rsid="005315d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officeooo:rsid="001a7dbe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fo:font-weight="bold" officeooo:rsid="001c65e1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80808" loext:opacity="100%" style:font-name="JetBrains Mono" fo:font-size="12pt" fo:font-style="normal" fo:font-weight="normal" style:font-size-asian="12pt" style:font-style-asian="normal" style:font-weight-asian="normal"/>
    </style:style>
    <style:style style:name="T13" style:family="text">
      <style:text-properties fo:color="#9e880d" loext:opacity="100%" style:font-name="JetBrains Mono" fo:font-size="12pt" fo:font-style="normal" fo:font-weight="normal" style:font-size-asian="12pt" style:font-style-asian="normal" style:font-weight-asian="normal"/>
    </style:style>
    <style:style style:name="T14" style:family="text">
      <style:text-properties fo:color="#067d17" loext:opacity="100%" style:font-name="JetBrains Mono" fo:font-size="12pt" fo:font-style="normal" fo:font-weight="normal" style:font-size-asian="12pt" style:font-style-asian="normal" style:font-weight-asian="normal"/>
    </style:style>
    <style:style style:name="T15" style:family="text">
      <style:text-properties fo:color="#0033b3" loext:opacity="100%" style:font-name="JetBrains Mono" fo:font-size="12pt" fo:font-style="normal" fo:font-weight="normal" style:font-size-asian="12pt" style:font-style-asian="normal" style:font-weight-asian="normal"/>
    </style:style>
    <style:style style:name="T16" style:family="text">
      <style:text-properties fo:color="#000000" loext:opacity="100%" style:font-name="JetBrains Mono" fo:font-size="12pt" fo:font-style="normal" fo:font-weight="normal" style:font-size-asian="12pt" style:font-style-asian="normal" style:font-weight-asian="normal"/>
    </style:style>
    <style:style style:name="T17" style:family="text">
      <style:text-properties fo:color="#00627a" loext:opacity="100%" style:font-name="JetBrains Mono" fo:font-size="12pt" fo:font-style="normal" fo:font-weight="normal" style:font-size-asian="12pt" style:font-style-asian="normal" style:font-weight-asian="normal"/>
    </style:style>
    <style:style style:name="T18" style:family="text">
      <style:text-properties fo:color="#8c8c8c" loext:opacity="100%" style:font-name="JetBrains Mono" fo:font-size="12pt" fo:font-style="italic" fo:font-weight="normal" style:font-size-asian="12pt" style:font-style-asian="italic" style:font-weight-asian="normal"/>
    </style:style>
    <style:style style:name="T19" style:family="text">
      <style:text-properties fo:color="#0037a6" loext:opacity="100%" style:font-name="JetBrains Mono" fo:font-size="12pt" fo:font-style="normal" fo:font-weight="normal" style:font-size-asian="12pt" style:font-style-asian="normal" style:font-weight-asian="normal"/>
    </style:style>
    <style:style style:name="T20" style:family="text">
      <style:text-properties fo:color="#1750eb" loext:opacity="100%" style:font-name="JetBrains Mono" fo:font-size="12pt" fo:font-style="normal" fo:font-weight="normal" style:font-size-asian="12pt" style:font-style-asian="normal" style:font-weight-asian="normal"/>
    </style:style>
    <style:style style:name="T21" style:family="text">
      <style:text-properties fo:color="#871094" loext:opacity="100%" style:font-name="JetBrains Mono" fo:font-size="12pt" fo:font-style="normal" fo:font-weight="normal" style:font-size-asian="12pt" style:font-style-asian="normal" style:font-weight-asian="normal"/>
    </style:style>
    <style:style style:name="T22" style:family="text">
      <style:text-properties fo:color="#808080" loext:opacity="100%" style:font-name="JetBrains Mono" fo:font-size="12pt" fo:font-style="normal" fo:font-weight="normal" style:font-size-asian="12pt" style:font-style-asian="normal" style:font-weight-asian="normal"/>
    </style:style>
    <style:style style:name="T23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font-variant="normal" fo:text-transform="none" fo:color="#222222" loext:opacity="100%" fo:font-family="'times new roman', serif" fo:letter-spacing="normal" fo:font-style="normal" fo:font-weight="normal" officeooo:rsid="0056fa99"/>
    </style:style>
    <style:style style:name="T25" style:family="text">
      <style:text-properties fo:font-variant="normal" fo:text-transform="none" fo:color="#222222" loext:opacity="100%" fo:font-family="'times new roman', serif" fo:letter-spacing="normal" fo:font-style="normal" fo:font-weight="normal"/>
    </style:style>
    <style:style style:name="T26" style:family="text">
      <style:text-properties fo:font-variant="normal" fo:text-transform="none" fo:color="#222222" loext:opacity="100%" fo:font-family="'times new roman', serif" fo:letter-spacing="normal" fo:font-style="normal" fo:font-weight="normal" officeooo:rsid="0058d4c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217066912"/><text:span text:style-name="T1">Министерство науки и высшего образования Российской Федерации</text:span><text:span text:style-name="T1"/></text:p>
      <text:p text:style-name="P1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1" loext:marker-style-name="T1"><text:span text:style-name="T1">«Пермский национальный исследовательский политехнический университет»</text:span><text:span text:style-name="T1"/></text:p>
      <text:p text:style-name="P2" loext:marker-style-name="T2"/>
      <text:p text:style-name="P1" loext:marker-style-name="T2"><text:span text:style-name="T2">Электротехнический факультет</text:span><text:span text:style-name="T2"/></text:p>
      <text:p text:style-name="Standard" loext:marker-style-name="T3"><text:span text:style-name="T2">Выпускающая кафедра: </text:span><text:span text:style-name="T3">информационные технологии и автоматизированные системы (ИТАС)</text:span></text:p>
      <text:p text:style-name="Standard" loext:marker-style-name="T3"><text:span text:style-name="T2">Направление подготовки: </text:span><text:span text:style-name="T3">09.03.04 Программная инженерия</text:span></text:p>
      <text:p text:style-name="P3" loext:marker-style-name="T2"/>
      <text:p text:style-name="P4" loext:marker-style-name="T1"/>
      <text:p text:style-name="P1" loext:marker-style-name="T1"><text:span text:style-name="T1">ОТЧЕТ</text:span><text:span text:style-name="T1"/></text:p>
      <text:p text:style-name="P1" loext:marker-style-name="T4"><text:span text:style-name="T1">Лабораторная работа</text:span></text:p>
      <text:p text:style-name="P1" loext:marker-style-name="T1"><text:span text:style-name="T1">«</text:span><text:span text:style-name="T5">Шаблоны классов</text:span><text:span text:style-name="T1">»</text:span></text:p>
      <text:p text:style-name="P1" loext:marker-style-name="T1"><text:span text:style-name="T1">По дисциплине «Основы алгоритмизации и программирования»</text:span><text:span text:style-name="T1"/></text:p>
      <text:p text:style-name="P5" loext:marker-style-name="T6"/>
      <text:p text:style-name="P2" loext:marker-style-name="T2"/>
      <text:p text:style-name="P2" loext:marker-style-name="T2"/>
      <text:p text:style-name="P2" loext:marker-style-name="T2"/>
      <text:p text:style-name="P6" loext:marker-style-name="T2"><text:span text:style-name="T2">Выполнил студент группы РИС-25-2б</text:span><text:span text:style-name="T2"/></text:p>
      <text:p text:style-name="P7" loext:marker-style-name="T2"><text:span text:style-name="T2">Фокин Алексей Дмитриевич</text:span></text:p>
      <text:p text:style-name="P6" loext:marker-style-name="T2"><text:span text:style-name="T2">Принял: Доц. Полякова О.А.</text:span><text:span text:style-name="T2"/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1" loext:marker-style-name="T7"><text:span text:style-name="T2">Пермь 202</text:span><text:span text:style-name="T8">6</text:span></text:p>
      <text:p text:style-name="P8" loext:marker-style-name="T9"><text:span text:style-name="T1">Постановка задачи</text:span><text:span text:style-name="T9">:</text:span></text:p>
      <text:list text:style-name="L1">
        <text:list-item>
          <text:p text:style-name="P9">Определить шаблон класса-контейнера (см. лабораторную работу №6).</text:p>
        </text:list-item>
        <text:list-item>
          <text:p text:style-name="P9">Реализовать конструкторы, деструктор, операции ввода-вывода, операцию присваивания.</text:p>
        </text:list-item>
        <text:list-item>
          <text:p text:style-name="P9">Перегрузить операции, указанные в варианте.</text:p>
        </text:list-item>
        <text:list-item>
          <text:p text:style-name="P9">Инстанцировать шаблон для стандартных типов данных (int, float, double).</text:p>
        </text:list-item>
        <text:list-item>
          <text:p text:style-name="P9">Написать тестирующую программу, иллюстрирующую выполнение операций для</text:p>
          <text:p text:style-name="P9">контейнера, содержащего элементы стандартных типов данных.</text:p>
        </text:list-item>
        <text:list-item>
          <text:p text:style-name="P9">Реализовать пользовательский класс (см. лабораторную работу №3).</text:p>
        </text:list-item>
        <text:list-item>
          <text:p text:style-name="P9">Перегрузить для пользовательского класса операции ввода-вывода.</text:p>
        </text:list-item>
        <text:list-item>
          <text:p text:style-name="P9">Перегрузить операции необходимые для выполнения операций контейнерного класса.</text:p>
        </text:list-item>
        <text:list-item>
          <text:p text:style-name="P9">Инстанцировать шаблон для пользовательского класса.</text:p>
        </text:list-item>
        <text:list-item>
          <text:p text:style-name="P9">Написать тестирующую программу, иллюстрирующую выполнение операций для контейнера, содержащего элементы пользовательского класса.</text:p>
        </text:list-item>
      </text:list>
      <text:p text:style-name="P10"/>
      <text:p text:style-name="P10"><draw:frame draw:style-name="fr1" draw:name="Image1" text:anchor-type="char" svg:width="6.4965in" svg:height="1.848in" draw:z-index="2"><draw:image xlink:href="Pictures/100000000000049D00000150519BE2F0.png" xlink:type="simple" xlink:show="embed" xlink:actuate="onLoad" draw:mime-type="image/png"/></draw:frame></text:p>
      <text:p text:style-name="P11" loext:marker-style-name="T9"><text:span text:style-name="T1">Анализ задачи</text:span><text:span text:style-name="T9">:</text:span></text:p>
      <text:list text:style-name="WWNum25">
        <text:list-item>
          <text:p text:style-name="P12">Реализуем класс Pair по подобию предыдущих лабораторных работ, чтобы хранить его в списке</text:p>
        </text:list-item>
        <text:list-item>
          <text:p text:style-name="P12">Реализум класс Список, содержащий Узлы. Как список, так и его узлы — шаблоны классов. Методы списка описываем в том же файле: конструкторы, деструктор, оператор присвоения, оператор получения значения по индексу, оператор умножения списка на список (определено вариантом), оператор получения размера, а также дружественные операторы ввода-вывода iostream</text:p>
        </text:list-item>
        <text:list-item>
          <text:p text:style-name="P12">В главной функции проверяем работу Списка как контейнера для объектов класса Пара</text:p>
        </text:list-item>
      </text:list>
      <text:p text:style-name="P13">UML</text:p>
      <text:p text:style-name="P14" loext:marker-style-name="T1"><draw:frame draw:style-name="fr2" draw:name="Изображение1" text:anchor-type="as-char" svg:y="-2.5866in" svg:width="5.7339in" svg:height="5.3992in" draw:z-index="0"><draw:image xlink:href="Pictures/1000000100000B68000008F8E2382CC0.png" xlink:type="simple" xlink:show="embed" xlink:actuate="onLoad" draw:mime-type="image/png"/></draw:frame></text:p>
      <text:p text:style-name="P15" loext:marker-style-name="T1">Node содержится в List и не может существовать автономно</text:p>
      <text:p text:style-name="P15" loext:marker-style-name="T1">Pair может содержаться в Node, но может также существовать автономно</text:p>
      <text:p text:style-name="P16" loext:marker-style-name="T1"><text:span text:style-name="T10">К</text:span><text:span text:style-name="T11">од</text:span></text:p>
      <text:p text:style-name="P17">main.cpp</text:p>
      <text:p text:style-name="P18" loext:marker-style-name="T12"><text:span text:style-name="T13">#include </text:span><text:span text:style-name="T14">&lt;iostream&gt;<text:line-break/></text:span><text:span text:style-name="T13">#include </text:span><text:span text:style-name="T14">"List.h"<text:line-break/></text:span><text:span text:style-name="T13">#include </text:span><text:span text:style-name="T14">"Pair.h"<text:line-break/><text:line-break/></text:span><text:span text:style-name="T15">using namespace </text:span><text:span text:style-name="T16">std</text:span><text:span text:style-name="T12">;<text:line-break/><text:line-break/></text:span><text:span text:style-name="T15">int </text:span><text:span text:style-name="T17">main</text:span><text:span text:style-name="T12">()<text:line-break/>{<text:line-break/> <text:s text:c="3"/></text:span><text:span text:style-name="T18">/*<text:line-break/> <text:s text:c="3"/>Same tests as in Lab 6. Commented due to simplicity<text:line-break/><text:line-break/> <text:s text:c="3"/>List&lt;int&gt; a(5, 0);<text:line-break/> <text:s text:c="3"/>cout &lt;&lt; a &lt;&lt; "\n";<text:line-break/> <text:s text:c="3"/>cin &gt;&gt; a;<text:line-break/> <text:s text:c="3"/>cout &lt;&lt; a &lt;&lt; "\n";<text:line-break/> <text:s text:c="3"/>a[2] = 40;<text:line-break/> <text:s text:c="3"/>cout &lt;&lt; a &lt;&lt; "\n";<text:line-break/> <text:s text:c="3"/>List&lt;int&gt; b(10);<text:line-break/> <text:s text:c="3"/>b = a;<text:line-break/> <text:s text:c="3"/>cout &lt;&lt; b &lt;&lt; "\n";<text:line-break/> <text:s text:c="3"/>List&lt;int&gt; c(10);<text:line-break/> <text:s text:c="3"/>c = b * b;<text:line-break/> <text:s text:c="3"/>cout &lt;&lt; c &lt;&lt; "\n";<text:line-break/> <text:s text:c="3"/>cout &lt;&lt; "Size of c: " &lt;&lt; c() &lt;&lt; endl;*/<text:line-break/><text:line-break/> <text:s text:c="3"/></text:span><text:span text:style-name="T16">Pair p</text:span><text:span text:style-name="T12">;<text:line-break/><text:tab/></text:span><text:span text:style-name="T16">cin </text:span><text:span text:style-name="T17">&gt;&gt; </text:span><text:span text:style-name="T16">p</text:span><text:span text:style-name="T12">; </text:span><text:span text:style-name="T18">//Initializing a Pair<text:line-break/><text:tab/></text:span><text:span text:style-name="T16">cout </text:span><text:span text:style-name="T17">&lt;&lt; </text:span><text:span text:style-name="T16">p </text:span><text:span text:style-name="T17">&lt;&lt; </text:span><text:span text:style-name="T14">"</text:span><text:span text:style-name="T19">\n</text:span><text:span text:style-name="T14">"</text:span><text:span text:style-name="T12">;<text:line-break/> <text:s text:c="3"/></text:span><text:span text:style-name="T16">List</text:span><text:span text:style-name="T12">&lt;</text:span><text:span text:style-name="T16">Pair</text:span><text:span text:style-name="T12">&gt; </text:span><text:span text:style-name="T16">a</text:span><text:span text:style-name="T17">(</text:span><text:span text:style-name="T20">5</text:span><text:span text:style-name="T12">, </text:span><text:span text:style-name="T16">p</text:span><text:span text:style-name="T17">)</text:span><text:span text:style-name="T12">; </text:span><text:span text:style-name="T18">//Filling a List with said Pair<text:line-break/><text:tab/></text:span><text:span text:style-name="T16">cout </text:span><text:span text:style-name="T17">&lt;&lt; </text:span><text:span text:style-name="T16">a </text:span><text:span text:style-name="T17">&lt;&lt; </text:span><text:span text:style-name="T14">"</text:span><text:span text:style-name="T19">\n</text:span><text:span text:style-name="T14">"</text:span><text:span text:style-name="T12">; </text:span><text:span text:style-name="T18">//Printing a list<text:line-break/><text:tab/></text:span><text:span text:style-name="T16">cin </text:span><text:span text:style-name="T17">&gt;&gt; </text:span><text:span text:style-name="T16">a</text:span><text:span text:style-name="T12">; </text:span><text:span text:style-name="T18">//Filling a list from console<text:line-break/><text:tab/></text:span><text:span text:style-name="T16">cout </text:span><text:span text:style-name="T17">&lt;&lt; </text:span><text:span text:style-name="T16">a </text:span><text:span text:style-name="T17">&lt;&lt; </text:span><text:span text:style-name="T14">"</text:span><text:span text:style-name="T19">\n</text:span><text:span text:style-name="T14">"</text:span><text:span text:style-name="T12">; </text:span><text:span text:style-name="T18">//Printing a list<text:line-break/><text:line-break/><text:tab/></text:span><text:span text:style-name="T16">List</text:span><text:span text:style-name="T12">&lt;</text:span><text:span text:style-name="T16">Pair</text:span><text:span text:style-name="T12">&gt; </text:span><text:span text:style-name="T16">b</text:span><text:span text:style-name="T17">(</text:span><text:span text:style-name="T20">10</text:span><text:span text:style-name="T17">)</text:span><text:span text:style-name="T12">; </text:span><text:span text:style-name="T18">//Initializing a list of ten default elements<text:line-break/><text:tab/></text:span><text:span text:style-name="T16">b </text:span><text:span text:style-name="T17">= </text:span><text:span text:style-name="T16">a</text:span><text:span text:style-name="T12">; </text:span><text:span text:style-name="T18">//assigning a to b<text:line-break/><text:tab/></text:span><text:span text:style-name="T16">cout </text:span><text:span text:style-name="T17">&lt;&lt; </text:span><text:span text:style-name="T16">b </text:span><text:span text:style-name="T17">&lt;&lt; </text:span><text:span text:style-name="T14">"</text:span><text:span text:style-name="T19">\n</text:span><text:span text:style-name="T14">"</text:span><text:span text:style-name="T12">; </text:span><text:span text:style-name="T18">//Printing a list<text:line-break/></text:span><text:soft-page-break/><text:span text:style-name="T18"><text:tab/></text:span><text:span text:style-name="T16">cout </text:span><text:span text:style-name="T17">&lt;&lt; </text:span><text:span text:style-name="T16">b</text:span><text:span text:style-name="T17">[</text:span><text:span text:style-name="T20">3</text:span><text:span text:style-name="T17">] &lt;&lt; </text:span><text:span text:style-name="T14">"</text:span><text:span text:style-name="T19">\n</text:span><text:span text:style-name="T14">"</text:span><text:span text:style-name="T12">; </text:span><text:span text:style-name="T18">//Printing an element by index<text:line-break/><text:tab/></text:span><text:span text:style-name="T16">cout </text:span><text:span text:style-name="T17">&lt;&lt; </text:span><text:span text:style-name="T14">"Size of b: " </text:span><text:span text:style-name="T17">&lt;&lt; </text:span><text:span text:style-name="T16">b</text:span><text:span text:style-name="T12">() </text:span><text:span text:style-name="T17">&lt;&lt; endl</text:span><text:span text:style-name="T12">; </text:span><text:span text:style-name="T18">//Printing size<text:line-break/><text:line-break/> <text:s text:c="3"/></text:span><text:span text:style-name="T16">b </text:span><text:span text:style-name="T17">= </text:span><text:span text:style-name="T16">a </text:span><text:span text:style-name="T17">* </text:span><text:span text:style-name="T16">a</text:span><text:span text:style-name="T12">; </text:span><text:span text:style-name="T18">// Making elements of b equal to elements of a squared<text:line-break/><text:tab/></text:span><text:span text:style-name="T16">cout </text:span><text:span text:style-name="T17">&lt;&lt; </text:span><text:span text:style-name="T16">b </text:span><text:span text:style-name="T17">&lt;&lt; </text:span><text:span text:style-name="T14">"</text:span><text:span text:style-name="T19">\n</text:span><text:span text:style-name="T14">"</text:span><text:span text:style-name="T12">;<text:line-break/>}</text:span></text:p>
      <text:p text:style-name="P19">List.h</text:p>
      <text:p text:style-name="P18" loext:marker-style-name="T12"><text:span text:style-name="T13">#pragma </text:span><text:span text:style-name="T15">once<text:line-break/></text:span><text:span text:style-name="T13">#include </text:span><text:span text:style-name="T14">&lt;iostream&gt;<text:line-break/></text:span><text:span text:style-name="T18">//Forward declaration to ensure friend methods work properly<text:line-break/></text:span><text:span text:style-name="T15">template </text:span><text:span text:style-name="T12">&lt;</text:span><text:span text:style-name="T15">class </text:span><text:span text:style-name="T16">T</text:span><text:span text:style-name="T12">&gt;<text:line-break/></text:span><text:span text:style-name="T15">class </text:span><text:span text:style-name="T16">List</text:span><text:span text:style-name="T12">;<text:line-break/></text:span><text:span text:style-name="T18">//forward declarations of said methods<text:line-break/></text:span><text:span text:style-name="T15">template </text:span><text:span text:style-name="T12">&lt;</text:span><text:span text:style-name="T15">class </text:span><text:span text:style-name="T16">T</text:span><text:span text:style-name="T12">&gt;<text:line-break/></text:span><text:span text:style-name="T16">std</text:span><text:span text:style-name="T12">::</text:span><text:span text:style-name="T16">ostream</text:span><text:span text:style-name="T12">&amp; </text:span><text:span text:style-name="T15">operator</text:span><text:span text:style-name="T12">&lt;&lt;(</text:span><text:span text:style-name="T16">std</text:span><text:span text:style-name="T12">::</text:span><text:span text:style-name="T16">ostream</text:span><text:span text:style-name="T12">&amp;, </text:span><text:span text:style-name="T15">const </text:span><text:span text:style-name="T16">List</text:span><text:span text:style-name="T12">&lt;</text:span><text:span text:style-name="T16">T</text:span><text:span text:style-name="T12">&gt;&amp;);<text:line-break/></text:span><text:span text:style-name="T15">template </text:span><text:span text:style-name="T12">&lt;</text:span><text:span text:style-name="T15">class </text:span><text:span text:style-name="T16">T</text:span><text:span text:style-name="T12">&gt;<text:line-break/></text:span><text:span text:style-name="T16">std</text:span><text:span text:style-name="T12">::</text:span><text:span text:style-name="T16">istream</text:span><text:span text:style-name="T12">&amp; </text:span><text:span text:style-name="T15">operator</text:span><text:span text:style-name="T12">&gt;&gt;(</text:span><text:span text:style-name="T16">std</text:span><text:span text:style-name="T12">::</text:span><text:span text:style-name="T16">istream</text:span><text:span text:style-name="T12">&amp;, </text:span><text:span text:style-name="T16">List</text:span><text:span text:style-name="T12">&lt;</text:span><text:span text:style-name="T16">T</text:span><text:span text:style-name="T12">&gt;&amp;);<text:line-break/><text:line-break/></text:span><text:span text:style-name="T18">//Declaration of Node and List (Except for template usage)<text:line-break/>//everything else behaves similiar to Lab 6<text:line-break/>//And iterators are abscent<text:line-break/></text:span><text:span text:style-name="T15">template </text:span><text:span text:style-name="T12">&lt;</text:span><text:span text:style-name="T15">class </text:span><text:span text:style-name="T16">T</text:span><text:span text:style-name="T12">&gt;<text:line-break/></text:span><text:span text:style-name="T15">struct </text:span><text:span text:style-name="T16">Node </text:span><text:span text:style-name="T12">{<text:line-break/><text:tab/></text:span><text:span text:style-name="T16">T </text:span><text:span text:style-name="T21">data</text:span><text:span text:style-name="T12">;<text:line-break/><text:tab/></text:span><text:span text:style-name="T16">Node</text:span><text:span text:style-name="T22">&lt;T&gt;</text:span><text:span text:style-name="T12">* </text:span><text:span text:style-name="T21">next</text:span><text:span text:style-name="T12">;<text:line-break/><text:tab/></text:span><text:span text:style-name="T16">Node</text:span><text:span text:style-name="T22">&lt;T&gt;</text:span><text:span text:style-name="T12">* </text:span><text:span text:style-name="T21">prev</text:span><text:span text:style-name="T12">;<text:line-break/><text:line-break/><text:tab/></text:span><text:span text:style-name="T17">Node</text:span><text:span text:style-name="T12">(</text:span><text:span text:style-name="T16">T i</text:span><text:span text:style-name="T12">) : </text:span><text:span text:style-name="T21">data</text:span><text:span text:style-name="T12">(</text:span><text:span text:style-name="T16">i</text:span><text:span text:style-name="T12">), </text:span><text:span text:style-name="T21">next</text:span><text:span text:style-name="T12">(</text:span><text:span text:style-name="T15">nullptr</text:span><text:span text:style-name="T12">), </text:span><text:span text:style-name="T21">prev</text:span><text:span text:style-name="T12">(</text:span><text:span text:style-name="T15">nullptr</text:span><text:span text:style-name="T12">) {}<text:line-break/><text:tab/></text:span><text:span text:style-name="T17">Node</text:span><text:span text:style-name="T12">() : </text:span><text:span text:style-name="T21">data</text:span><text:span text:style-name="T12">(</text:span><text:span text:style-name="T16">T</text:span><text:span text:style-name="T12">()), </text:span><text:span text:style-name="T21">next</text:span><text:span text:style-name="T12">(</text:span><text:span text:style-name="T15">nullptr</text:span><text:span text:style-name="T12">), </text:span><text:span text:style-name="T21">prev</text:span><text:span text:style-name="T12">(</text:span><text:span text:style-name="T15">nullptr</text:span><text:span text:style-name="T12">) {}<text:line-break/><text:tab/></text:span><text:span text:style-name="T17">Node</text:span><text:span text:style-name="T12">(</text:span><text:span text:style-name="T16">T i</text:span><text:span text:style-name="T12">, </text:span><text:span text:style-name="T16">Node</text:span><text:span text:style-name="T22">&lt;T&gt;</text:span><text:span text:style-name="T12">* </text:span><text:span text:style-name="T16">first</text:span><text:span text:style-name="T12">, </text:span><text:span text:style-name="T16">Node</text:span><text:span text:style-name="T22">&lt;T&gt;</text:span><text:span text:style-name="T12">* </text:span><text:span text:style-name="T16">second</text:span><text:span text:style-name="T12">) : </text:span><text:span text:style-name="T21">data</text:span><text:span text:style-name="T12">(</text:span><text:span text:style-name="T16">i</text:span><text:span text:style-name="T12">), </text:span><text:span text:style-name="T21">next</text:span><text:span text:style-name="T12">(</text:span><text:span text:style-name="T16">first</text:span><text:span text:style-name="T12">), </text:span><text:span text:style-name="T21">prev</text:span><text:span text:style-name="T12">(</text:span><text:span text:style-name="T16">second</text:span><text:span text:style-name="T12">) {}<text:line-break/><text:line-break/><text:tab/></text:span><text:span text:style-name="T15">friend </text:span><text:span text:style-name="T16">std</text:span><text:span text:style-name="T12">::</text:span><text:span text:style-name="T16">ostream</text:span><text:span text:style-name="T12">&amp; </text:span><text:span text:style-name="T15">operator</text:span><text:span text:style-name="T12">&lt;&lt;(</text:span><text:span text:style-name="T16">std</text:span><text:span text:style-name="T12">::</text:span><text:span text:style-name="T16">ostream</text:span><text:span text:style-name="T12">&amp; </text:span><text:span text:style-name="T16">out</text:span><text:span text:style-name="T12">, </text:span><text:span text:style-name="T15">const </text:span><text:span text:style-name="T16">Node</text:span><text:span text:style-name="T22">&lt;T&gt;</text:span><text:span text:style-name="T12">&amp; </text:span><text:span text:style-name="T16">l</text:span><text:span text:style-name="T12">);<text:line-break/>};<text:line-break/></text:span><text:span text:style-name="T15">template </text:span><text:span text:style-name="T12">&lt;</text:span><text:span text:style-name="T15">class </text:span><text:span text:style-name="T16">T</text:span><text:span text:style-name="T12">&gt;<text:line-break/></text:span><text:span text:style-name="T15">class </text:span><text:span text:style-name="T16">List </text:span><text:span text:style-name="T12">{<text:line-break/></text:span><text:span text:style-name="T22">private:<text:line-break/></text:span><text:soft-page-break/><text:span text:style-name="T22"><text:tab/></text:span><text:span text:style-name="T15">int </text:span><text:span text:style-name="T21">size</text:span><text:span text:style-name="T12">;<text:line-break/><text:tab/></text:span><text:span text:style-name="T16">Node</text:span><text:span text:style-name="T12">&lt;</text:span><text:span text:style-name="T16">T</text:span><text:span text:style-name="T12">&gt;* </text:span><text:span text:style-name="T21">head</text:span><text:span text:style-name="T12">;<text:line-break/><text:tab/></text:span><text:span text:style-name="T16">Node</text:span><text:span text:style-name="T12">&lt;</text:span><text:span text:style-name="T16">T</text:span><text:span text:style-name="T12">&gt;* </text:span><text:span text:style-name="T21">tail</text:span><text:span text:style-name="T12">;<text:line-break/></text:span><text:span text:style-name="T15">public</text:span><text:span text:style-name="T12">:<text:line-break/><text:tab/></text:span><text:span text:style-name="T17">List</text:span><text:span text:style-name="T12">(</text:span><text:span text:style-name="T15">int </text:span><text:span text:style-name="T16">s</text:span><text:span text:style-name="T12">, </text:span><text:span text:style-name="T16">T k </text:span><text:span text:style-name="T12">= </text:span><text:span text:style-name="T16">T</text:span><text:span text:style-name="T12">());<text:line-break/><text:tab/></text:span><text:span text:style-name="T17">List</text:span><text:span text:style-name="T12">(</text:span><text:span text:style-name="T15">const </text:span><text:span text:style-name="T16">List</text:span><text:span text:style-name="T22">&lt;T&gt;</text:span><text:span text:style-name="T12">&amp; </text:span><text:span text:style-name="T16">l</text:span><text:span text:style-name="T12">);<text:line-break/><text:tab/></text:span><text:span text:style-name="T17">~List</text:span><text:span text:style-name="T12">();<text:line-break/><text:line-break/><text:tab/></text:span><text:span text:style-name="T16">List</text:span><text:span text:style-name="T22">&lt;T&gt;</text:span><text:span text:style-name="T12">&amp; </text:span><text:span text:style-name="T15">operator</text:span><text:span text:style-name="T12">=(</text:span><text:span text:style-name="T15">const </text:span><text:span text:style-name="T16">List</text:span><text:span text:style-name="T22">&lt;T&gt;</text:span><text:span text:style-name="T12">&amp; </text:span><text:span text:style-name="T16">l</text:span><text:span text:style-name="T12">);<text:line-break/><text:tab/></text:span><text:span text:style-name="T16">T</text:span><text:span text:style-name="T12">&amp; </text:span><text:span text:style-name="T15">operator</text:span><text:span text:style-name="T12">[](</text:span><text:span text:style-name="T15">int </text:span><text:span text:style-name="T16">index</text:span><text:span text:style-name="T12">);<text:line-break/><text:tab/></text:span><text:span text:style-name="T16">List</text:span><text:span text:style-name="T22">&lt;T&gt; </text:span><text:span text:style-name="T15">operator</text:span><text:span text:style-name="T12">*(</text:span><text:span text:style-name="T15">const </text:span><text:span text:style-name="T16">List</text:span><text:span text:style-name="T22">&lt;T&gt;</text:span><text:span text:style-name="T12">&amp; </text:span><text:span text:style-name="T16">l</text:span><text:span text:style-name="T12">);<text:line-break/><text:tab/></text:span><text:span text:style-name="T18">//+n?<text:line-break/><text:tab/></text:span><text:span text:style-name="T15">int operator</text:span><text:span text:style-name="T12">() ();<text:line-break/><text:line-break/><text:tab/></text:span><text:span text:style-name="T15">friend </text:span><text:span text:style-name="T16">std</text:span><text:span text:style-name="T12">::</text:span><text:span text:style-name="T16">ostream</text:span><text:span text:style-name="T12">&amp; </text:span><text:span text:style-name="T15">operator</text:span><text:span text:style-name="T12">&lt;&lt; &lt;&gt;(</text:span><text:span text:style-name="T16">std</text:span><text:span text:style-name="T12">::</text:span><text:span text:style-name="T16">ostream</text:span><text:span text:style-name="T12">&amp; </text:span><text:span text:style-name="T16">out</text:span><text:span text:style-name="T12">, </text:span><text:span text:style-name="T15">const </text:span><text:span text:style-name="T16">List</text:span><text:span text:style-name="T22">&lt;T&gt;</text:span><text:span text:style-name="T12">&amp; </text:span><text:span text:style-name="T16">l</text:span><text:span text:style-name="T12">);<text:line-break/><text:tab/></text:span><text:span text:style-name="T15">friend </text:span><text:span text:style-name="T16">std</text:span><text:span text:style-name="T12">::</text:span><text:span text:style-name="T16">istream</text:span><text:span text:style-name="T12">&amp; </text:span><text:span text:style-name="T15">operator</text:span><text:span text:style-name="T12">&gt;&gt; &lt;&gt;(</text:span><text:span text:style-name="T16">std</text:span><text:span text:style-name="T12">::</text:span><text:span text:style-name="T16">istream</text:span><text:span text:style-name="T12">&amp; </text:span><text:span text:style-name="T16">in</text:span><text:span text:style-name="T12">, </text:span><text:span text:style-name="T16">List</text:span><text:span text:style-name="T22">&lt;T&gt;</text:span><text:span text:style-name="T12">&amp; </text:span><text:span text:style-name="T16">l</text:span><text:span text:style-name="T12">);<text:line-break/>};<text:line-break/><text:line-break/></text:span><text:span text:style-name="T18">//Realization of methods now sits in .h file due to template-specific behavior<text:line-break/></text:span><text:span text:style-name="T15">template </text:span><text:span text:style-name="T12">&lt;</text:span><text:span text:style-name="T15">class </text:span><text:span text:style-name="T16">T</text:span><text:span text:style-name="T12">&gt;<text:line-break/></text:span><text:span text:style-name="T16">std</text:span><text:span text:style-name="T12">::</text:span><text:span text:style-name="T16">ostream</text:span><text:span text:style-name="T12">&amp; </text:span><text:span text:style-name="T15">operator</text:span><text:span text:style-name="T12">&lt;&lt;(</text:span><text:span text:style-name="T16">std</text:span><text:span text:style-name="T12">::</text:span><text:span text:style-name="T16">ostream</text:span><text:span text:style-name="T12">&amp; </text:span><text:span text:style-name="T16">out</text:span><text:span text:style-name="T12">, </text:span><text:span text:style-name="T15">const </text:span><text:span text:style-name="T16">Node</text:span><text:span text:style-name="T12">&lt;</text:span><text:span text:style-name="T16">T</text:span><text:span text:style-name="T12">&gt;&amp; </text:span><text:span text:style-name="T16">l</text:span><text:span text:style-name="T12">) {<text:line-break/><text:tab/></text:span><text:span text:style-name="T16">out </text:span><text:span text:style-name="T12">&lt;&lt; </text:span><text:span text:style-name="T16">l</text:span><text:span text:style-name="T12">.</text:span><text:span text:style-name="T16">data</text:span><text:span text:style-name="T12">;<text:line-break/><text:tab/></text:span><text:span text:style-name="T15">return </text:span><text:span text:style-name="T16">out</text:span><text:span text:style-name="T12">;<text:line-break/>}<text:line-break/></text:span><text:span text:style-name="T15">template </text:span><text:span text:style-name="T12">&lt;</text:span><text:span text:style-name="T15">class </text:span><text:span text:style-name="T16">T</text:span><text:span text:style-name="T12">&gt;<text:line-break/></text:span><text:span text:style-name="T16">List</text:span><text:span text:style-name="T12">&lt;</text:span><text:span text:style-name="T16">T</text:span><text:span text:style-name="T12">&gt;::</text:span><text:span text:style-name="T17">List</text:span><text:span text:style-name="T12">(</text:span><text:span text:style-name="T15">int </text:span><text:span text:style-name="T16">s</text:span><text:span text:style-name="T12">, </text:span><text:span text:style-name="T16">T k</text:span><text:span text:style-name="T12">) {<text:line-break/><text:tab/></text:span><text:span text:style-name="T21">size </text:span><text:span text:style-name="T12">= </text:span><text:span text:style-name="T16">s</text:span><text:span text:style-name="T12">;<text:line-break/><text:tab/></text:span><text:span text:style-name="T15">if </text:span><text:span text:style-name="T12">(</text:span><text:span text:style-name="T21">size </text:span><text:span text:style-name="T12">== </text:span><text:span text:style-name="T20">0</text:span><text:span text:style-name="T12">) {<text:line-break/><text:tab/><text:tab/></text:span><text:span text:style-name="T21">head </text:span><text:span text:style-name="T12">= </text:span><text:span text:style-name="T15">nullptr</text:span><text:span text:style-name="T12">;<text:line-break/><text:tab/><text:tab/></text:span><text:span text:style-name="T21">tail </text:span><text:span text:style-name="T12">= </text:span><text:span text:style-name="T15">nullptr</text:span><text:span text:style-name="T12">;<text:line-break/><text:tab/>}<text:line-break/><text:tab/></text:span><text:span text:style-name="T15">else </text:span><text:span text:style-name="T12">{<text:line-break/><text:tab/><text:tab/></text:span><text:span text:style-name="T16">Node</text:span><text:span text:style-name="T12">&lt;</text:span><text:span text:style-name="T16">T</text:span><text:span text:style-name="T12">&gt;* </text:span><text:span text:style-name="T16">newNode </text:span><text:span text:style-name="T12">= </text:span><text:span text:style-name="T15">new </text:span><text:span text:style-name="T16">Node</text:span><text:span text:style-name="T12">&lt;</text:span><text:span text:style-name="T16">T</text:span><text:span text:style-name="T12">&gt;(</text:span><text:span text:style-name="T16">k</text:span><text:span text:style-name="T12">, </text:span><text:span text:style-name="T15">nullptr</text:span><text:span text:style-name="T12">, </text:span><text:span text:style-name="T15">nullptr</text:span><text:span text:style-name="T12">);<text:line-break/><text:tab/><text:tab/></text:span><text:span text:style-name="T21">head </text:span><text:span text:style-name="T12">= </text:span><text:span text:style-name="T16">newNode</text:span><text:span text:style-name="T12">;<text:line-break/><text:tab/><text:tab/></text:span><text:span text:style-name="T21">tail </text:span><text:span text:style-name="T12">= </text:span><text:span text:style-name="T16">newNode</text:span><text:span text:style-name="T12">;<text:line-break/><text:tab/><text:tab/></text:span><text:span text:style-name="T15">for </text:span><text:span text:style-name="T12">(</text:span><text:span text:style-name="T15">int </text:span><text:span text:style-name="T16">i </text:span><text:span text:style-name="T12">= </text:span><text:span text:style-name="T20">1</text:span><text:span text:style-name="T12">; </text:span><text:span text:style-name="T16">i </text:span><text:span text:style-name="T12">&lt; </text:span><text:span text:style-name="T21">size</text:span><text:span text:style-name="T12">; </text:span><text:span text:style-name="T16">i</text:span><text:span text:style-name="T12">++) {<text:line-break/></text:span><text:soft-page-break/><text:span text:style-name="T12"><text:tab/><text:tab/><text:tab/></text:span><text:span text:style-name="T16">Node</text:span><text:span text:style-name="T12">&lt;</text:span><text:span text:style-name="T16">T</text:span><text:span text:style-name="T12">&gt;* </text:span><text:span text:style-name="T16">newNode </text:span><text:span text:style-name="T12">= </text:span><text:span text:style-name="T15">new </text:span><text:span text:style-name="T16">Node</text:span><text:span text:style-name="T12">&lt;</text:span><text:span text:style-name="T16">T</text:span><text:span text:style-name="T12">&gt;(</text:span><text:span text:style-name="T16">k</text:span><text:span text:style-name="T12">, </text:span><text:span text:style-name="T15">nullptr</text:span><text:span text:style-name="T12">, </text:span><text:span text:style-name="T21">tail</text:span><text:span text:style-name="T12">);<text:line-break/><text:tab/><text:tab/><text:tab/></text:span><text:span text:style-name="T21">tail</text:span><text:span text:style-name="T12">-&gt;</text:span><text:span text:style-name="T16">next </text:span><text:span text:style-name="T12">= </text:span><text:span text:style-name="T16">newNode</text:span><text:span text:style-name="T12">;<text:line-break/><text:tab/><text:tab/><text:tab/></text:span><text:span text:style-name="T21">tail </text:span><text:span text:style-name="T12">= </text:span><text:span text:style-name="T16">newNode</text:span><text:span text:style-name="T12">;<text:line-break/><text:tab/><text:tab/>}<text:line-break/><text:tab/>}<text:line-break/>}<text:line-break/></text:span><text:span text:style-name="T15">template </text:span><text:span text:style-name="T12">&lt;</text:span><text:span text:style-name="T15">class </text:span><text:span text:style-name="T16">T</text:span><text:span text:style-name="T12">&gt;<text:line-break/></text:span><text:span text:style-name="T16">List</text:span><text:span text:style-name="T12">&lt;</text:span><text:span text:style-name="T16">T</text:span><text:span text:style-name="T12">&gt;::</text:span><text:span text:style-name="T17">List</text:span><text:span text:style-name="T12">(</text:span><text:span text:style-name="T15">const </text:span><text:span text:style-name="T16">List</text:span><text:span text:style-name="T12">&amp; </text:span><text:span text:style-name="T16">l</text:span><text:span text:style-name="T12">) {<text:line-break/><text:tab/></text:span><text:span text:style-name="T16">Node</text:span><text:span text:style-name="T12">&lt;</text:span><text:span text:style-name="T16">T</text:span><text:span text:style-name="T12">&gt;* </text:span><text:span text:style-name="T16">cur </text:span><text:span text:style-name="T12">= </text:span><text:span text:style-name="T16">l</text:span><text:span text:style-name="T12">.</text:span><text:span text:style-name="T21">head</text:span><text:span text:style-name="T12">;<text:line-break/><text:line-break/><text:tab/></text:span><text:span text:style-name="T15">while </text:span><text:span text:style-name="T12">(</text:span><text:span text:style-name="T16">cur</text:span><text:span text:style-name="T12">) {<text:line-break/><text:tab/><text:tab/></text:span><text:span text:style-name="T16">Node</text:span><text:span text:style-name="T12">&lt;</text:span><text:span text:style-name="T16">T</text:span><text:span text:style-name="T12">&gt;* </text:span><text:span text:style-name="T16">to_add </text:span><text:span text:style-name="T12">= </text:span><text:span text:style-name="T15">new </text:span><text:span text:style-name="T16">Node</text:span><text:span text:style-name="T12">&lt;</text:span><text:span text:style-name="T16">T</text:span><text:span text:style-name="T12">&gt;(</text:span><text:span text:style-name="T16">cur</text:span><text:span text:style-name="T12">-&gt;</text:span><text:span text:style-name="T16">data</text:span><text:span text:style-name="T12">);<text:line-break/><text:tab/><text:tab/></text:span><text:span text:style-name="T15">if </text:span><text:span text:style-name="T12">(!</text:span><text:span text:style-name="T21">head</text:span><text:span text:style-name="T12">) {<text:line-break/><text:tab/><text:tab/><text:tab/></text:span><text:span text:style-name="T21">head </text:span><text:span text:style-name="T12">= </text:span><text:span text:style-name="T16">to_add</text:span><text:span text:style-name="T12">;<text:line-break/><text:tab/><text:tab/><text:tab/></text:span><text:span text:style-name="T21">tail </text:span><text:span text:style-name="T12">= </text:span><text:span text:style-name="T16">to_add</text:span><text:span text:style-name="T12">;<text:line-break/><text:tab/><text:tab/>}<text:line-break/><text:tab/><text:tab/></text:span><text:span text:style-name="T15">else </text:span><text:span text:style-name="T12">{<text:line-break/><text:tab/><text:tab/><text:tab/></text:span><text:span text:style-name="T21">tail</text:span><text:span text:style-name="T12">-&gt;</text:span><text:span text:style-name="T16">next </text:span><text:span text:style-name="T12">= </text:span><text:span text:style-name="T16">to_add</text:span><text:span text:style-name="T12">;<text:line-break/><text:tab/><text:tab/><text:tab/></text:span><text:span text:style-name="T21">tail</text:span><text:span text:style-name="T12">-&gt;</text:span><text:span text:style-name="T16">next</text:span><text:span text:style-name="T12">-&gt;</text:span><text:span text:style-name="T16">prev </text:span><text:span text:style-name="T12">= </text:span><text:span text:style-name="T21">tail</text:span><text:span text:style-name="T12">;<text:line-break/><text:tab/><text:tab/><text:tab/></text:span><text:span text:style-name="T21">tail </text:span><text:span text:style-name="T12">= </text:span><text:span text:style-name="T16">to_add</text:span><text:span text:style-name="T12">;<text:line-break/><text:tab/><text:tab/>}<text:line-break/><text:tab/><text:tab/></text:span><text:span text:style-name="T16">cur </text:span><text:span text:style-name="T12">= </text:span><text:span text:style-name="T16">cur</text:span><text:span text:style-name="T12">-&gt;</text:span><text:span text:style-name="T16">next</text:span><text:span text:style-name="T12">;<text:line-break/><text:tab/>}<text:line-break/>}<text:line-break/></text:span><text:span text:style-name="T15">template </text:span><text:span text:style-name="T12">&lt;</text:span><text:span text:style-name="T15">class </text:span><text:span text:style-name="T16">T</text:span><text:span text:style-name="T12">&gt;<text:line-break/></text:span><text:span text:style-name="T16">List</text:span><text:span text:style-name="T12">&lt;</text:span><text:span text:style-name="T16">T</text:span><text:span text:style-name="T12">&gt;::</text:span><text:span text:style-name="T17">~List</text:span><text:span text:style-name="T12">() {<text:line-break/><text:tab/></text:span><text:span text:style-name="T16">Node</text:span><text:span text:style-name="T12">&lt;</text:span><text:span text:style-name="T16">T</text:span><text:span text:style-name="T12">&gt;* </text:span><text:span text:style-name="T16">cur </text:span><text:span text:style-name="T12">= </text:span><text:span text:style-name="T21">head</text:span><text:span text:style-name="T12">;<text:line-break/><text:tab/></text:span><text:span text:style-name="T16">Node</text:span><text:span text:style-name="T12">&lt;</text:span><text:span text:style-name="T16">T</text:span><text:span text:style-name="T12">&gt;* </text:span><text:span text:style-name="T16">buf</text:span><text:span text:style-name="T12">;<text:line-break/><text:tab/></text:span><text:span text:style-name="T15">while </text:span><text:span text:style-name="T12">(</text:span><text:span text:style-name="T16">cur</text:span><text:span text:style-name="T12">) {<text:line-break/><text:tab/><text:tab/></text:span><text:span text:style-name="T16">buf </text:span><text:span text:style-name="T12">= </text:span><text:span text:style-name="T16">cur</text:span><text:span text:style-name="T12">;<text:line-break/><text:tab/><text:tab/></text:span><text:span text:style-name="T16">cur </text:span><text:span text:style-name="T12">= </text:span><text:span text:style-name="T16">cur</text:span><text:span text:style-name="T12">-&gt;</text:span><text:span text:style-name="T16">next</text:span><text:span text:style-name="T12">;<text:line-break/><text:tab/><text:tab/></text:span><text:span text:style-name="T15">delete </text:span><text:span text:style-name="T16">buf</text:span><text:span text:style-name="T12">;<text:line-break/><text:tab/>}<text:line-break/><text:tab/></text:span><text:span text:style-name="T21">head </text:span><text:span text:style-name="T12">= </text:span><text:span text:style-name="T15">nullptr</text:span><text:span text:style-name="T12">;<text:line-break/><text:tab/></text:span><text:span text:style-name="T21">tail </text:span><text:span text:style-name="T12">= </text:span><text:span text:style-name="T15">nullptr</text:span><text:span text:style-name="T12">;<text:line-break/>}<text:line-break/></text:span><text:span text:style-name="T15">template </text:span><text:span text:style-name="T12">&lt;</text:span><text:span text:style-name="T15">class </text:span><text:span text:style-name="T16">T</text:span><text:span text:style-name="T12">&gt;<text:line-break/></text:span><text:span text:style-name="T16">List</text:span><text:span text:style-name="T12">&lt;</text:span><text:span text:style-name="T16">T</text:span><text:span text:style-name="T12">&gt;&amp; </text:span><text:span text:style-name="T16">List</text:span><text:span text:style-name="T12">&lt;</text:span><text:span text:style-name="T16">T</text:span><text:span text:style-name="T12">&gt;::</text:span><text:span text:style-name="T15">operator</text:span><text:span text:style-name="T12">=(</text:span><text:span text:style-name="T15">const </text:span><text:span text:style-name="T16">List</text:span><text:span text:style-name="T22">&lt;T&gt;</text:span><text:span text:style-name="T12">&amp; </text:span><text:span text:style-name="T16">l</text:span><text:span text:style-name="T12">) {<text:line-break/><text:tab/></text:span><text:span text:style-name="T15">if </text:span><text:span text:style-name="T12">(</text:span><text:span text:style-name="T15">this </text:span><text:span text:style-name="T12">== &amp;</text:span><text:span text:style-name="T16">l</text:span><text:span text:style-name="T12">) </text:span><text:span text:style-name="T15">return </text:span><text:span text:style-name="T12">*</text:span><text:span text:style-name="T15">this</text:span><text:span text:style-name="T12">;<text:line-break/></text:span><text:soft-page-break/><text:span text:style-name="T12"><text:tab/></text:span><text:span text:style-name="T21">size </text:span><text:span text:style-name="T12">= </text:span><text:span text:style-name="T16">l</text:span><text:span text:style-name="T12">.</text:span><text:span text:style-name="T21">size</text:span><text:span text:style-name="T12">;<text:line-break/><text:line-break/><text:tab/></text:span><text:span text:style-name="T15">if </text:span><text:span text:style-name="T12">(</text:span><text:span text:style-name="T21">head</text:span><text:span text:style-name="T12">) {<text:line-break/><text:tab/><text:tab/></text:span><text:span text:style-name="T16">Node</text:span><text:span text:style-name="T12">&lt;</text:span><text:span text:style-name="T16">T</text:span><text:span text:style-name="T12">&gt;* </text:span><text:span text:style-name="T16">cur </text:span><text:span text:style-name="T12">= </text:span><text:span text:style-name="T21">head</text:span><text:span text:style-name="T12">;<text:line-break/><text:tab/><text:tab/></text:span><text:span text:style-name="T16">Node</text:span><text:span text:style-name="T12">&lt;</text:span><text:span text:style-name="T16">T</text:span><text:span text:style-name="T12">&gt;* </text:span><text:span text:style-name="T16">buf</text:span><text:span text:style-name="T12">;<text:line-break/><text:tab/><text:tab/></text:span><text:span text:style-name="T15">while </text:span><text:span text:style-name="T12">(</text:span><text:span text:style-name="T16">cur</text:span><text:span text:style-name="T12">) {<text:line-break/><text:tab/><text:tab/><text:tab/></text:span><text:span text:style-name="T16">buf </text:span><text:span text:style-name="T12">= </text:span><text:span text:style-name="T16">cur</text:span><text:span text:style-name="T12">;<text:line-break/><text:tab/><text:tab/><text:tab/></text:span><text:span text:style-name="T16">cur </text:span><text:span text:style-name="T12">= </text:span><text:span text:style-name="T16">cur</text:span><text:span text:style-name="T12">-&gt;</text:span><text:span text:style-name="T16">next</text:span><text:span text:style-name="T12">;<text:line-break/><text:tab/><text:tab/><text:tab/></text:span><text:span text:style-name="T15">delete </text:span><text:span text:style-name="T16">buf</text:span><text:span text:style-name="T12">;<text:line-break/><text:tab/><text:tab/>}<text:line-break/><text:tab/><text:tab/></text:span><text:span text:style-name="T21">head </text:span><text:span text:style-name="T12">= </text:span><text:span text:style-name="T15">nullptr</text:span><text:span text:style-name="T12">;<text:line-break/><text:tab/><text:tab/></text:span><text:span text:style-name="T21">tail </text:span><text:span text:style-name="T12">= </text:span><text:span text:style-name="T15">nullptr</text:span><text:span text:style-name="T12">;<text:line-break/><text:tab/>}<text:line-break/><text:line-break/><text:tab/></text:span><text:span text:style-name="T16">Node</text:span><text:span text:style-name="T12">&lt;</text:span><text:span text:style-name="T16">T</text:span><text:span text:style-name="T12">&gt;* </text:span><text:span text:style-name="T16">cur </text:span><text:span text:style-name="T12">= </text:span><text:span text:style-name="T16">l</text:span><text:span text:style-name="T12">.</text:span><text:span text:style-name="T21">head</text:span><text:span text:style-name="T12">;<text:line-break/><text:tab/></text:span><text:span text:style-name="T15">for </text:span><text:span text:style-name="T12">(</text:span><text:span text:style-name="T15">int </text:span><text:span text:style-name="T16">i </text:span><text:span text:style-name="T12">= </text:span><text:span text:style-name="T20">0</text:span><text:span text:style-name="T12">; </text:span><text:span text:style-name="T16">i </text:span><text:span text:style-name="T12">&lt; </text:span><text:span text:style-name="T21">size</text:span><text:span text:style-name="T12">; </text:span><text:span text:style-name="T16">i</text:span><text:span text:style-name="T12">++) {<text:line-break/><text:tab/><text:tab/></text:span><text:span text:style-name="T16">Node</text:span><text:span text:style-name="T12">&lt;</text:span><text:span text:style-name="T16">T</text:span><text:span text:style-name="T12">&gt;* </text:span><text:span text:style-name="T16">to_add </text:span><text:span text:style-name="T12">= </text:span><text:span text:style-name="T15">new </text:span><text:span text:style-name="T16">Node</text:span><text:span text:style-name="T12">&lt;</text:span><text:span text:style-name="T16">T</text:span><text:span text:style-name="T12">&gt;(</text:span><text:span text:style-name="T16">cur</text:span><text:span text:style-name="T12">-&gt;</text:span><text:span text:style-name="T16">data</text:span><text:span text:style-name="T12">);<text:line-break/><text:tab/><text:tab/></text:span><text:span text:style-name="T15">if </text:span><text:span text:style-name="T12">(!</text:span><text:span text:style-name="T21">head</text:span><text:span text:style-name="T12">) {<text:line-break/><text:tab/><text:tab/><text:tab/></text:span><text:span text:style-name="T21">head </text:span><text:span text:style-name="T12">= </text:span><text:span text:style-name="T16">to_add</text:span><text:span text:style-name="T12">;<text:line-break/><text:tab/><text:tab/><text:tab/></text:span><text:span text:style-name="T21">tail </text:span><text:span text:style-name="T12">= </text:span><text:span text:style-name="T16">to_add</text:span><text:span text:style-name="T12">;<text:line-break/><text:tab/><text:tab/>}<text:line-break/><text:tab/><text:tab/></text:span><text:span text:style-name="T15">else </text:span><text:span text:style-name="T12">{<text:line-break/><text:tab/><text:tab/><text:tab/></text:span><text:span text:style-name="T21">tail</text:span><text:span text:style-name="T12">-&gt;</text:span><text:span text:style-name="T16">next </text:span><text:span text:style-name="T12">= </text:span><text:span text:style-name="T16">to_add</text:span><text:span text:style-name="T12">;<text:line-break/><text:tab/><text:tab/><text:tab/></text:span><text:span text:style-name="T21">tail</text:span><text:span text:style-name="T12">-&gt;</text:span><text:span text:style-name="T16">next</text:span><text:span text:style-name="T12">-&gt;</text:span><text:span text:style-name="T16">prev </text:span><text:span text:style-name="T12">= </text:span><text:span text:style-name="T21">tail</text:span><text:span text:style-name="T12">;<text:line-break/><text:tab/><text:tab/><text:tab/></text:span><text:span text:style-name="T21">tail </text:span><text:span text:style-name="T12">= </text:span><text:span text:style-name="T16">to_add</text:span><text:span text:style-name="T12">;<text:line-break/><text:tab/><text:tab/>}<text:line-break/><text:tab/><text:tab/></text:span><text:span text:style-name="T16">cur </text:span><text:span text:style-name="T12">= </text:span><text:span text:style-name="T16">cur</text:span><text:span text:style-name="T12">-&gt;</text:span><text:span text:style-name="T16">next</text:span><text:span text:style-name="T12">;<text:line-break/><text:tab/>}<text:line-break/><text:line-break/><text:tab/></text:span><text:span text:style-name="T15">return </text:span><text:span text:style-name="T12">*</text:span><text:span text:style-name="T15">this</text:span><text:span text:style-name="T12">;<text:line-break/>}<text:line-break/></text:span><text:span text:style-name="T15">template </text:span><text:span text:style-name="T12">&lt;</text:span><text:span text:style-name="T15">class </text:span><text:span text:style-name="T16">T</text:span><text:span text:style-name="T12">&gt;<text:line-break/></text:span><text:span text:style-name="T16">T</text:span><text:span text:style-name="T12">&amp; </text:span><text:span text:style-name="T16">List</text:span><text:span text:style-name="T12">&lt;</text:span><text:span text:style-name="T16">T</text:span><text:span text:style-name="T12">&gt;::</text:span><text:span text:style-name="T15">operator</text:span><text:span text:style-name="T12">[](</text:span><text:span text:style-name="T15">int </text:span><text:span text:style-name="T16">index</text:span><text:span text:style-name="T12">) {<text:line-break/><text:tab/></text:span><text:span text:style-name="T15">if </text:span><text:span text:style-name="T12">(</text:span><text:span text:style-name="T16">index </text:span><text:span text:style-name="T12">&lt; </text:span><text:span text:style-name="T21">size</text:span><text:span text:style-name="T12">) {<text:line-break/><text:tab/><text:tab/></text:span><text:span text:style-name="T16">Node</text:span><text:span text:style-name="T12">&lt;</text:span><text:span text:style-name="T16">T</text:span><text:span text:style-name="T12">&gt;* </text:span><text:span text:style-name="T16">cur </text:span><text:span text:style-name="T12">= </text:span><text:span text:style-name="T21">head</text:span><text:span text:style-name="T12">;<text:line-break/><text:tab/><text:tab/></text:span><text:span text:style-name="T15">for </text:span><text:span text:style-name="T12">(</text:span><text:span text:style-name="T15">int </text:span><text:span text:style-name="T16">i </text:span><text:span text:style-name="T12">= </text:span><text:span text:style-name="T20">0</text:span><text:span text:style-name="T12">; </text:span><text:span text:style-name="T16">i </text:span><text:span text:style-name="T12">&lt; </text:span><text:span text:style-name="T16">index</text:span><text:span text:style-name="T12">; </text:span><text:span text:style-name="T16">i</text:span><text:span text:style-name="T12">++) {<text:line-break/><text:tab/><text:tab/><text:tab/></text:span><text:span text:style-name="T16">cur </text:span><text:span text:style-name="T12">= </text:span><text:span text:style-name="T16">cur</text:span><text:span text:style-name="T12">-&gt;</text:span><text:span text:style-name="T16">next</text:span><text:span text:style-name="T12">;<text:line-break/><text:tab/><text:tab/>}<text:line-break/><text:tab/><text:tab/></text:span><text:span text:style-name="T15">return </text:span><text:span text:style-name="T16">cur</text:span><text:span text:style-name="T12">-&gt;</text:span><text:span text:style-name="T16">data</text:span><text:span text:style-name="T12">;<text:line-break/></text:span><text:soft-page-break/><text:span text:style-name="T12"><text:tab/>}<text:line-break/><text:tab/></text:span><text:span text:style-name="T22">else </text:span><text:span text:style-name="T12">{<text:line-break/><text:tab/><text:tab/></text:span><text:span text:style-name="T16">std</text:span><text:span text:style-name="T12">::</text:span><text:span text:style-name="T16">cout </text:span><text:span text:style-name="T17">&lt;&lt; </text:span><text:span text:style-name="T14">"ERROR!"</text:span><text:span text:style-name="T12">;<text:line-break/><text:tab/><text:tab/></text:span><text:span text:style-name="T16">T stub</text:span><text:span text:style-name="T12">;<text:line-break/><text:tab/><text:tab/></text:span><text:span text:style-name="T15">return </text:span><text:span text:style-name="T16">stub</text:span><text:span text:style-name="T12">;<text:line-break/><text:tab/>}<text:line-break/>}<text:line-break/></text:span><text:span text:style-name="T15">template </text:span><text:span text:style-name="T12">&lt;</text:span><text:span text:style-name="T15">class </text:span><text:span text:style-name="T16">T</text:span><text:span text:style-name="T12">&gt;<text:line-break/></text:span><text:span text:style-name="T16">List</text:span><text:span text:style-name="T12">&lt;</text:span><text:span text:style-name="T16">T</text:span><text:span text:style-name="T12">&gt; </text:span><text:span text:style-name="T16">List</text:span><text:span text:style-name="T12">&lt;</text:span><text:span text:style-name="T16">T</text:span><text:span text:style-name="T12">&gt;::</text:span><text:span text:style-name="T15">operator</text:span><text:span text:style-name="T12">*(</text:span><text:span text:style-name="T15">const </text:span><text:span text:style-name="T16">List</text:span><text:span text:style-name="T22">&lt;T&gt;</text:span><text:span text:style-name="T12">&amp; </text:span><text:span text:style-name="T16">l</text:span><text:span text:style-name="T12">) {<text:line-break/><text:tab/></text:span><text:span text:style-name="T16">List</text:span><text:span text:style-name="T22">&lt;T&gt; </text:span><text:span text:style-name="T16">ans</text:span><text:span text:style-name="T12">(</text:span><text:span text:style-name="T22">(</text:span><text:span text:style-name="T21">size </text:span><text:span text:style-name="T12">&gt; </text:span><text:span text:style-name="T16">l</text:span><text:span text:style-name="T12">.</text:span><text:span text:style-name="T21">size</text:span><text:span text:style-name="T22">) </text:span><text:span text:style-name="T12">? </text:span><text:span text:style-name="T16">l</text:span><text:span text:style-name="T12">.</text:span><text:span text:style-name="T21">size </text:span><text:span text:style-name="T12">: </text:span><text:span text:style-name="T21">size</text:span><text:span text:style-name="T12">);<text:line-break/><text:tab/></text:span><text:span text:style-name="T16">Node</text:span><text:span text:style-name="T12">&lt;</text:span><text:span text:style-name="T16">T</text:span><text:span text:style-name="T12">&gt;* </text:span><text:span text:style-name="T16">a </text:span><text:span text:style-name="T12">= </text:span><text:span text:style-name="T21">head</text:span><text:span text:style-name="T12">;<text:line-break/><text:tab/></text:span><text:span text:style-name="T16">Node</text:span><text:span text:style-name="T12">&lt;</text:span><text:span text:style-name="T16">T</text:span><text:span text:style-name="T12">&gt;* </text:span><text:span text:style-name="T16">b </text:span><text:span text:style-name="T12">= </text:span><text:span text:style-name="T16">l</text:span><text:span text:style-name="T12">.</text:span><text:span text:style-name="T21">head</text:span><text:span text:style-name="T12">;<text:line-break/><text:tab/></text:span><text:span text:style-name="T16">Node</text:span><text:span text:style-name="T12">&lt;</text:span><text:span text:style-name="T16">T</text:span><text:span text:style-name="T12">&gt;* </text:span><text:span text:style-name="T16">cur </text:span><text:span text:style-name="T12">= </text:span><text:span text:style-name="T16">ans</text:span><text:span text:style-name="T12">.</text:span><text:span text:style-name="T21">head</text:span><text:span text:style-name="T12">;<text:line-break/><text:tab/></text:span><text:span text:style-name="T15">while </text:span><text:span text:style-name="T12">(</text:span><text:span text:style-name="T16">a </text:span><text:span text:style-name="T12">&amp;&amp; </text:span><text:span text:style-name="T16">b</text:span><text:span text:style-name="T12">) {<text:line-break/><text:tab/><text:tab/></text:span><text:span text:style-name="T16">cur</text:span><text:span text:style-name="T12">-&gt;</text:span><text:span text:style-name="T16">data </text:span><text:span text:style-name="T12">= </text:span><text:span text:style-name="T16">a</text:span><text:span text:style-name="T12">-&gt;</text:span><text:span text:style-name="T16">data </text:span><text:span text:style-name="T12">* </text:span><text:span text:style-name="T16">b</text:span><text:span text:style-name="T12">-&gt;</text:span><text:span text:style-name="T16">data</text:span><text:span text:style-name="T12">;<text:line-break/><text:tab/><text:tab/></text:span><text:span text:style-name="T16">cur </text:span><text:span text:style-name="T12">= </text:span><text:span text:style-name="T16">cur</text:span><text:span text:style-name="T12">-&gt;</text:span><text:span text:style-name="T16">next</text:span><text:span text:style-name="T12">;<text:line-break/><text:tab/><text:tab/></text:span><text:span text:style-name="T16">a </text:span><text:span text:style-name="T12">= </text:span><text:span text:style-name="T16">a</text:span><text:span text:style-name="T12">-&gt;</text:span><text:span text:style-name="T16">next</text:span><text:span text:style-name="T12">;<text:line-break/><text:tab/><text:tab/></text:span><text:span text:style-name="T16">b </text:span><text:span text:style-name="T12">= </text:span><text:span text:style-name="T16">b</text:span><text:span text:style-name="T12">-&gt;</text:span><text:span text:style-name="T16">next</text:span><text:span text:style-name="T12">;<text:line-break/><text:tab/>}<text:line-break/><text:tab/></text:span><text:span text:style-name="T15">return </text:span><text:span text:style-name="T16">ans</text:span><text:span text:style-name="T12">;<text:line-break/>}<text:line-break/></text:span><text:span text:style-name="T15">template </text:span><text:span text:style-name="T12">&lt;</text:span><text:span text:style-name="T15">class </text:span><text:span text:style-name="T16">T</text:span><text:span text:style-name="T12">&gt;<text:line-break/></text:span><text:span text:style-name="T15">int </text:span><text:span text:style-name="T16">List</text:span><text:span text:style-name="T12">&lt;</text:span><text:span text:style-name="T16">T</text:span><text:span text:style-name="T12">&gt;::</text:span><text:span text:style-name="T15">operator</text:span><text:span text:style-name="T12">() () {<text:line-break/><text:tab/></text:span><text:span text:style-name="T15">return </text:span><text:span text:style-name="T21">size</text:span><text:span text:style-name="T12">;<text:line-break/>}<text:line-break/><text:line-break/></text:span><text:span text:style-name="T15">template </text:span><text:span text:style-name="T12">&lt;</text:span><text:span text:style-name="T15">class </text:span><text:span text:style-name="T16">T</text:span><text:span text:style-name="T12">&gt;<text:line-break/></text:span><text:span text:style-name="T16">std</text:span><text:span text:style-name="T12">::</text:span><text:span text:style-name="T16">ostream</text:span><text:span text:style-name="T12">&amp; </text:span><text:span text:style-name="T15">operator</text:span><text:span text:style-name="T12">&lt;&lt;(</text:span><text:span text:style-name="T16">std</text:span><text:span text:style-name="T12">::</text:span><text:span text:style-name="T16">ostream</text:span><text:span text:style-name="T12">&amp; </text:span><text:span text:style-name="T16">out</text:span><text:span text:style-name="T12">, </text:span><text:span text:style-name="T15">const </text:span><text:span text:style-name="T16">List</text:span><text:span text:style-name="T12">&lt;</text:span><text:span text:style-name="T16">T</text:span><text:span text:style-name="T12">&gt;&amp; </text:span><text:span text:style-name="T16">l</text:span><text:span text:style-name="T12">) {<text:line-break/><text:tab/></text:span><text:span text:style-name="T16">Node</text:span><text:span text:style-name="T12">&lt;</text:span><text:span text:style-name="T16">T</text:span><text:span text:style-name="T12">&gt;* </text:span><text:span text:style-name="T16">cur </text:span><text:span text:style-name="T12">= </text:span><text:span text:style-name="T16">l</text:span><text:span text:style-name="T12">.</text:span><text:span text:style-name="T16">head</text:span><text:span text:style-name="T12">;<text:line-break/><text:tab/></text:span><text:span text:style-name="T15">for </text:span><text:span text:style-name="T12">(</text:span><text:span text:style-name="T15">int </text:span><text:span text:style-name="T16">i </text:span><text:span text:style-name="T12">= </text:span><text:span text:style-name="T20">0</text:span><text:span text:style-name="T12">; </text:span><text:span text:style-name="T16">i </text:span><text:span text:style-name="T12">&lt; </text:span><text:span text:style-name="T16">l</text:span><text:span text:style-name="T12">.</text:span><text:span text:style-name="T16">size</text:span><text:span text:style-name="T12">; </text:span><text:span text:style-name="T16">i</text:span><text:span text:style-name="T12">++) {<text:line-break/><text:tab/><text:tab/></text:span><text:span text:style-name="T16">out </text:span><text:span text:style-name="T12">&lt;&lt; </text:span><text:span text:style-name="T16">cur</text:span><text:span text:style-name="T12">-&gt;</text:span><text:span text:style-name="T16">data </text:span><text:span text:style-name="T12">&lt;&lt; </text:span><text:span text:style-name="T14">" "</text:span><text:span text:style-name="T12">;<text:line-break/><text:tab/><text:tab/></text:span><text:span text:style-name="T16">cur </text:span><text:span text:style-name="T12">= </text:span><text:span text:style-name="T16">cur</text:span><text:span text:style-name="T12">-&gt;</text:span><text:span text:style-name="T16">next</text:span><text:span text:style-name="T12">;<text:line-break/><text:tab/>}<text:line-break/><text:tab/></text:span><text:span text:style-name="T15">return </text:span><text:span text:style-name="T16">out</text:span><text:span text:style-name="T12">;<text:line-break/>}<text:line-break/></text:span><text:span text:style-name="T15">template </text:span><text:span text:style-name="T12">&lt;</text:span><text:span text:style-name="T15">class </text:span><text:span text:style-name="T16">T</text:span><text:span text:style-name="T12">&gt;<text:line-break/></text:span><text:span text:style-name="T16">std</text:span><text:span text:style-name="T12">::</text:span><text:span text:style-name="T16">istream</text:span><text:span text:style-name="T12">&amp; </text:span><text:span text:style-name="T15">operator</text:span><text:span text:style-name="T12">&gt;&gt;(</text:span><text:span text:style-name="T16">std</text:span><text:span text:style-name="T12">::</text:span><text:span text:style-name="T16">istream</text:span><text:span text:style-name="T12">&amp; </text:span><text:span text:style-name="T16">in</text:span><text:span text:style-name="T12">, </text:span><text:span text:style-name="T16">List</text:span><text:span text:style-name="T12">&lt;</text:span><text:span text:style-name="T16">T</text:span><text:span text:style-name="T12">&gt;&amp; </text:span><text:span text:style-name="T16">l</text:span><text:span text:style-name="T12">) {<text:line-break/><text:tab/></text:span><text:span text:style-name="T16">Node</text:span><text:span text:style-name="T12">&lt;</text:span><text:span text:style-name="T16">T</text:span><text:span text:style-name="T12">&gt;* </text:span><text:span text:style-name="T16">cur </text:span><text:span text:style-name="T12">= </text:span><text:span text:style-name="T16">l</text:span><text:span text:style-name="T12">.</text:span><text:span text:style-name="T16">head</text:span><text:span text:style-name="T12">;<text:line-break/><text:tab/></text:span><text:span text:style-name="T15">for </text:span><text:span text:style-name="T12">(</text:span><text:span text:style-name="T15">int </text:span><text:span text:style-name="T16">i </text:span><text:span text:style-name="T12">= </text:span><text:span text:style-name="T20">0</text:span><text:span text:style-name="T12">; </text:span><text:span text:style-name="T16">i </text:span><text:span text:style-name="T12">&lt; </text:span><text:span text:style-name="T16">l</text:span><text:span text:style-name="T12">.</text:span><text:span text:style-name="T16">size</text:span><text:span text:style-name="T12">; </text:span><text:span text:style-name="T16">i</text:span><text:span text:style-name="T12">++) {<text:line-break/></text:span><text:soft-page-break/><text:span text:style-name="T12"><text:tab/><text:tab/></text:span><text:span text:style-name="T16">in </text:span><text:span text:style-name="T12">&gt;&gt; </text:span><text:span text:style-name="T16">cur</text:span><text:span text:style-name="T12">-&gt;</text:span><text:span text:style-name="T16">data</text:span><text:span text:style-name="T12">;<text:line-break/><text:tab/><text:tab/></text:span><text:span text:style-name="T16">cur </text:span><text:span text:style-name="T12">= </text:span><text:span text:style-name="T16">cur</text:span><text:span text:style-name="T12">-&gt;</text:span><text:span text:style-name="T16">next</text:span><text:span text:style-name="T12">;<text:line-break/><text:tab/>}<text:line-break/><text:tab/></text:span><text:span text:style-name="T15">return </text:span><text:span text:style-name="T16">in</text:span><text:span text:style-name="T12">;<text:line-break/>}</text:span></text:p>
      <text:p text:style-name="P19">Pair.h</text:p>
      <text:p text:style-name="P18" loext:marker-style-name="T12"><text:span text:style-name="T13">#pragma </text:span><text:span text:style-name="T15">once<text:line-break/></text:span><text:span text:style-name="T13">#include </text:span><text:span text:style-name="T14">&lt;iostream&gt;<text:line-break/><text:line-break/></text:span><text:span text:style-name="T18">//Pair behaves almost exactly like the one described in previous labs<text:line-break/></text:span><text:span text:style-name="T15">class </text:span><text:span text:style-name="T16">Pair </text:span><text:span text:style-name="T12">{<text:line-break/></text:span><text:span text:style-name="T22">private:<text:line-break/><text:tab/></text:span><text:span text:style-name="T15">int </text:span><text:span text:style-name="T21">first</text:span><text:span text:style-name="T12">;<text:line-break/><text:tab/></text:span><text:span text:style-name="T15">double </text:span><text:span text:style-name="T21">second</text:span><text:span text:style-name="T12">;<text:line-break/></text:span><text:span text:style-name="T15">public</text:span><text:span text:style-name="T12">:<text:line-break/><text:tab/></text:span><text:span text:style-name="T17">Pair</text:span><text:span text:style-name="T12">() { </text:span><text:span text:style-name="T21">first </text:span><text:span text:style-name="T12">= </text:span><text:span text:style-name="T20">0</text:span><text:span text:style-name="T12">; </text:span><text:span text:style-name="T21">second </text:span><text:span text:style-name="T12">= </text:span><text:span text:style-name="T20">0.0</text:span><text:span text:style-name="T12">; }</text:span><text:span text:style-name="T22">;<text:line-break/><text:tab/></text:span><text:span text:style-name="T17">Pair</text:span><text:span text:style-name="T12">(</text:span><text:span text:style-name="T15">int </text:span><text:span text:style-name="T16">f</text:span><text:span text:style-name="T12">, </text:span><text:span text:style-name="T15">double </text:span><text:span text:style-name="T16">s</text:span><text:span text:style-name="T12">) { </text:span><text:span text:style-name="T21">first </text:span><text:span text:style-name="T12">= </text:span><text:span text:style-name="T16">f</text:span><text:span text:style-name="T12">; </text:span><text:span text:style-name="T21">second </text:span><text:span text:style-name="T12">= </text:span><text:span text:style-name="T16">s</text:span><text:span text:style-name="T12">; }<text:line-break/><text:tab/></text:span><text:span text:style-name="T17">Pair</text:span><text:span text:style-name="T12">(</text:span><text:span text:style-name="T15">const </text:span><text:span text:style-name="T16">Pair</text:span><text:span text:style-name="T12">&amp; </text:span><text:span text:style-name="T16">p</text:span><text:span text:style-name="T12">) { </text:span><text:span text:style-name="T21">first </text:span><text:span text:style-name="T12">= </text:span><text:span text:style-name="T16">p</text:span><text:span text:style-name="T12">.</text:span><text:span text:style-name="T21">first</text:span><text:span text:style-name="T12">; </text:span><text:span text:style-name="T21">second </text:span><text:span text:style-name="T12">= </text:span><text:span text:style-name="T16">p</text:span><text:span text:style-name="T12">.</text:span><text:span text:style-name="T21">second</text:span><text:span text:style-name="T12">;}<text:line-break/><text:tab/></text:span><text:span text:style-name="T15">virtual </text:span><text:span text:style-name="T17">~Pair</text:span><text:span text:style-name="T12">() {}</text:span><text:span text:style-name="T22">;<text:line-break/><text:line-break/><text:tab/></text:span><text:span text:style-name="T15">int </text:span><text:span text:style-name="T17">getFirst</text:span><text:span text:style-name="T12">() </text:span><text:span text:style-name="T15">const </text:span><text:span text:style-name="T12">{ </text:span><text:span text:style-name="T15">return </text:span><text:span text:style-name="T21">first</text:span><text:span text:style-name="T12">; }<text:line-break/><text:tab/></text:span><text:span text:style-name="T15">double </text:span><text:span text:style-name="T17">getSecond</text:span><text:span text:style-name="T12">() </text:span><text:span text:style-name="T15">const </text:span><text:span text:style-name="T12">{ </text:span><text:span text:style-name="T15">return </text:span><text:span text:style-name="T21">second</text:span><text:span text:style-name="T12">; }<text:line-break/><text:line-break/><text:tab/></text:span><text:span text:style-name="T15">void </text:span><text:span text:style-name="T17">setFirst</text:span><text:span text:style-name="T12">(</text:span><text:span text:style-name="T15">int </text:span><text:span text:style-name="T16">f</text:span><text:span text:style-name="T12">) { </text:span><text:span text:style-name="T21">first </text:span><text:span text:style-name="T12">= </text:span><text:span text:style-name="T16">f</text:span><text:span text:style-name="T12">; }<text:line-break/><text:tab/></text:span><text:span text:style-name="T15">void </text:span><text:span text:style-name="T17">setSecond</text:span><text:span text:style-name="T12">(</text:span><text:span text:style-name="T15">double </text:span><text:span text:style-name="T16">s</text:span><text:span text:style-name="T12">) { </text:span><text:span text:style-name="T21">second </text:span><text:span text:style-name="T12">= </text:span><text:span text:style-name="T16">s</text:span><text:span text:style-name="T12">; }<text:line-break/><text:line-break/><text:tab/></text:span><text:span text:style-name="T16">Pair</text:span><text:span text:style-name="T12">&amp; </text:span><text:span text:style-name="T15">operator</text:span><text:span text:style-name="T12">= (</text:span><text:span text:style-name="T15">const </text:span><text:span text:style-name="T16">Pair</text:span><text:span text:style-name="T12">&amp;);<text:line-break/><text:tab/></text:span><text:span text:style-name="T16">Pair </text:span><text:span text:style-name="T15">operator</text:span><text:span text:style-name="T12">-(</text:span><text:span text:style-name="T15">const </text:span><text:span text:style-name="T16">Pair</text:span><text:span text:style-name="T12">&amp;);<text:line-break/><text:tab/></text:span><text:span text:style-name="T16">Pair </text:span><text:span text:style-name="T15">operator</text:span><text:span text:style-name="T12">+(</text:span><text:span text:style-name="T15">int</text:span><text:span text:style-name="T12">);<text:line-break/><text:tab/></text:span><text:span text:style-name="T16">Pair </text:span><text:span text:style-name="T15">operator</text:span><text:span text:style-name="T12">+(</text:span><text:span text:style-name="T15">double</text:span><text:span text:style-name="T12">);<text:line-break/><text:tab/></text:span><text:span text:style-name="T16">Pair </text:span><text:span text:style-name="T15">operator</text:span><text:span text:style-name="T12">*(</text:span><text:span text:style-name="T15">const </text:span><text:span text:style-name="T16">Pair</text:span><text:span text:style-name="T12">&amp;);<text:line-break/><text:line-break/><text:tab/></text:span><text:span text:style-name="T15">friend </text:span><text:span text:style-name="T16">std</text:span><text:span text:style-name="T12">::</text:span><text:span text:style-name="T16">istream</text:span><text:span text:style-name="T12">&amp; </text:span><text:span text:style-name="T15">operator</text:span><text:span text:style-name="T12">&gt;&gt; (</text:span><text:span text:style-name="T16">std</text:span><text:span text:style-name="T12">::</text:span><text:span text:style-name="T16">istream</text:span><text:span text:style-name="T12">&amp; </text:span><text:span text:style-name="T16">in</text:span><text:span text:style-name="T12">, </text:span><text:span text:style-name="T16">Pair</text:span><text:span text:style-name="T12">&amp; </text:span><text:span text:style-name="T16">p</text:span><text:span text:style-name="T12">);<text:line-break/><text:tab/></text:span><text:span text:style-name="T15">friend </text:span><text:span text:style-name="T16">std</text:span><text:span text:style-name="T12">::</text:span><text:span text:style-name="T16">ostream</text:span><text:span text:style-name="T12">&amp; </text:span><text:span text:style-name="T15">operator</text:span><text:span text:style-name="T12">&lt;&lt; (</text:span><text:span text:style-name="T16">std</text:span><text:span text:style-name="T12">::</text:span><text:span text:style-name="T16">ostream</text:span><text:span text:style-name="T12">&amp; </text:span><text:span text:style-name="T16">out</text:span><text:span text:style-name="T12">, </text:span><text:span text:style-name="T15">const </text:span><text:span text:style-name="T16">Pair</text:span><text:span text:style-name="T12">&amp; </text:span><text:span text:style-name="T16">p</text:span><text:span text:style-name="T12">);<text:line-break/>};</text:span></text:p>
      <text:p text:style-name="P20" loext:marker-style-name="T23">Pair.cpp</text:p>
      <text:p text:style-name="P18" loext:marker-style-name="T12"><text:soft-page-break/><text:span text:style-name="T13">#include </text:span><text:span text:style-name="T14">"Pair.h"<text:line-break/></text:span><text:span text:style-name="T13">#include </text:span><text:span text:style-name="T14">&lt;iostream&gt;<text:line-break/></text:span><text:span text:style-name="T15">using namespace </text:span><text:span text:style-name="T16">std</text:span><text:span text:style-name="T12">;<text:line-break/><text:line-break/></text:span><text:span text:style-name="T18">//Pair behaves almost exactly like the one described in previous labs<text:line-break/></text:span><text:span text:style-name="T16">Pair</text:span><text:span text:style-name="T12">&amp; </text:span><text:span text:style-name="T16">Pair</text:span><text:span text:style-name="T12">::</text:span><text:span text:style-name="T15">operator</text:span><text:span text:style-name="T12">= (</text:span><text:span text:style-name="T15">const </text:span><text:span text:style-name="T16">Pair</text:span><text:span text:style-name="T12">&amp; </text:span><text:span text:style-name="T16">p</text:span><text:span text:style-name="T12">) {<text:line-break/><text:tab/></text:span><text:span text:style-name="T15">if </text:span><text:span text:style-name="T12">(</text:span><text:span text:style-name="T15">this </text:span><text:span text:style-name="T12">== &amp;</text:span><text:span text:style-name="T16">p</text:span><text:span text:style-name="T12">) </text:span><text:span text:style-name="T15">return </text:span><text:span text:style-name="T12">*</text:span><text:span text:style-name="T15">this</text:span><text:span text:style-name="T12">;<text:line-break/><text:tab/></text:span><text:span text:style-name="T21">first </text:span><text:span text:style-name="T12">= </text:span><text:span text:style-name="T16">p</text:span><text:span text:style-name="T12">.</text:span><text:span text:style-name="T21">first</text:span><text:span text:style-name="T12">;<text:line-break/><text:tab/></text:span><text:span text:style-name="T21">second </text:span><text:span text:style-name="T12">= </text:span><text:span text:style-name="T16">p</text:span><text:span text:style-name="T12">.</text:span><text:span text:style-name="T21">second</text:span><text:span text:style-name="T12">;<text:line-break/><text:tab/></text:span><text:span text:style-name="T15">return </text:span><text:span text:style-name="T12">*</text:span><text:span text:style-name="T15">this</text:span><text:span text:style-name="T12">;<text:line-break/>}<text:line-break/><text:line-break/></text:span><text:span text:style-name="T16">Pair Pair</text:span><text:span text:style-name="T12">::</text:span><text:span text:style-name="T15">operator</text:span><text:span text:style-name="T12">-(</text:span><text:span text:style-name="T15">const </text:span><text:span text:style-name="T16">Pair</text:span><text:span text:style-name="T12">&amp; </text:span><text:span text:style-name="T16">p</text:span><text:span text:style-name="T12">) {<text:line-break/><text:tab/></text:span><text:span text:style-name="T16">Pair temp</text:span><text:span text:style-name="T12">;<text:line-break/><text:tab/></text:span><text:span text:style-name="T16">temp</text:span><text:span text:style-name="T12">.</text:span><text:span text:style-name="T21">first </text:span><text:span text:style-name="T12">= </text:span><text:span text:style-name="T21">first </text:span><text:span text:style-name="T12">- </text:span><text:span text:style-name="T16">p</text:span><text:span text:style-name="T12">.</text:span><text:span text:style-name="T21">first</text:span><text:span text:style-name="T12">;<text:line-break/><text:tab/></text:span><text:span text:style-name="T16">temp</text:span><text:span text:style-name="T12">.</text:span><text:span text:style-name="T21">second </text:span><text:span text:style-name="T12">= </text:span><text:span text:style-name="T21">second </text:span><text:span text:style-name="T12">- </text:span><text:span text:style-name="T16">p</text:span><text:span text:style-name="T12">.</text:span><text:span text:style-name="T21">second</text:span><text:span text:style-name="T12">;<text:line-break/><text:tab/></text:span><text:span text:style-name="T15">return </text:span><text:span text:style-name="T16">temp</text:span><text:span text:style-name="T12">;<text:line-break/>}<text:line-break/><text:line-break/></text:span><text:span text:style-name="T16">Pair Pair</text:span><text:span text:style-name="T12">::</text:span><text:span text:style-name="T15">operator</text:span><text:span text:style-name="T12">+(</text:span><text:span text:style-name="T15">int </text:span><text:span text:style-name="T16">n</text:span><text:span text:style-name="T12">) {<text:line-break/><text:tab/></text:span><text:span text:style-name="T16">Pair temp</text:span><text:span text:style-name="T12">;<text:line-break/><text:tab/></text:span><text:span text:style-name="T16">temp</text:span><text:span text:style-name="T12">.</text:span><text:span text:style-name="T21">first </text:span><text:span text:style-name="T12">= </text:span><text:span text:style-name="T21">first </text:span><text:span text:style-name="T12">+ </text:span><text:span text:style-name="T16">n</text:span><text:span text:style-name="T12">;<text:line-break/><text:tab/></text:span><text:span text:style-name="T16">temp</text:span><text:span text:style-name="T12">.</text:span><text:span text:style-name="T21">second </text:span><text:span text:style-name="T12">= </text:span><text:span text:style-name="T21">second</text:span><text:span text:style-name="T12">;<text:line-break/><text:tab/></text:span><text:span text:style-name="T15">return </text:span><text:span text:style-name="T16">temp</text:span><text:span text:style-name="T12">;<text:line-break/>}<text:line-break/><text:line-break/></text:span><text:span text:style-name="T16">Pair Pair</text:span><text:span text:style-name="T12">::</text:span><text:span text:style-name="T15">operator</text:span><text:span text:style-name="T12">+(</text:span><text:span text:style-name="T15">double </text:span><text:span text:style-name="T16">n</text:span><text:span text:style-name="T12">) {<text:line-break/><text:tab/></text:span><text:span text:style-name="T16">Pair temp</text:span><text:span text:style-name="T12">;<text:line-break/><text:tab/></text:span><text:span text:style-name="T16">temp</text:span><text:span text:style-name="T12">.</text:span><text:span text:style-name="T21">first </text:span><text:span text:style-name="T12">= </text:span><text:span text:style-name="T21">first</text:span><text:span text:style-name="T12">;<text:line-break/><text:tab/></text:span><text:span text:style-name="T16">temp</text:span><text:span text:style-name="T12">.</text:span><text:span text:style-name="T21">second </text:span><text:span text:style-name="T12">= </text:span><text:span text:style-name="T21">second </text:span><text:span text:style-name="T12">+ </text:span><text:span text:style-name="T16">n</text:span><text:span text:style-name="T12">;<text:line-break/><text:tab/></text:span><text:span text:style-name="T15">return </text:span><text:span text:style-name="T16">temp</text:span><text:span text:style-name="T12">;<text:line-break/>}<text:line-break/></text:span><text:span text:style-name="T16">Pair Pair</text:span><text:span text:style-name="T12">::</text:span><text:span text:style-name="T15">operator</text:span><text:span text:style-name="T12">*(</text:span><text:span text:style-name="T15">const </text:span><text:span text:style-name="T16">Pair</text:span><text:span text:style-name="T12">&amp; </text:span><text:span text:style-name="T16">p</text:span><text:span text:style-name="T12">) {<text:line-break/><text:tab/></text:span><text:span text:style-name="T16">Pair temp</text:span><text:span text:style-name="T12">;<text:line-break/><text:tab/></text:span><text:span text:style-name="T16">temp</text:span><text:span text:style-name="T12">.</text:span><text:span text:style-name="T21">first </text:span><text:span text:style-name="T12">= </text:span><text:span text:style-name="T21">first </text:span><text:span text:style-name="T12">* </text:span><text:span text:style-name="T16">p</text:span><text:span text:style-name="T12">.</text:span><text:span text:style-name="T21">first</text:span><text:span text:style-name="T12">;<text:line-break/><text:tab/></text:span><text:span text:style-name="T16">temp</text:span><text:span text:style-name="T12">.</text:span><text:span text:style-name="T21">second </text:span><text:span text:style-name="T12">= </text:span><text:span text:style-name="T21">second </text:span><text:span text:style-name="T12">* </text:span><text:span text:style-name="T16">p</text:span><text:span text:style-name="T12">.</text:span><text:span text:style-name="T21">second</text:span><text:span text:style-name="T12">;<text:line-break/><text:tab/></text:span><text:span text:style-name="T15">return </text:span><text:span text:style-name="T16">temp</text:span><text:span text:style-name="T12">;<text:line-break/>}<text:line-break/></text:span><text:soft-page-break/><text:span text:style-name="T12"><text:line-break/></text:span><text:span text:style-name="T16">istream</text:span><text:span text:style-name="T12">&amp; </text:span><text:span text:style-name="T15">operator</text:span><text:span text:style-name="T12">&gt;&gt; (</text:span><text:span text:style-name="T16">istream</text:span><text:span text:style-name="T12">&amp; </text:span><text:span text:style-name="T16">in</text:span><text:span text:style-name="T12">, </text:span><text:span text:style-name="T16">Pair</text:span><text:span text:style-name="T12">&amp; </text:span><text:span text:style-name="T16">p</text:span><text:span text:style-name="T12">) {<text:line-break/><text:tab/></text:span><text:span text:style-name="T16">cout </text:span><text:span text:style-name="T17">&lt;&lt; </text:span><text:span text:style-name="T14">"Enter first: "</text:span><text:span text:style-name="T12">;<text:line-break/><text:tab/></text:span><text:span text:style-name="T16">in </text:span><text:span text:style-name="T17">&gt;&gt; </text:span><text:span text:style-name="T16">p</text:span><text:span text:style-name="T12">.</text:span><text:span text:style-name="T21">first</text:span><text:span text:style-name="T12">;<text:line-break/><text:tab/></text:span><text:span text:style-name="T16">cout </text:span><text:span text:style-name="T17">&lt;&lt; </text:span><text:span text:style-name="T14">"Enter second: "</text:span><text:span text:style-name="T12">;<text:line-break/><text:tab/></text:span><text:span text:style-name="T16">in </text:span><text:span text:style-name="T17">&gt;&gt; </text:span><text:span text:style-name="T16">p</text:span><text:span text:style-name="T12">.</text:span><text:span text:style-name="T21">second</text:span><text:span text:style-name="T12">;<text:line-break/><text:tab/></text:span><text:span text:style-name="T15">return </text:span><text:span text:style-name="T16">in</text:span><text:span text:style-name="T12">;<text:line-break/>}<text:line-break/></text:span><text:span text:style-name="T16">ostream</text:span><text:span text:style-name="T12">&amp; </text:span><text:span text:style-name="T15">operator</text:span><text:span text:style-name="T12">&lt;&lt; (</text:span><text:span text:style-name="T16">ostream</text:span><text:span text:style-name="T12">&amp; </text:span><text:span text:style-name="T16">out</text:span><text:span text:style-name="T12">, </text:span><text:span text:style-name="T15">const </text:span><text:span text:style-name="T16">Pair</text:span><text:span text:style-name="T12">&amp; </text:span><text:span text:style-name="T16">p</text:span><text:span text:style-name="T12">) {<text:line-break/><text:tab/></text:span><text:span text:style-name="T16">out </text:span><text:span text:style-name="T17">&lt;&lt; </text:span><text:span text:style-name="T16">p</text:span><text:span text:style-name="T12">.</text:span><text:span text:style-name="T21">first </text:span><text:span text:style-name="T17">&lt;&lt; </text:span><text:span text:style-name="T14">" : " </text:span><text:span text:style-name="T17">&lt;&lt; </text:span><text:span text:style-name="T16">p</text:span><text:span text:style-name="T12">.</text:span><text:span text:style-name="T21">second</text:span><text:span text:style-name="T12">;<text:line-break/><text:tab/></text:span><text:span text:style-name="T15">return </text:span><text:span text:style-name="T16">out</text:span><text:span text:style-name="T12">;<text:line-break/>}</text:span></text:p>
      <text:p text:style-name="P19"/>
      <text:p text:style-name="P21" loext:marker-style-name="T1">Решение</text:p>
      <text:p text:style-name="P22" loext:marker-style-name="T1"><draw:frame draw:style-name="fr3" draw:name="Изображение4" text:anchor-type="as-char" svg:width="5.4327in" svg:height="4.5374in" draw:z-index="1"><draw:image xlink:href="Pictures/10000000000001B1000001B23842968F.png" xlink:type="simple" xlink:show="embed" xlink:actuate="onLoad" draw:mime-type="image/png"/></draw:frame></text:p>
      <text:p text:style-name="P22" loext:marker-style-name="T1"/>
      <text:p text:style-name="P23" loext:marker-style-name="T1">Контрольные вопросы</text:p>
      <text:p text:style-name="P24"><text:span text:style-name="Strong_20_Emphasis"><text:span text:style-name="T24">1. </text:span></text:span><text:span text:style-name="Strong_20_Emphasis"><text:span text:style-name="T25">В чем смысл использования шаблонов? — </text:span></text:span><text:span text:style-name="Strong_20_Emphasis"><text:span text:style-name="T24">обеспечение обобщённого программирования. Возможность писать код универсально работающий для разных типов, не требующий повторения, типовой, с одной логикой.</text:span></text:span></text:p>
      <text:p text:style-name="P24"><text:span text:style-name="Strong_20_Emphasis"><text:span text:style-name="T24">2. </text:span></text:span><text:span text:style-name="Strong_20_Emphasis"><text:span text:style-name="T25">Каковы синтаксис/семантика шаблонов функций?</text:span></text:span></text:p>
      <text:p text:style-name="P24"><text:span text:style-name="Strong_20_Emphasis"><text:span text:style-name="T25"/></text:span></text:p>
      <text:p text:style-name="P25"><text:span text:style-name="Strong_20_Emphasis"><text:span text:style-name="T24">template &lt;class T&gt; ← ключевое слово шаблона</text:span></text:span></text:p>
      <text:p text:style-name="P25"><text:span text:style-name="Strong_20_Emphasis"><text:span text:style-name="T24">type function(T value) {} ← заголовок функции, в котором типы переменных могут быть заменены типом-шаблоном</text:span></text:span></text:p>
      <text:p text:style-name="P25"><text:span text:style-name="Strong_20_Emphasis"><text:span text:style-name="T24">При вызове компилятор инстанцирует функцию исходя из типов аргументов</text:span></text:span></text:p>
      <text:p text:style-name="P24"><text:span text:style-name="Strong_20_Emphasis"><text:span text:style-name="T25"/></text:span></text:p>
      <text:p text:style-name="P24"><text:span text:style-name="Strong_20_Emphasis"><text:span text:style-name="T24">3. </text:span></text:span><text:span text:style-name="Strong_20_Emphasis"><text:span text:style-name="T25">Каковы синтаксис/семантика шаблонов классов?</text:span></text:span></text:p>
      <text:p text:style-name="P24"><text:span text:style-name="Strong_20_Emphasis"><text:span text:style-name="T25"/></text:span></text:p>
      <text:p text:style-name="P25"><text:span text:style-name="Strong_20_Emphasis"><text:span text:style-name="T24">template &lt;class T&gt; ← ключевое слово шаблона</text:span></text:span></text:p>
      <text:p text:style-name="P25"><text:span text:style-name="Strong_20_Emphasis"><text:span text:style-name="T24">class Class {</text:span></text:span></text:p>
      <text:p text:style-name="P25"><text:span text:style-name="Strong_20_Emphasis"><text:span text:style-name="T24"><text:tab/>T value; ← тело класса, в котором типы переменных могут быть заменены типом-шаблоном</text:span></text:span></text:p>
      <text:p text:style-name="P25"><text:span text:style-name="Strong_20_Emphasis"><text:span text:style-name="T24">}</text:span></text:span></text:p>
      <text:p text:style-name="P25"><text:span text:style-name="Strong_20_Emphasis"><text:span text:style-name="T24">При создании экземпляра необходимо явное инстанцирование Class&lt;int&gt; object; для получения класса по данному шаблону.</text:span></text:span></text:p>
      <text:p text:style-name="P25"><text:span text:style-name="Strong_20_Emphasis"><text:span text:style-name="T24"/></text:span></text:p>
      <text:p text:style-name="P24"><text:span text:style-name="Strong_20_Emphasis"><text:span text:style-name="T25">4. <text:s/>Что такое параметры шаблона функции? — </text:span></text:span><text:span text:style-name="Strong_20_Emphasis"><text:span text:style-name="T24">Список в угловых скобках после ключевого слова шаблона. </text:span></text:span><text:span text:style-name="Strong_20_Emphasis"><text:span text:style-name="T26">Зачастую это параметры-типы, заполняемые при инстанцировании. Определяются ключевыми словами class или typename</text:span></text:span></text:p>
      <text:p text:style-name="P24"><text:span text:style-name="Strong_20_Emphasis"><text:span text:style-name="T25">5. Перечислите основные свойства параметров шаблона функции. — </text:span></text:span><text:span text:style-name="Strong_20_Emphasis"><text:span text:style-name="T26">параметры могут быть анонимными, можно использовать значения по умолчанию &lt;class T = int&gt;</text:span></text:span></text:p>
      <text:p text:style-name="P24"><text:span text:style-name="Strong_20_Emphasis"><text:span text:style-name="T25">6. <text:s/>Как записывать параметр шаблона? &lt;</text:span></text:span><text:span text:style-name="Strong_20_Emphasis"><text:span text:style-name="T26">typename T_1, class T_2, ...&gt;</text:span></text:span></text:p>
      <text:p text:style-name="P24"><text:span text:style-name="Strong_20_Emphasis"><text:span text:style-name="T25">7. Можно ли перегружать параметризованные функции? —</text:span></text:span><text:span text:style-name="Strong_20_Emphasis"><text:span text:style-name="T26"> Да, притом перегрузки могут быть не шаблонами. При вызове функции с данным именем компилятор сначала проверяет все функции-не шаблоны на соответствие списков аргументов, а затем ищет подходящий шаблон функции для инстанцирования</text:span></text:span></text:p>
      <text:p text:style-name="P24"><text:span text:style-name="Strong_20_Emphasis"><text:span text:style-name="T25">8. Перечислите основные свойства параметризованных классов. — </text:span></text:span><text:span text:style-name="Strong_20_Emphasis"><text:span text:style-name="T26">Полное инстанцирование про создании объекта, возможна рекурсия шаблонов, допускается использование виртуальных функций.</text:span></text:span></text:p>
      <text:p text:style-name="P24"><text:span text:style-name="Strong_20_Emphasis"><text:span text:style-name="T25">9. Все ли компонентные функции параметризованного класса являются</text:span></text:span></text:p>
      <text:p text:style-name="P24"><text:soft-page-break/><text:span text:style-name="Strong_20_Emphasis"><text:span text:style-name="T25">параметризованными? — </text:span></text:span><text:span text:style-name="Strong_20_Emphasis"><text:span text:style-name="T26">Необязательно. Методы параметризованного класса могут быть обычными если они не зависят от параметров шаблона. Так или иначе создаются при инстанцировании</text:span></text:span></text:p>
      <text:p text:style-name="P24"><text:span text:style-name="Strong_20_Emphasis"><text:span text:style-name="T25">10. Являются ли дружественные функции, описанные в параметризованном</text:span></text:span></text:p>
      <text:p text:style-name="P24"><text:span text:style-name="Strong_20_Emphasis"><text:span text:style-name="T25">классе, параметризованными? — </text:span></text:span><text:span text:style-name="Strong_20_Emphasis"><text:span text:style-name="T26">зависит от объявления. Если указать для функции списокпараметров шаблона — да, иначе — нет.</text:span></text:span></text:p>
      <text:p text:style-name="P24"><text:span text:style-name="Strong_20_Emphasis"><text:span text:style-name="T25">11. Могут ли шаблоны классов содержать виртуальные компонентные функции? — </text:span></text:span><text:span text:style-name="Strong_20_Emphasis"><text:span text:style-name="T26">Да, однако использование шаблонных виртуальных функций запрещено</text:span></text:span></text:p>
      <text:p text:style-name="P24"><text:span text:style-name="Strong_20_Emphasis"><text:span text:style-name="T25">12. Как определяются компонентные функции параметризованных классов вне определения шаблона класса? — </text:span></text:span><text:span text:style-name="Strong_20_Emphasis"><text:span text:style-name="T26">перед каждым определением необходимо прописывать ключевое слово шаблона и список его параметров, вдобавок к оператору доступа (где класс-источник также имеет прописанный список параметров)</text:span></text:span></text:p>
      <text:p text:style-name="P24"><text:span text:style-name="Strong_20_Emphasis"><text:span text:style-name="T25">13. Что такое инстанцирование шаблона? — </text:span></text:span><text:span text:style-name="Strong_20_Emphasis"><text:span text:style-name="T26">создание компилятором кода по шаблону с заданными параметрами.</text:span></text:span></text:p>
      <text:p text:style-name="P24"><text:span text:style-name="Strong_20_Emphasis"><text:span text:style-name="T25">14. На каком этапе происходит генерирование определения класса по шаблону? — </text:span></text:span><text:span text:style-name="Strong_20_Emphasis"><text:span text:style-name="T26">На этапе компиляции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scadia Mono" svg:font-family="'Cascadia Mono'" style:font-family-generic="roman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等线" style:font-size-asian="12pt" style:language-asian="zh" style:country-asian="CN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2pt" fo:language="ru" fo:country="RU" style:letter-kerning="true" style:font-name-asian="等线" style:font-size-asian="12pt" style:language-asian="zh" style:country-asian="CN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等线 Light" style:font-family-asian="'等线 Light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等线 Light" style:font-family-asian="'等线 Light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c-lboyjj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Базовый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等线 Light" style:font-family-asian="'等线 Light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等线 Light" style:font-family-asian="'等线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等线 Light" style:font-family-asian="'等线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等线 Light" style:font-family-asian="'等线 Light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102in" style:font-name-asian="等线 Light" style:font-family-asian="'等线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c-itonen" style:family="text" style:parent-style-name="Default_20_Paragraph_20_Font"/>
    <style:style style:name="katex-mathml" style:family="text" style:parent-style-name="Default_20_Paragraph_20_Font"/>
    <style:style style:name="mord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Calibri" fo:font-family="Calibri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 style:font-name-asian="等线" style:font-family-asian="等线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Calibri" fo:font-family="Calibri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Times New Roman" fo:font-family="'Times New Roman'" style:font-family-generic="roman" style:font-pitch="variable" style:font-name-asian="等线" style:font-family-asian="等线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Times New Roman" fo:font-family="'Times New Roman'" style:font-family-generic="roman" style:font-pitch="variable" style:font-name-asian="等线" style:font-family-asian="等线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="Calibri" fo:font-family="Calibri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text:style-name="ListLabel_20_12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ListLabel_20_13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text:style-name="ListLabel_20_14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15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text:style-name="ListLabel_20_16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8" text:style-name="ListLabel_20_17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text:style-name="ListLabel_20_18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022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22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22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52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22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22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5.022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22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02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Дарья Альметова</meta:initial-creator>
    <meta:editing-cycles>59</meta:editing-cycles>
    <meta:creation-date>2025-12-13T14:37:00</meta:creation-date>
    <dc:date>2026-05-03T11:50:34.151882918</dc:date>
    <meta:editing-duration>PT17H21M16S</meta:editing-duration>
    <meta:generator>LibreOffice/25.8.5.2$Linux_X86_64 LibreOffice_project/580$Build-2</meta:generator>
    <meta:document-statistic meta:table-count="0" meta:image-count="3" meta:object-count="0" meta:page-count="15" meta:paragraph-count="70" meta:word-count="1653" meta:character-count="11388" meta:non-whitespace-character-count="9444"/>
    <meta:user-defined meta:name="AppVersion">16.0000</meta:user-defined>
    <meta:template xlink:type="simple" xlink:actuate="onRequest" xlink:title="Normal" xlink:href=""/>
  </office:meta>
</office:document-meta>
</file>