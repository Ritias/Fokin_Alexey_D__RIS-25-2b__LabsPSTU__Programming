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8000001AF6086013C.png" manifest:media-type="image/png"/>
  <manifest:file-entry manifest:full-path="Pictures/1000000100000504000005D84C822E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</style:style>
    <style:style style:name="P9" style:family="paragraph" style:parent-style-name="List_20_Paragraph" style:list-style-name="WWNum23">
      <style:paragraph-properties fo:margin-left="0in" fo:text-align="justify" style:justify-single-word="false" fo:text-indent="0in" style:auto-text-indent="false"/>
      <style:text-properties style:font-name="Times New Roman" fo:font-size="14pt" fo:language="ru" fo:country="RU" fo:font-weight="normal" officeooo:rsid="0032acfc" officeooo:paragraph-rsid="00419a16" style:font-size-asian="14pt" style:font-weight-asian="normal" style:font-name-complex="Times New Roman1" style:font-size-complex="14pt" style:font-weight-complex="normal"/>
    </style:style>
    <style:style style:name="P10" style:family="paragraph" style:parent-style-name="List_20_Paragraph">
      <style:paragraph-properties fo:margin-left="0in" fo:text-align="justify" style:justify-single-word="false" fo:text-indent="0in" style:auto-text-indent="false"/>
      <style:text-properties style:font-name="Times New Roman" fo:font-size="14pt" fo:language="ru" fo:country="RU" fo:font-weight="normal" officeooo:rsid="0032acfc" officeooo:paragraph-rsid="00419a16" style:font-size-asian="14pt" style:font-weight-asian="normal" style:font-name-complex="Times New Roman1" style:font-size-complex="14pt" style:font-weight-complex="normal"/>
    </style:style>
    <style:style style:name="P11" style:family="paragraph" style:parent-style-name="List_20_Paragraph">
      <style:paragraph-properties fo:margin-left="0.7425in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3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3adf73" style:font-size-asian="14pt" style:font-name-complex="Times New Roman1" style:font-size-complex="14pt"/>
    </style:style>
    <style:style style:name="P14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19a16" style:font-size-asian="14pt" style:font-name-complex="Times New Roman1" style:font-size-complex="14pt"/>
    </style:style>
    <style:style style:name="P15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8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9" style:family="paragraph" style:parent-style-name="Standard">
      <style:text-properties fo:color="#000000" loext:opacity="100%" style:font-name="Cascadia Mono" fo:font-size="9.5pt" fo:language="en" fo:country="US" fo:font-weight="bold" officeooo:rsid="003adf73" officeooo:paragraph-rsid="003adf73" fo:background-color="#ffffff" style:font-size-asian="9.5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1" style:family="paragraph" style:parent-style-name="Standard">
      <style:text-properties fo:color="#808080" loext:opacity="100%" style:font-name="Cascadia Mono" fo:font-size="9.5pt" fo:language="en" fo:country="US" fo:font-weight="bold" officeooo:rsid="003adf73" fo:background-color="#ffffff" style:font-size-asian="9.5pt" style:font-weight-asian="bold" style:font-name-complex="Times New Roman1" style:font-size-complex="14pt" style:font-weight-complex="bold"/>
    </style:style>
    <style:style style:name="P22" style:family="paragraph" style:parent-style-name="Standard">
      <style:text-properties fo:color="#000000" loext:opacity="100%" style:font-name="Cascadia Mono" fo:font-size="9.5pt" fo:language="en" fo:country="US" fo:font-weight="bold" officeooo:rsid="003adf73" fo:background-color="#ffffff" style:font-size-asian="9.5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4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5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6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7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3daedd" officeooo:paragraph-rsid="004245f6" style:font-size-asian="14pt" style:font-weight-asian="normal" style:font-name-complex="Times New Roman1" style:font-size-complex="14pt" style:font-weight-complex="normal"/>
    </style:style>
    <style:style style:name="P28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3daedd" officeooo:paragraph-rsid="00443aa0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3adf73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weight="bold" officeooo:rsid="00405aee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officeooo:rsid="00419a16"/>
    </style:style>
    <style:style style:name="T12" style:family="text">
      <style:text-properties fo:language="en" fo:country="US" officeooo:rsid="00419a16"/>
    </style:style>
    <style:style style:name="T13" style:family="text">
      <style:text-properties fo:language="en" fo:country="US"/>
    </style:style>
    <style:style style:name="T14" style:family="text">
      <style:text-properties fo:font-weight="bold" officeooo:rsid="001c65e1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7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9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1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22" style:family="text">
      <style:text-properties fo:color="#80808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3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4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5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6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7" style:family="text">
      <style:text-properties fo:language="ru" fo:country="RU" officeooo:rsid="004245f6"/>
    </style:style>
    <style:style style:name="T28" style:family="text">
      <style:text-properties fo:language="ru" fo:country="RU" officeooo:rsid="00443aa0"/>
    </style:style>
    <style:style style:name="T29" style:family="text">
      <style:text-properties officeooo:rsid="00443aa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Классы и Объекты. И</text:span><text:span text:style-name="T6">спользование конструкторов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7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8"><text:span text:style-name="T2">Пермь 202</text:span><text:span text:style-name="T9">6</text:span></text:p>
      <text:p text:style-name="P8" loext:marker-style-name="T10"><text:span text:style-name="T1">Постановка задачи</text:span><text:span text:style-name="T10">:</text:span></text:p>
      <text:list text:style-name="WWNum23">
        <text:list-item>
          <text:p text:style-name="P9" loext:marker-style-name="T7">Определить пользовательский класс</text:p>
        </text:list-item>
        <text:list-item>
          <text:p text:style-name="P9" loext:marker-style-name="T7">Определить в классе следующие конструкторы: без параметров, с параметрами, копирования.</text:p>
        </text:list-item>
        <text:list-item>
          <text:p text:style-name="P9" loext:marker-style-name="T7">Определить в классе деструктор.</text:p>
        </text:list-item>
        <text:list-item>
          <text:p text:style-name="P9" loext:marker-style-name="T7">Определить в классе компоненты-функции для просмотра и установки полей данных (селекторы и модификаторы)</text:p>
        </text:list-item>
        <text:list-item>
          <text:p text:style-name="P9" loext:marker-style-name="T7">Написать демонстрационную программу, в которой продемонстрировать все три случая вызова конструктора-копирования, вызов конструктора с параметрами и конструктора без параметров.</text:p>
        </text:list-item>
      </text:list>
      <text:p text:style-name="P10" loext:marker-style-name="T7"/>
      <text:p text:style-name="P10" loext:marker-style-name="T7">Пользовательский класс ЗАРПЛАТА</text:p>
      <text:p text:style-name="P10" loext:marker-style-name="T7">ФИО – string</text:p>
      <text:p text:style-name="P10" loext:marker-style-name="T7">Оклад – double</text:p>
      <text:p text:style-name="P10" loext:marker-style-name="T7">Премия (% от оклада) – int</text:p>
      <text:p text:style-name="P11" loext:marker-style-name="T2"/>
      <text:p text:style-name="P12" loext:marker-style-name="T10"><text:span text:style-name="T1">Анализ задачи</text:span><text:span text:style-name="T10">:</text:span></text:p>
      <text:list text:style-name="WWNum25">
        <text:list-item>
          <text:p text:style-name="P13">Реализуем <text:span text:style-name="T11">указанную структуру с указанными полями с модификатором </text:span><text:span text:style-name="T12">private</text:span></text:p>
        </text:list-item>
        <text:list-item>
          <text:p text:style-name="P14">С модификатором <text:span text:style-name="T13">public </text:span>реализуем конструкторы (без параметров, с параметрами, копирования), деструктор (все поля — типы по умолчанию поэтому определение оставляем пустым), Реализуем три геттера (по одному на поле), реализуем три сеттера (по одному на поле). Реализуем демонстрирующий метод</text:p>
        </text:list-item>
        <text:list-item>
          <text:p text:style-name="P14">Реализуем дополнительные функции для хэндлинга создания объекта типа и его печати</text:p>
        </text:list-item>
        <text:list-item>
          <text:p text:style-name="P14">Реализуем главную функцию с тестированием всего вышеперечисленного</text:p>
        </text:list-item>
      </text:list>
      <text:p text:style-name="P15" loext:marker-style-name="T1"/>
      <text:p text:style-name="P16">UML</text:p>
      <text:p text:style-name="P17" loext:marker-style-name="T1"><draw:frame draw:style-name="fr1" draw:name="Изображение1" text:anchor-type="as-char" svg:y="-2.5866in" svg:width="4.6382in" svg:height="5.4362in" draw:z-index="0"><draw:image xlink:href="Pictures/1000000100000504000005D84C822EEA.png" xlink:type="simple" xlink:show="embed" xlink:actuate="onLoad" draw:mime-type="image/png"/></draw:frame></text:p>
      <text:p text:style-name="P18" loext:marker-style-name="T1"><text:span text:style-name="T14">К</text:span><text:span text:style-name="T15">од</text:span></text:p>
      <text:p text:style-name="P19"><text:span text:style-name="T11">Pay</text:span>.h:</text:p>
      <text:p text:style-name="P20" loext:marker-style-name="T16"><text:span text:style-name="T17">#pragma </text:span><text:span text:style-name="T18">once<text:line-break/></text:span><text:span text:style-name="T17">#include </text:span><text:span text:style-name="T19">&lt;string&gt;<text:line-break/><text:line-break/></text:span><text:span text:style-name="T18">class </text:span><text:span text:style-name="T20">Pay </text:span><text:span text:style-name="T16">{ </text:span><text:span text:style-name="T21">//class definition<text:line-break/></text:span><text:span text:style-name="T22">private: </text:span><text:span text:style-name="T21">//attributes<text:line-break/><text:tab/></text:span><text:span text:style-name="T20">std</text:span><text:span text:style-name="T16">::</text:span><text:span text:style-name="T20">string </text:span><text:span text:style-name="T23">name_</text:span><text:span text:style-name="T16">;<text:line-break/><text:tab/></text:span><text:span text:style-name="T18">double </text:span><text:span text:style-name="T23">salary_</text:span><text:span text:style-name="T16">;<text:line-break/><text:tab/></text:span><text:span text:style-name="T18">int </text:span><text:span text:style-name="T23">bonus_</text:span><text:span text:style-name="T16">;<text:line-break/></text:span><text:span text:style-name="T18">public</text:span><text:span text:style-name="T16">:<text:line-break/><text:tab/></text:span><text:span text:style-name="T24">Pay</text:span><text:span text:style-name="T16">(); </text:span><text:span text:style-name="T21">//default constructor<text:line-break/><text:tab/></text:span><text:span text:style-name="T24">Pay</text:span><text:span text:style-name="T16">(</text:span><text:span text:style-name="T18">const </text:span><text:span text:style-name="T20">std</text:span><text:span text:style-name="T16">::</text:span><text:span text:style-name="T20">string</text:span><text:span text:style-name="T16">&amp;, </text:span><text:span text:style-name="T18">double</text:span><text:span text:style-name="T16">, </text:span><text:span text:style-name="T18">int</text:span><text:span text:style-name="T16">); </text:span><text:span text:style-name="T21">//parametrized constructor<text:line-break/><text:tab/></text:span><text:span text:style-name="T24">Pay</text:span><text:span text:style-name="T16">(</text:span><text:span text:style-name="T18">const </text:span><text:span text:style-name="T20">Pay</text:span><text:span text:style-name="T16">&amp;); </text:span><text:span text:style-name="T21">//copy constructor<text:line-break/><text:tab/></text:span><text:span text:style-name="T24">~Pay</text:span><text:span text:style-name="T16">(); </text:span><text:span text:style-name="T21">//destructor<text:line-break/><text:tab/>//getters<text:line-break/><text:tab/></text:span><text:span text:style-name="T20">std</text:span><text:span text:style-name="T16">::</text:span><text:span text:style-name="T20">string </text:span><text:span text:style-name="T24">getName</text:span><text:span text:style-name="T16">() </text:span><text:span text:style-name="T18">const</text:span><text:span text:style-name="T16">;<text:line-break/><text:tab/></text:span><text:span text:style-name="T18">double </text:span><text:span text:style-name="T24">getSalary</text:span><text:span text:style-name="T16">() </text:span><text:span text:style-name="T18">const</text:span><text:span text:style-name="T16">;<text:line-break/><text:tab/></text:span><text:span text:style-name="T18">int </text:span><text:span text:style-name="T24">getBonus</text:span><text:span text:style-name="T16">() </text:span><text:span text:style-name="T18">const</text:span><text:span text:style-name="T16">;<text:line-break/><text:tab/></text:span><text:span text:style-name="T21">//setters<text:line-break/><text:tab/></text:span><text:span text:style-name="T18">void </text:span><text:span text:style-name="T24">setName</text:span><text:span text:style-name="T16">(</text:span><text:span text:style-name="T18">const </text:span><text:span text:style-name="T20">std</text:span><text:span text:style-name="T16">::</text:span><text:span text:style-name="T20">string</text:span><text:span text:style-name="T16">&amp;);<text:line-break/><text:tab/></text:span><text:span text:style-name="T18">void </text:span><text:span text:style-name="T24">setSalary</text:span><text:span text:style-name="T16">(</text:span><text:span text:style-name="T18">double</text:span><text:span text:style-name="T16">);<text:line-break/><text:tab/></text:span><text:span text:style-name="T18">void </text:span><text:span text:style-name="T24">setBonus</text:span><text:span text:style-name="T16">(</text:span><text:span text:style-name="T18">int</text:span><text:span text:style-name="T16">);<text:line-break/><text:line-break/><text:tab/></text:span><text:span text:style-name="T18">void </text:span><text:span text:style-name="T24">show</text:span><text:span text:style-name="T16">() </text:span><text:span text:style-name="T18">const</text:span><text:span text:style-name="T16">; </text:span><text:span text:style-name="T21">//Console output<text:line-break/></text:span><text:span text:style-name="T16">};</text:span></text:p>
      <text:p text:style-name="P21" loext:marker-style-name="T25"/>
      <text:p text:style-name="P19"><text:span text:style-name="T11">Pay</text:span>.cpp:</text:p>
      <text:p text:style-name="P20" loext:marker-style-name="T16"><text:span text:style-name="T17">#include </text:span><text:span text:style-name="T19">"Pay.h"<text:line-break/></text:span><text:span text:style-name="T17">#include </text:span><text:span text:style-name="T19">&lt;string&gt;<text:line-break/></text:span><text:span text:style-name="T17">#include </text:span><text:span text:style-name="T19">&lt;iostream&gt;<text:line-break/></text:span><text:span text:style-name="T18">using namespace </text:span><text:span text:style-name="T20">std</text:span><text:span text:style-name="T16">;<text:line-break/><text:line-break/></text:span><text:span text:style-name="T20">Pay</text:span><text:span text:style-name="T16">::</text:span><text:span text:style-name="T24">Pay</text:span><text:span text:style-name="T16">() { </text:span><text:span text:style-name="T21">//default constructor<text:line-break/><text:tab/></text:span><text:span text:style-name="T23">name_ </text:span><text:span text:style-name="T24">= </text:span><text:span text:style-name="T19">""</text:span><text:span text:style-name="T16">;<text:line-break/><text:tab/></text:span><text:span text:style-name="T23">salary_ </text:span><text:span text:style-name="T16">= </text:span><text:span text:style-name="T26">0</text:span><text:span text:style-name="T16">;<text:line-break/><text:tab/></text:span><text:span text:style-name="T23">bonus_ </text:span><text:span text:style-name="T16">= </text:span><text:span text:style-name="T26">0</text:span><text:span text:style-name="T16">;<text:line-break/></text:span><text:soft-page-break/><text:span text:style-name="T16">}<text:line-break/></text:span><text:span text:style-name="T20">Pay</text:span><text:span text:style-name="T16">::</text:span><text:span text:style-name="T24">Pay</text:span><text:span text:style-name="T16">(</text:span><text:span text:style-name="T18">const </text:span><text:span text:style-name="T20">string</text:span><text:span text:style-name="T16">&amp; </text:span><text:span text:style-name="T20">name</text:span><text:span text:style-name="T16">, </text:span><text:span text:style-name="T18">double </text:span><text:span text:style-name="T20">salary</text:span><text:span text:style-name="T16">, </text:span><text:span text:style-name="T18">int </text:span><text:span text:style-name="T20">bonus</text:span><text:span text:style-name="T16">) { </text:span><text:span text:style-name="T21">//constructor with parameters<text:line-break/><text:tab/></text:span><text:span text:style-name="T23">name_ </text:span><text:span text:style-name="T24">= </text:span><text:span text:style-name="T20">name</text:span><text:span text:style-name="T16">;<text:line-break/><text:tab/></text:span><text:span text:style-name="T23">salary_ </text:span><text:span text:style-name="T16">= </text:span><text:span text:style-name="T20">salary</text:span><text:span text:style-name="T16">;<text:line-break/><text:tab/></text:span><text:span text:style-name="T23">bonus_ </text:span><text:span text:style-name="T16">= </text:span><text:span text:style-name="T20">bonus</text:span><text:span text:style-name="T16">;<text:line-break/>}<text:line-break/></text:span><text:span text:style-name="T20">Pay</text:span><text:span text:style-name="T16">::</text:span><text:span text:style-name="T24">Pay</text:span><text:span text:style-name="T16">(</text:span><text:span text:style-name="T18">const </text:span><text:span text:style-name="T20">Pay</text:span><text:span text:style-name="T16">&amp; </text:span><text:span text:style-name="T20">other</text:span><text:span text:style-name="T16">) { </text:span><text:span text:style-name="T21">//copy constructor<text:line-break/><text:tab/></text:span><text:span text:style-name="T23">name_ </text:span><text:span text:style-name="T24">= </text:span><text:span text:style-name="T20">other</text:span><text:span text:style-name="T16">.</text:span><text:span text:style-name="T23">name_</text:span><text:span text:style-name="T16">;<text:line-break/><text:tab/></text:span><text:span text:style-name="T23">salary_ </text:span><text:span text:style-name="T16">= </text:span><text:span text:style-name="T20">other</text:span><text:span text:style-name="T16">.</text:span><text:span text:style-name="T23">salary_</text:span><text:span text:style-name="T16">;<text:line-break/><text:tab/></text:span><text:span text:style-name="T23">bonus_ </text:span><text:span text:style-name="T16">= </text:span><text:span text:style-name="T20">other</text:span><text:span text:style-name="T16">.</text:span><text:span text:style-name="T23">bonus_</text:span><text:span text:style-name="T16">;<text:line-break/>}<text:line-break/><text:line-break/></text:span><text:span text:style-name="T20">Pay</text:span><text:span text:style-name="T16">::</text:span><text:span text:style-name="T24">~Pay</text:span><text:span text:style-name="T16">() {} </text:span><text:span text:style-name="T21">//destructor<text:line-break/>//basic getters of private attributes<text:line-break/></text:span><text:span text:style-name="T20">string Pay</text:span><text:span text:style-name="T16">::</text:span><text:span text:style-name="T24">getName</text:span><text:span text:style-name="T16">() </text:span><text:span text:style-name="T18">const </text:span><text:span text:style-name="T16">{<text:line-break/><text:tab/></text:span><text:span text:style-name="T18">return </text:span><text:span text:style-name="T23">name_</text:span><text:span text:style-name="T16">;<text:line-break/>}<text:line-break/></text:span><text:span text:style-name="T18">double </text:span><text:span text:style-name="T20">Pay</text:span><text:span text:style-name="T16">::</text:span><text:span text:style-name="T24">getSalary</text:span><text:span text:style-name="T16">() </text:span><text:span text:style-name="T18">const </text:span><text:span text:style-name="T16">{<text:line-break/><text:tab/></text:span><text:span text:style-name="T18">return </text:span><text:span text:style-name="T23">salary_</text:span><text:span text:style-name="T16">;<text:line-break/>}<text:line-break/></text:span><text:span text:style-name="T18">int </text:span><text:span text:style-name="T20">Pay</text:span><text:span text:style-name="T16">::</text:span><text:span text:style-name="T24">getBonus</text:span><text:span text:style-name="T16">() </text:span><text:span text:style-name="T18">const </text:span><text:span text:style-name="T16">{<text:line-break/><text:tab/></text:span><text:span text:style-name="T18">return </text:span><text:span text:style-name="T23">bonus_</text:span><text:span text:style-name="T16">;<text:line-break/>}<text:line-break/></text:span><text:span text:style-name="T21">//basic setters of private attributes<text:line-break/></text:span><text:span text:style-name="T18">void </text:span><text:span text:style-name="T20">Pay</text:span><text:span text:style-name="T16">::</text:span><text:span text:style-name="T24">setName</text:span><text:span text:style-name="T16">(</text:span><text:span text:style-name="T18">const </text:span><text:span text:style-name="T20">string</text:span><text:span text:style-name="T16">&amp; </text:span><text:span text:style-name="T20">name</text:span><text:span text:style-name="T16">) {<text:line-break/><text:tab/></text:span><text:span text:style-name="T23">name_ </text:span><text:span text:style-name="T24">= </text:span><text:span text:style-name="T20">name</text:span><text:span text:style-name="T16">;<text:line-break/>}<text:line-break/></text:span><text:span text:style-name="T18">void </text:span><text:span text:style-name="T20">Pay</text:span><text:span text:style-name="T16">::</text:span><text:span text:style-name="T24">setSalary</text:span><text:span text:style-name="T16">(</text:span><text:span text:style-name="T18">double </text:span><text:span text:style-name="T20">salary</text:span><text:span text:style-name="T16">) {<text:line-break/><text:tab/></text:span><text:span text:style-name="T23">salary_ </text:span><text:span text:style-name="T16">= </text:span><text:span text:style-name="T20">salary</text:span><text:span text:style-name="T16">;<text:line-break/>}<text:line-break/></text:span><text:span text:style-name="T18">void </text:span><text:span text:style-name="T20">Pay</text:span><text:span text:style-name="T16">::</text:span><text:span text:style-name="T24">setBonus</text:span><text:span text:style-name="T16">(</text:span><text:span text:style-name="T18">int </text:span><text:span text:style-name="T20">bonus</text:span><text:span text:style-name="T16">) {<text:line-break/><text:tab/></text:span><text:span text:style-name="T23">bonus_ </text:span><text:span text:style-name="T16">= </text:span><text:span text:style-name="T20">bonus</text:span><text:span text:style-name="T16">;<text:line-break/>}<text:line-break/></text:span><text:span text:style-name="T21">//Console output method<text:line-break/></text:span><text:span text:style-name="T18">void </text:span><text:span text:style-name="T20">Pay</text:span><text:span text:style-name="T16">::</text:span><text:span text:style-name="T24">show</text:span><text:span text:style-name="T16">() </text:span><text:span text:style-name="T18">const </text:span><text:span text:style-name="T16">{<text:line-break/><text:tab/></text:span><text:span text:style-name="T20">cout </text:span><text:span text:style-name="T24">&lt;&lt; </text:span><text:span text:style-name="T19">"Name: " </text:span><text:span text:style-name="T24">&lt;&lt; </text:span><text:span text:style-name="T23">name_ </text:span><text:span text:style-name="T24">&lt;&lt; endl</text:span><text:span text:style-name="T16">;<text:line-break/><text:tab/></text:span><text:span text:style-name="T20">cout </text:span><text:span text:style-name="T24">&lt;&lt; </text:span><text:span text:style-name="T19">"Salary: " </text:span><text:span text:style-name="T24">&lt;&lt; </text:span><text:span text:style-name="T23">salary_ </text:span><text:span text:style-name="T24">&lt;&lt; endl</text:span><text:span text:style-name="T16">;<text:line-break/></text:span><text:soft-page-break/><text:span text:style-name="T16"><text:tab/></text:span><text:span text:style-name="T20">cout </text:span><text:span text:style-name="T24">&lt;&lt; </text:span><text:span text:style-name="T19">"Bonus: " </text:span><text:span text:style-name="T24">&lt;&lt; </text:span><text:span text:style-name="T23">bonus_ </text:span><text:span text:style-name="T24">&lt;&lt; endl</text:span><text:span text:style-name="T16">;<text:line-break/>}</text:span></text:p>
      <text:p text:style-name="P22" loext:marker-style-name="T25"/>
      <text:p text:style-name="P19">main.cpp:</text:p>
      <text:p text:style-name="P20" loext:marker-style-name="T16"><text:span text:style-name="T17">#include </text:span><text:span text:style-name="T19">"Pay.h"<text:line-break/></text:span><text:span text:style-name="T17">#include </text:span><text:span text:style-name="T19">&lt;iostream&gt;<text:line-break/></text:span><text:span text:style-name="T17">#include </text:span><text:span text:style-name="T19">&lt;string&gt;<text:line-break/></text:span><text:span text:style-name="T18">using namespace </text:span><text:span text:style-name="T20">std</text:span><text:span text:style-name="T16">;<text:line-break/><text:line-break/></text:span><text:span text:style-name="T20">Pay </text:span><text:span text:style-name="T24">makePay</text:span><text:span text:style-name="T16">() { </text:span><text:span text:style-name="T21">//make_ function to create objects of the class<text:line-break/><text:tab/></text:span><text:span text:style-name="T20">string s</text:span><text:span text:style-name="T16">;<text:line-break/><text:tab/></text:span><text:span text:style-name="T18">int </text:span><text:span text:style-name="T20">i</text:span><text:span text:style-name="T16">;<text:line-break/><text:tab/></text:span><text:span text:style-name="T18">double </text:span><text:span text:style-name="T20">d</text:span><text:span text:style-name="T16">;<text:line-break/><text:tab/></text:span><text:span text:style-name="T20">cout </text:span><text:span text:style-name="T24">&lt;&lt; </text:span><text:span text:style-name="T19">"Enter name: "</text:span><text:span text:style-name="T16">; </text:span><text:span text:style-name="T24">getline</text:span><text:span text:style-name="T16">(</text:span><text:span text:style-name="T20">cin</text:span><text:span text:style-name="T16">, </text:span><text:span text:style-name="T20">s</text:span><text:span text:style-name="T16">);<text:line-break/><text:tab/></text:span><text:span text:style-name="T20">cout </text:span><text:span text:style-name="T24">&lt;&lt; </text:span><text:span text:style-name="T19">"Enter salary: "</text:span><text:span text:style-name="T16">; </text:span><text:span text:style-name="T20">cin </text:span><text:span text:style-name="T24">&gt;&gt; </text:span><text:span text:style-name="T20">d</text:span><text:span text:style-name="T16">;<text:line-break/><text:tab/></text:span><text:span text:style-name="T20">cout </text:span><text:span text:style-name="T24">&lt;&lt; </text:span><text:span text:style-name="T19">"Enter bonus: "</text:span><text:span text:style-name="T16">; </text:span><text:span text:style-name="T20">cin </text:span><text:span text:style-name="T24">&gt;&gt; </text:span><text:span text:style-name="T20">i</text:span><text:span text:style-name="T16">;<text:line-break/><text:tab/></text:span><text:span text:style-name="T20">Pay p</text:span><text:span text:style-name="T24">(</text:span><text:span text:style-name="T20">s</text:span><text:span text:style-name="T16">, </text:span><text:span text:style-name="T20">d</text:span><text:span text:style-name="T16">, </text:span><text:span text:style-name="T20">i</text:span><text:span text:style-name="T24">)</text:span><text:span text:style-name="T16">;<text:line-break/> <text:s text:c="3"/></text:span><text:span text:style-name="T18">return </text:span><text:span text:style-name="T20">p</text:span><text:span text:style-name="T16">;<text:line-break/>}<text:line-break/><text:line-break/></text:span><text:span text:style-name="T18">void </text:span><text:span text:style-name="T24">printPay</text:span><text:span text:style-name="T16">(</text:span><text:span text:style-name="T20">Pay p</text:span><text:span text:style-name="T16">) { </text:span><text:span text:style-name="T21">//for printing into console<text:line-break/><text:tab/></text:span><text:span text:style-name="T20">p</text:span><text:span text:style-name="T16">.</text:span><text:span text:style-name="T24">show</text:span><text:span text:style-name="T16">();<text:line-break/>}<text:line-break/><text:line-break/></text:span><text:span text:style-name="T18">int </text:span><text:span text:style-name="T24">main</text:span><text:span text:style-name="T16">()<text:line-break/>{<text:line-break/><text:tab/></text:span><text:span text:style-name="T20">Pay p1</text:span><text:span text:style-name="T16">; </text:span><text:span text:style-name="T21">//default object<text:line-break/><text:tab/></text:span><text:span text:style-name="T20">p1</text:span><text:span text:style-name="T16">.</text:span><text:span text:style-name="T24">show</text:span><text:span text:style-name="T16">();<text:line-break/><text:line-break/><text:tab/></text:span><text:span text:style-name="T20">Pay p2</text:span><text:span text:style-name="T24">(</text:span><text:span text:style-name="T19">"John Doe"</text:span><text:span text:style-name="T16">, </text:span><text:span text:style-name="T26">50000</text:span><text:span text:style-name="T16">, </text:span><text:span text:style-name="T26">10</text:span><text:span text:style-name="T24">)</text:span><text:span text:style-name="T16">; </text:span><text:span text:style-name="T21">//object with parameters<text:line-break/><text:tab/></text:span><text:span text:style-name="T20">p2</text:span><text:span text:style-name="T16">.</text:span><text:span text:style-name="T24">show</text:span><text:span text:style-name="T16">();<text:line-break/><text:line-break/><text:tab/></text:span><text:span text:style-name="T20">Pay p3 </text:span><text:span text:style-name="T24">= </text:span><text:span text:style-name="T20">p2</text:span><text:span text:style-name="T16">; </text:span><text:span text:style-name="T21">//copy object<text:line-break/><text:tab/></text:span><text:span text:style-name="T20">p3</text:span><text:span text:style-name="T16">.</text:span><text:span text:style-name="T24">show</text:span><text:span text:style-name="T16">();<text:line-break/><text:tab/></text:span><text:span text:style-name="T20">p3</text:span><text:span text:style-name="T16">.</text:span><text:span text:style-name="T24">setName</text:span><text:span text:style-name="T16">(</text:span><text:span text:style-name="T19">"Jane Smith"</text:span><text:span text:style-name="T16">); </text:span><text:span text:style-name="T21">//changing object's fields using setters<text:line-break/><text:tab/></text:span><text:span text:style-name="T20">p3</text:span><text:span text:style-name="T16">.</text:span><text:span text:style-name="T24">setSalary</text:span><text:span text:style-name="T16">(</text:span><text:span text:style-name="T26">60000</text:span><text:span text:style-name="T16">);<text:line-break/><text:tab/></text:span><text:span text:style-name="T20">p3</text:span><text:span text:style-name="T16">.</text:span><text:span text:style-name="T24">setBonus</text:span><text:span text:style-name="T16">(</text:span><text:span text:style-name="T26">15</text:span><text:span text:style-name="T16">);<text:line-break/></text:span><text:soft-page-break/><text:span text:style-name="T16"><text:tab/></text:span><text:span text:style-name="T24">printPay</text:span><text:span text:style-name="T16">(</text:span><text:span text:style-name="T20">p3</text:span><text:span text:style-name="T16">); </text:span><text:span text:style-name="T21">//printing function<text:line-break/><text:line-break/><text:tab/></text:span><text:span text:style-name="T20">p1 </text:span><text:span text:style-name="T24">= makePay</text:span><text:span text:style-name="T16">(); </text:span><text:span text:style-name="T21">//make_ function to reach for user input<text:line-break/><text:tab/></text:span><text:span text:style-name="T20">p1</text:span><text:span text:style-name="T16">.</text:span><text:span text:style-name="T24">show</text:span><text:span text:style-name="T16">(); </text:span><text:span text:style-name="T21">//also console output<text:line-break/><text:tab/></text:span><text:span text:style-name="T18">return </text:span><text:span text:style-name="T26">0</text:span><text:span text:style-name="T16">;<text:line-break/>}</text:span></text:p>
      <text:p text:style-name="P23" loext:marker-style-name="T25"/>
      <text:p text:style-name="P24" loext:marker-style-name="T1">Решение</text:p>
      <text:p text:style-name="P25" loext:marker-style-name="T1"><draw:frame draw:style-name="fr2" draw:name="Изображение4" text:anchor-type="as-char" svg:width="3.689in" svg:height="5.2028in" draw:z-index="1"><draw:image xlink:href="Pictures/1000000100000108000001AF6086013C.png" xlink:type="simple" xlink:show="embed" xlink:actuate="onLoad" draw:mime-type="image/png"/></draw:frame></text:p>
      <text:p text:style-name="P26" loext:marker-style-name="T1">Контрольные вопросы</text:p>
      <text:p text:style-name="P27">1. Для чего нужен конструктор? – <text:span text:style-name="T27">для инициализации полей экземпляра класса при его создании</text:span></text:p>
      <text:p text:style-name="P27">2. Сколько типов конструкторов существует в С ? – <text:span text:style-name="T27">конструктор по умолчанию, конструктор параметризованный, конструктор копирования</text:span></text:p>
      <text:p text:style-name="P27">3. Для чего используется деструктор? В каких случаях деструктор описывается явно? – <text:span text:style-name="T27">для очистки памяти отведенной под поля экземпляра класса в конце его жизни. Явное определение необходимо при работе с динамически выделяемой памятью или другой системой, для которой неявное освобождение не определено</text:span></text:p>
      <text:p text:style-name="P27">4. Для чего используется конструктор без параметров? Конструктор с параметрами? Конструктор копирования? – <text:span text:style-name="T27">конструктор без параметров используется для задания значения полей экземпляра класса по умолчанию. Конструктор с параметрами позволяет создать объект по заданным несвязным членам набора данных. Конструктор копирования необходим для создания копий экземпляров класса и передачи их в функции по значению</text:span></text:p>
      <text:p text:style-name="P27">5. В каких случаях вызывается конструктор копирования? – <text:span text:style-name="T27">при попытке создать копию другого экземпляра того же класса через оператор присваивания или при передачи объекта класса в функцию как аргумента по значению или при создании временных объектов</text:span></text:p>
      <text:p text:style-name="P27">6. Перечислить свойства конструкторов. – <text:span text:style-name="T28">не возвращают значение, может быть определено несколько конструкторов с разными параметрами, параметры могут иметь любой тип кроме самого класса, если конструктор не определен - компилятор создает его по умолчанию, конструкторы не наследуются, конструктор не может иметь модификаторов </text:span><text:span text:style-name="T29">const, virtual, static</text:span></text:p>
      <text:p text:style-name="P27">7. Перечислить свойства деструкторов. – <text:span text:style-name="T28">вызываются при выходе из блока в котором был объявлен уничтожаемый экземпляр, для объектов через указатели вызывается неявно при </text:span><text:span text:style-name="T29">delete, </text:span><text:span text:style-name="T28">не имеет аргументов и возвращаемого значения, не наследуется, может быть виртуальным, не может быть константным или статическим</text:span></text:p>
      <text:p text:style-name="P28">8. К каким атрибутам имеют доступ методы класса? – <text:span text:style-name="T28">ко всем, приватным и публичным</text:span></text:p>
      <text:p text:style-name="P28">9. Что представляет собой указатель this? – <text:span text:style-name="T28">адрес текущего объекта, от которого вызван метод</text:span></text:p>
      <text:p text:style-name="P27">10. Какая разница между методами определенными внутри класса и вне класса? – <text:span text:style-name="T28">методы внутри класса могут свободно получать доступ к приватным полям класса</text:span></text:p>
      <text:p text:style-name="P27">11. Какое значение возвращает конструктор? – <text:span text:style-name="T28">не возвращает</text:span></text:p>
      <text:p text:style-name="P27">12. Какие методы создаются по умолчанию? – <text:span text:style-name="T28">конструктор, деструктор</text:span></text:p>
      <text:p text:style-name="P27"><text:soft-page-break/>13. Какое значение возвращает деструктор? – <text:span text:style-name="T28">не возвращает</text:span></text:p>
      <text:p text:style-name="P27">14. Дано описание класса class Student { string name; int group; public: student(string, int); student(const student&amp;) ~student(); }; Какой метод отсутствует в описании класса? – <text:span text:style-name="T28">конструктор по умолчанию</text:span></text:p>
      <text:p text:style-name="P27">15. Какой метод будет вызван при выполнении следующих операторов: student*s; s=new student; - <text:span text:style-name="T28">конструктор по умолчанию</text:span></text:p>
      <text:p text:style-name="P27">16. Какой метод будет вызван при выполнении следующих операторов: student s(“Ivanov”,20); - <text:span text:style-name="T28">параметризованный конструктор</text:span></text:p>
      <text:p text:style-name="P27">17. Какие методы будут вызваны при выполнении следующих операторов: student s1(“Ivanov”,20); student s2=s1; - <text:span text:style-name="T28">параметризованный конструктор и конструктор копирования</text:span></text:p>
      <text:p text:style-name="P27">18. Какие методы будут вызваны при выполнении следующих операторов: student s1(“Ivanov”,20); student s2; s2=s1; - <text:span text:style-name="T28">конструктор параметризованный, затем по умолчанию, затем копирования</text:span></text:p>
      <text:p text:style-name="P27">19. Какой конструктор будет использоваться при передаче параметра в функцию print(): void print(student a) {a.show();} - <text:span text:style-name="T28">конструктор копирования</text:span></text:p>
      <text:p text:style-name="P27">20. Класс описан следующим образом: class Student { string name; int age; public: void set_name(string); void set_age(int ); ….. }; Student p; Каким образом можно присвоить новое значение атрибуту name объекта р? – <text:span text:style-name="T29">p.set_name(something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50</meta:editing-cycles>
    <meta:creation-date>2025-12-13T14:37:00</meta:creation-date>
    <dc:date>2026-05-03T10:23:00.982721546</dc:date>
    <meta:editing-duration>PT16H42M16S</meta:editing-duration>
    <meta:generator>LibreOffice/25.8.5.2$Linux_X86_64 LibreOffice_project/580$Build-2</meta:generator>
    <meta:document-statistic meta:table-count="0" meta:image-count="2" meta:object-count="0" meta:page-count="10" meta:paragraph-count="61" meta:word-count="992" meta:character-count="7544" meta:non-whitespace-character-count="6532"/>
    <meta:user-defined meta:name="AppVersion">16.0000</meta:user-defined>
    <meta:template xlink:type="simple" xlink:actuate="onRequest" xlink:title="Normal" xlink:href=""/>
  </office:meta>
</office:document-meta>
</file>