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800000137D3C1D66A.png" manifest:media-type="image/png"/>
  <manifest:file-entry manifest:full-path="Pictures/100000010000026800000258E46DF0CA.png" manifest:media-type="image/png"/>
  <manifest:file-entry manifest:full-path="Pictures/100000010000030C0000026E4705BFE0.png" manifest:media-type="image/png"/>
  <manifest:file-entry manifest:full-path="Pictures/100000010000031500000240B39B9927.png" manifest:media-type="image/png"/>
  <manifest:file-entry manifest:full-path="Pictures/10000001000001DF0000016D5D2CD70A.png" manifest:media-type="image/png"/>
  <manifest:file-entry manifest:full-path="Pictures/10000000000003150000024BAC7BCE82.png" manifest:media-type="image/png"/>
  <manifest:file-entry manifest:full-path="Pictures/1000000100000EBC00000BB4BEC0CEA9.png" manifest:media-type="image/png"/>
  <manifest:file-entry manifest:full-path="Pictures/10000000000004C30000023574091EA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dc61f" style:font-size-asian="14pt" style:font-name-complex="Times New Roman1" style:font-size-complex="14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officeooo:rsid="0017070d" officeooo:paragraph-rsid="0017070d"/>
    </style:style>
    <style:style style:name="P8" style:family="paragraph" style:parent-style-name="List_20_Paragraph">
      <style:paragraph-properties fo:margin-left="0in" fo:text-align="justify" style:justify-single-word="false" fo:text-indent="0.4925in" style:auto-text-indent="false" fo:break-before="page"/>
      <style:text-properties officeooo:paragraph-rsid="00482439"/>
    </style:style>
    <style:style style:name="P9" style:family="paragraph" style:parent-style-name="List_20_Paragraph" style:list-style-name="L1">
      <style:paragraph-properties fo:text-align="justify" style:justify-single-word="false"/>
      <style:text-properties fo:color="#000000" loext:opacity="100%" style:font-name="Times New Roman" fo:font-size="12pt" fo:language="en" fo:country="US" fo:font-style="normal" fo:font-weight="normal" officeooo:rsid="004af9d1" officeooo:paragraph-rsid="005efc88" style:font-size-asian="12pt" style:font-style-asian="normal" style:font-weight-asian="normal" style:font-name-complex="Times New Roman1" style:font-size-complex="14pt" style:font-weight-complex="normal"/>
    </style:style>
    <style:style style:name="P10" style:family="paragraph" style:parent-style-name="List_20_Paragraph" style:list-style-name="L1">
      <style:paragraph-properties fo:text-align="justify" style:justify-single-word="false"/>
      <style:text-properties fo:color="#000000" loext:opacity="100%" style:font-name="Times New Roman" fo:font-size="12pt" fo:language="en" fo:country="US" fo:font-style="normal" fo:font-weight="normal" officeooo:rsid="004af9d1" officeooo:paragraph-rsid="00543dac" style:font-size-asian="12pt" style:font-style-asian="normal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margin-left="0in" fo:text-align="justify" style:justify-single-word="false" fo:text-indent="0in" style:auto-text-indent="false"/>
      <style:text-properties fo:color="#000000" loext:opacity="100%" style:font-name="Times New Roman" fo:font-size="12pt" fo:font-style="normal" fo:font-weight="normal" officeooo:paragraph-rsid="004af9d1" style:font-size-asian="12pt" style:font-style-asian="normal" style:font-weight-asian="normal"/>
    </style:style>
    <style:style style:name="P12" style:family="paragraph" style:parent-style-name="List_20_Paragraph">
      <style:paragraph-properties fo:margin-left="0in" fo:text-align="justify" style:justify-single-word="false" fo:text-indent="0.4925in" style:auto-text-indent="false"/>
    </style:style>
    <style:style style:name="P13" style:family="paragraph" style:parent-style-name="Text_20_body" style:list-style-name="WWNum25">
      <style:paragraph-properties fo:margin-left="0.4925in" fo:text-align="justify" style:justify-single-word="false" fo:text-indent="-0.4925in" style:auto-text-indent="false"/>
      <style:text-properties style:font-name="Times New Roman" fo:font-size="14pt" fo:language="ru" fo:country="RU" officeooo:rsid="00618cf1" officeooo:paragraph-rsid="00618cf1" style:font-size-asian="14pt" style:font-name-complex="Times New Roman1" style:font-size-complex="14pt"/>
    </style:style>
    <style:style style:name="P14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fo:language="en" fo:country="US" fo:font-weight="bold" officeooo:rsid="003adf73" officeooo:paragraph-rsid="003adf73" style:font-size-asian="14pt" style:font-weight-asian="bold" style:font-name-complex="Times New Roman1" style:font-size-complex="14pt" style:font-weight-complex="bold"/>
    </style:style>
    <style:style style:name="P15" style:family="paragraph" style:parent-style-name="List_20_Paragraph">
      <style:paragraph-properties fo:margin-left="0in" fo:text-align="center" style:justify-single-word="false"/>
      <style:text-properties style:font-name="Times New Roman" fo:font-size="14pt" fo:font-weight="bold" officeooo:paragraph-rsid="0033bc22" style:font-size-asian="14pt" style:font-weight-asian="bold" style:font-name-complex="Times New Roman1" style:font-size-complex="14pt" style:font-weight-complex="bold"/>
    </style:style>
    <style:style style:name="P16" style:family="paragraph" style:parent-style-name="List_20_Paragraph">
      <style:paragraph-properties fo:margin-left="0in" fo:text-align="center" style:justify-single-word="false"/>
      <style:text-properties style:font-name="Times New Roman" fo:font-size="14pt" fo:font-weight="bold" officeooo:rsid="00663ec8" officeooo:paragraph-rsid="00663ec8" style:font-size-asian="14pt" style:font-weight-asian="bold" style:font-name-complex="Times New Roman1" style:font-size-complex="14pt" style:font-weight-complex="bold"/>
    </style:style>
    <style:style style:name="P17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officeooo:paragraph-rsid="001bab08" style:font-size-asian="14pt" style:font-name-complex="Times New Roman1" style:font-size-complex="14pt"/>
    </style:style>
    <style:style style:name="P18" style:family="paragraph" style:parent-style-name="Standard">
      <style:text-properties fo:color="#080808" loext:opacity="100%" style:font-name="JetBrains Mono" fo:font-size="10pt" fo:font-style="normal" fo:font-weight="bold" officeooo:rsid="00618cf1" officeooo:paragraph-rsid="00618cf1" style:font-size-asian="10pt" style:font-style-asian="normal" style:font-weight-asian="bold" style:font-weight-complex="bold"/>
    </style:style>
    <style:style style:name="P19" style:family="paragraph" style:parent-style-name="Standard">
      <loext:graphic-properties draw:fill="solid" draw:fill-color="#ffffff"/>
      <style:paragraph-properties fo:background-color="#ffffff" fo:padding="0in" fo:border="none" style:shadow="none"/>
    </style:style>
    <style:style style:name="P20" style:family="paragraph" style:parent-style-name="List_20_Paragraph">
      <style:paragraph-properties fo:margin-left="0in" fo:text-align="center" style:justify-single-word="false"/>
      <style:text-properties officeooo:paragraph-rsid="001a7dbe"/>
    </style:style>
    <style:style style:name="P21" style:family="paragraph" style:parent-style-name="List_20_Paragraph">
      <style:paragraph-properties fo:margin-left="0in" fo:text-align="center" style:justify-single-word="false" fo:break-before="column"/>
      <style:text-properties officeooo:paragraph-rsid="001a7dbe"/>
    </style:style>
    <style:style style:name="P22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fo:font-weight="bold" officeooo:rsid="003d601d" officeooo:paragraph-rsid="003d601d" style:font-size-asian="14pt" style:font-weight-asian="bold" style:font-name-complex="Times New Roman1" style:font-size-complex="14pt" style:font-weight-complex="bold"/>
    </style:style>
    <style:style style:name="P23" style:family="paragraph" style:parent-style-name="List_20_Paragraph">
      <style:paragraph-properties fo:margin-left="0in" fo:text-align="start" style:justify-single-word="false"/>
      <style:text-properties style:font-name="Times New Roman" fo:font-size="14pt" fo:language="ru" fo:country="RU" fo:font-weight="normal" officeooo:rsid="00419a16" officeooo:paragraph-rsid="004ba345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paragraph-rsid="005fa804"/>
    </style:style>
    <style:style style:name="P25" style:family="paragraph" style:parent-style-name="Standard">
      <style:paragraph-properties fo:margin-left="0in" fo:text-align="start" style:justify-single-word="false"/>
      <style:text-properties style:font-name="Times New Roman" fo:font-size="14pt" fo:language="ru" fo:country="RU" fo:font-weight="normal" officeooo:rsid="00419a16" officeooo:paragraph-rsid="004ba345" style:font-size-asian="14pt" style:font-weight-asian="normal" style:font-name-complex="Times New Roman1" style:font-size-complex="14pt" style:font-weight-complex="normal"/>
    </style:style>
    <style:style style:name="P26" style:family="paragraph" style:parent-style-name="List_20_Paragraph">
      <style:paragraph-properties fo:margin-left="0in" fo:text-align="start" style:justify-single-word="false"/>
      <style:text-properties style:font-name="Times New Roman" fo:font-size="14pt" fo:language="ru" fo:country="RU" fo:font-weight="normal" officeooo:rsid="00419a16" officeooo:paragraph-rsid="005efc88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ru" fo:country="RU" fo:font-weight="bold" officeooo:rsid="005315d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officeooo:rsid="001a7dbe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0" style:family="text">
      <style:text-properties fo:font-weight="bold" officeooo:rsid="001c65e1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80808" loext:opacity="100%" style:font-name="JetBrains Mono" fo:font-size="12pt" fo:font-style="normal" fo:font-weight="normal" style:font-size-asian="12pt" style:font-style-asian="normal" style:font-weight-asian="normal"/>
    </style:style>
    <style:style style:name="T13" style:family="text">
      <style:text-properties fo:color="#808080" loext:opacity="100%" style:font-name="JetBrains Mono" fo:font-size="12pt" fo:font-style="normal" fo:font-weight="normal" style:font-size-asian="12pt" style:font-style-asian="normal" style:font-weight-asian="normal"/>
    </style:style>
    <style:style style:name="T14" style:family="text">
      <style:text-properties fo:color="#9e880d" loext:opacity="100%" style:font-name="JetBrains Mono" fo:font-size="12pt" fo:font-style="normal" fo:font-weight="normal" style:font-size-asian="12pt" style:font-style-asian="normal" style:font-weight-asian="normal"/>
    </style:style>
    <style:style style:name="T15" style:family="text">
      <style:text-properties fo:color="#067d17" loext:opacity="100%" style:font-name="JetBrains Mono" fo:font-size="12pt" fo:font-style="normal" fo:font-weight="normal" style:font-size-asian="12pt" style:font-style-asian="normal" style:font-weight-asian="normal"/>
    </style:style>
    <style:style style:name="T16" style:family="text">
      <style:text-properties fo:color="#8c8c8c" loext:opacity="100%" style:font-name="JetBrains Mono" fo:font-size="12pt" fo:font-style="italic" fo:font-weight="normal" style:font-size-asian="12pt" style:font-style-asian="italic" style:font-weight-asian="normal"/>
    </style:style>
    <style:style style:name="T17" style:family="text">
      <style:text-properties fo:color="#0033b3" loext:opacity="100%" style:font-name="JetBrains Mono" fo:font-size="12pt" fo:font-style="normal" fo:font-weight="normal" style:font-size-asian="12pt" style:font-style-asian="normal" style:font-weight-asian="normal"/>
    </style:style>
    <style:style style:name="T18" style:family="text">
      <style:text-properties fo:color="#00627a" loext:opacity="100%" style:font-name="JetBrains Mono" fo:font-size="12pt" fo:font-style="normal" fo:font-weight="normal" style:font-size-asian="12pt" style:font-style-asian="normal" style:font-weight-asian="normal"/>
    </style:style>
    <style:style style:name="T19" style:family="text">
      <style:text-properties fo:color="#000000" loext:opacity="100%" style:font-name="JetBrains Mono" fo:font-size="12pt" fo:font-style="normal" fo:font-weight="normal" style:font-size-asian="12pt" style:font-style-asian="normal" style:font-weight-asian="normal"/>
    </style:style>
    <style:style style:name="T20" style:family="text">
      <style:text-properties fo:color="#1750eb" loext:opacity="100%" style:font-name="JetBrains Mono" fo:font-size="12pt" fo:font-style="normal" fo:font-weight="normal" style:font-size-asian="12pt" style:font-style-asian="normal" style:font-weight-asian="normal"/>
    </style:style>
    <style:style style:name="T21" style:family="text">
      <style:text-properties fo:color="#871094" loext:opacity="100%" style:font-name="JetBrains Mono" fo:font-size="12pt" fo:font-style="normal" fo:font-weight="normal" style:font-size-asian="12pt" style:font-style-asian="normal" style:font-weight-asian="normal"/>
    </style:style>
    <style:style style:name="T22" style:family="text">
      <style:text-properties fo:color="#0037a6" loext:opacity="100%" style:font-name="JetBrains Mono" fo:font-size="12pt" fo:font-style="normal" fo:font-weight="normal" style:font-size-asian="12pt" style:font-style-asian="normal" style:font-weight-asian="normal"/>
    </style:style>
    <style:style style:name="T23" style:family="text">
      <style:text-properties fo:color="#871094" loext:opacity="100%" style:font-name="JetBrains Mono" fo:font-size="12pt" fo:font-style="italic" fo:font-weight="normal" style:font-size-asian="12pt" style:font-style-asian="italic" style:font-weight-asian="normal"/>
    </style:style>
    <style:style style:name="T24" style:family="text">
      <style:text-properties fo:font-variant="normal" fo:text-transform="none" fo:color="#222222" loext:opacity="100%" fo:font-family="'times new roman', serif" fo:letter-spacing="normal" fo:font-style="normal" fo:font-weight="normal" officeooo:rsid="005efc88"/>
    </style:style>
    <style:style style:name="T25" style:family="text">
      <style:text-properties fo:font-variant="normal" fo:text-transform="none" fo:color="#222222" loext:opacity="100%" fo:font-family="'times new roman', serif" fo:letter-spacing="normal" fo:font-style="normal" fo:font-weight="normal" officeooo:rsid="005d13f7"/>
    </style:style>
    <style:style style:name="T26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font-variant="normal" fo:text-transform="none" fo:color="#0033b3" loext:opacity="100%" fo:font-family="'JetBrains Mono'" fo:font-size="10pt" fo:letter-spacing="normal" fo:font-style="normal" fo:font-weight="normal" officeooo:rsid="005d13f7" style:font-size-asian="10pt" style:font-style-asian="normal" style:font-weight-asian="normal"/>
    </style:style>
    <style:style style:name="T28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080808" loext:opacity="100%" style:font-name="JetBrains Mono" fo:font-size="10pt" fo:font-style="normal" fo:font-weight="normal" officeooo:rsid="005fa804" style:font-size-asian="10pt" style:font-style-asian="normal" style:font-weight-asian="normal"/>
    </style:style>
    <style:style style:name="T32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34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font-variant="normal" fo:text-transform="none" fo:color="#000000" loext:opacity="100%" fo:font-family="'JetBrains Mono'" fo:font-size="10pt" fo:letter-spacing="normal" fo:font-style="normal" fo:font-weight="normal" officeooo:rsid="005d13f7" style:font-size-asian="10pt" style:font-style-asian="normal" style:font-weight-asian="normal"/>
    </style:style>
    <style:style style:name="T36" style:family="text">
      <style:text-properties fo:font-variant="normal" fo:text-transform="none" fo:color="#222222" loext:opacity="100%" fo:font-family="'times new roman', serif" fo:letter-spacing="normal" fo:font-style="normal" fo:font-weight="normal" officeooo:rsid="005fa80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217066912"/><text:span text:style-name="T1">Министерство науки и высшего образования Российской Федерации</text:span><text:span text:style-name="T1"/></text:p>
      <text:p text:style-name="P1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1" loext:marker-style-name="T1"><text:span text:style-name="T1">«Пермский национальный исследовательский политехнический университет»</text:span><text:span text:style-name="T1"/></text:p>
      <text:p text:style-name="P2" loext:marker-style-name="T2"/>
      <text:p text:style-name="P1" loext:marker-style-name="T2"><text:span text:style-name="T2">Электротехнический факультет</text:span><text:span text:style-name="T2"/></text:p>
      <text:p text:style-name="Standard" loext:marker-style-name="T3"><text:span text:style-name="T2">Выпускающая кафедра: </text:span><text:span text:style-name="T3">информационные технологии и автоматизированные системы (ИТАС)</text:span></text:p>
      <text:p text:style-name="Standard" loext:marker-style-name="T3"><text:span text:style-name="T2">Направление подготовки: </text:span><text:span text:style-name="T3">09.03.04 Программная инженерия</text:span></text:p>
      <text:p text:style-name="P3" loext:marker-style-name="T2"/>
      <text:p text:style-name="P4" loext:marker-style-name="T1"/>
      <text:p text:style-name="P1" loext:marker-style-name="T1"><text:span text:style-name="T1">ОТЧЕТ</text:span><text:span text:style-name="T1"/></text:p>
      <text:p text:style-name="P1" loext:marker-style-name="T4"><text:span text:style-name="T1">Лабораторная работа</text:span></text:p>
      <text:p text:style-name="P1" loext:marker-style-name="T1"><text:span text:style-name="T1">«</text:span><text:span text:style-name="T5">Программа, управляемая событиями</text:span><text:span text:style-name="T1">»</text:span></text:p>
      <text:p text:style-name="P1" loext:marker-style-name="T1"><text:span text:style-name="T1">По дисциплине «Основы алгоритмизации и программирования»</text:span><text:span text:style-name="T1"/></text:p>
      <text:p text:style-name="P5" loext:marker-style-name="T6"/>
      <text:p text:style-name="P2" loext:marker-style-name="T2"/>
      <text:p text:style-name="P2" loext:marker-style-name="T2"/>
      <text:p text:style-name="P2" loext:marker-style-name="T2"/>
      <text:p text:style-name="P6" loext:marker-style-name="T2"><text:span text:style-name="T2">Выполнил студент группы РИС-25-2б</text:span><text:span text:style-name="T2"/></text:p>
      <text:p text:style-name="P7" loext:marker-style-name="T2"><text:span text:style-name="T2">Фокин Алексей Дмитриевич</text:span></text:p>
      <text:p text:style-name="P6" loext:marker-style-name="T2"><text:span text:style-name="T2">Принял: Доц. Полякова О.А.</text:span><text:span text:style-name="T2"/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1" loext:marker-style-name="T7"><text:span text:style-name="T2">Пермь 202</text:span><text:span text:style-name="T8">6</text:span></text:p>
      <text:p text:style-name="P8" loext:marker-style-name="T9"><text:span text:style-name="T1">Постановка задачи</text:span><text:span text:style-name="T9">:</text:span></text:p>
      <text:list text:style-name="L1">
        <text:list-item>
          <text:p text:style-name="P9">Определить иерархию пользовательских классов (см. лабораторную работу №5).</text:p>
          <text:p text:style-name="P9">Во главе иерархии должен стоять абстрактный класс с чисто виртуальными</text:p>
          <text:p text:style-name="P10">методами для ввода и вывода информации об атрибутах объектов.</text:p>
        </text:list-item>
        <text:list-item>
          <text:p text:style-name="P10">Реализовать конструкторы, деструктор, операцию присваивания, селекторы и модификаторы.</text:p>
        </text:list-item>
        <text:list-item>
          <text:p text:style-name="P10">Определить класс-группу на основе структуры, указанной в варианте.</text:p>
        </text:list-item>
        <text:list-item>
          <text:p text:style-name="P10">Для группы реализовать конструкторы, деструктор, методы для добавления и удаления элементов в группу, метод для просмотра группы, перегрузить операцию для получения информации о размере группы.</text:p>
        </text:list-item>
        <text:list-item>
          <text:p text:style-name="P10">Определить класс Диалог – наследника группы, в котором реализовать методы для обработки событий.</text:p>
        </text:list-item>
        <text:list-item>
          <text:p text:style-name="P10">Добавить методы для обработки событий группой и объектами пользовательских классов.</text:p>
        </text:list-item>
        <text:list-item>
          <text:p text:style-name="P10">Написать тестирующую программу.</text:p>
        </text:list-item>
        <text:list-item>
          <text:p text:style-name="P10">Нарисовать диаграмму классов и диаграмму объектов.</text:p>
        </text:list-item>
      </text:list>
      <text:p text:style-name="P11"/>
      <text:p text:style-name="P11"><draw:frame draw:style-name="fr1" draw:name="Image1" text:anchor-type="char" svg:width="6.4965in" svg:height="3.0374in" draw:z-index="1"><draw:image xlink:href="Pictures/10000000000004C30000023574091EA2.png" xlink:type="simple" xlink:show="embed" xlink:actuate="onLoad" draw:mime-type="image/png"/></draw:frame></text:p>
      <text:p text:style-name="P12" loext:marker-style-name="T9"><text:span text:style-name="T1">Анализ задачи</text:span><text:span text:style-name="T9">:</text:span></text:p>
      <text:list text:style-name="WWNum25">
        <text:list-item>
          <text:p text:style-name="P13">Реализуем базовый чисто виртуальный класс Объект</text:p>
        </text:list-item>
        <text:list-item>
          <text:p text:style-name="P13">Реализуем его наследника, класс Печатное Издание</text:p>
        </text:list-item>
        <text:list-item>
          <text:p text:style-name="P13">Реализуем его наследника, класс Журнал</text:p>
        </text:list-item>
        <text:list-item>
          <text:p text:style-name="P13">Реализуем Связный Список Объектов</text:p>
        </text:list-item>
        <text:list-item>
          <text:p text:style-name="P13">Реализуем структуру События, которая будет осуществлять сообщение между частями класс-группы</text:p>
        </text:list-item>
        <text:list-item>
          <text:p text:style-name="P13"><text:soft-page-break/>Реализуем класс Диалог (наследник), который будет осуществлять обработку событий в класс-группе, для него реализуем методы конструкции, деструкции, метод-геттер события, метод-исполнитель, метод-хендлер, метод-очиститель события, метод Valid проверяющий, закончился Диалог или нет, а также метод окончания Диалога. Уникальный аттрибут Диалога, отличающий его от Списка — EndState, индикатор того, окончилась обработка событий или нет</text:p>
        </text:list-item>
      </text:list>
      <text:p text:style-name="P14">UML</text:p>
      <text:p text:style-name="P15" loext:marker-style-name="T1"><draw:frame draw:style-name="fr2" draw:name="Изображение1" text:anchor-type="as-char" svg:y="-2.5866in" svg:width="5.7339in" svg:height="4.3909in" draw:z-index="0"><draw:image xlink:href="Pictures/1000000100000EBC00000BB4BEC0CEA9.png" xlink:type="simple" xlink:show="embed" xlink:actuate="onLoad" draw:mime-type="image/png"/></draw:frame></text:p>
      <text:p text:style-name="P16" loext:marker-style-name="T1">Object, Print, Magazin — все члены одной иерархии наследования</text:p>
      <text:p text:style-name="P16" loext:marker-style-name="T1">Object может хранится в Node, но может существовать автономно</text:p>
      <text:p text:style-name="P16" loext:marker-style-name="T1">Node хранится в List, не может существовать автономно</text:p>
      <text:p text:style-name="P16" loext:marker-style-name="T1">List является родительским классом Dialog, Dialog расширяет его функционал</text:p>
      <text:p text:style-name="P16" loext:marker-style-name="T1"/>
      <text:p text:style-name="P16" loext:marker-style-name="T1">Ни один из перечисленных классов не хранит TEvent, но TEvent может вызывать в них изменения/заставлять выполнять некие действия =&gt; Все классы зависят от TEvent</text:p>
      <text:p text:style-name="P17" loext:marker-style-name="T1"><text:span text:style-name="T10">К</text:span><text:span text:style-name="T11">од</text:span></text:p>
      <text:p text:style-name="P18">main.cpp</text:p>
      <text:p text:style-name="P19" loext:marker-style-name="T12"><text:span text:style-name="T13">#include &lt;iostream&gt;<text:line-break/></text:span><text:span text:style-name="T14">#include </text:span><text:span text:style-name="T15">"Dialog.h"<text:line-break/><text:line-break/></text:span><text:span text:style-name="T16">//Entry point - create and run dialog interface<text:line-break/></text:span><text:span text:style-name="T17">int </text:span><text:span text:style-name="T18">main</text:span><text:span text:style-name="T12">()<text:line-break/>{<text:line-break/> <text:s text:c="3"/></text:span><text:span text:style-name="T19">Dialog D</text:span><text:span text:style-name="T12">;<text:line-break/> <text:s text:c="3"/></text:span><text:span text:style-name="T19">D</text:span><text:span text:style-name="T12">.</text:span><text:span text:style-name="T18">Execute</text:span><text:span text:style-name="T12">(); <text:s/></text:span><text:span text:style-name="T16">//start interactive command loop<text:line-break/></text:span><text:span text:style-name="T12">}</text:span></text:p>
      <text:p text:style-name="P18">Object.h</text:p>
      <text:p text:style-name="P19" loext:marker-style-name="T12"><text:span text:style-name="T14">#pragma </text:span><text:span text:style-name="T17">once<text:line-break/></text:span><text:span text:style-name="T14">#include </text:span><text:span text:style-name="T15">"Event.h"<text:line-break/></text:span><text:span text:style-name="T16">//A fully abstract class to be stored inside List<text:line-break/></text:span><text:span text:style-name="T17">class </text:span><text:span text:style-name="T19">Object<text:line-break/></text:span><text:span text:style-name="T12">{<text:line-break/></text:span><text:span text:style-name="T17">public</text:span><text:span text:style-name="T12">:<text:line-break/><text:tab/></text:span><text:span text:style-name="T18">Object</text:span><text:span text:style-name="T12">();<text:line-break/><text:tab/></text:span><text:span text:style-name="T17">virtual void </text:span><text:span text:style-name="T18">Show</text:span><text:span text:style-name="T12">() = </text:span><text:span text:style-name="T20">0</text:span><text:span text:style-name="T12">;<text:line-break/><text:tab/></text:span><text:span text:style-name="T17">virtual void </text:span><text:span text:style-name="T18">Input</text:span><text:span text:style-name="T12">() = </text:span><text:span text:style-name="T20">0</text:span><text:span text:style-name="T12">;<text:line-break/><text:tab/></text:span><text:span text:style-name="T17">virtual </text:span><text:span text:style-name="T18">~Object</text:span><text:span text:style-name="T12">();<text:line-break/><text:line-break/><text:tab/></text:span><text:span text:style-name="T17">virtual void </text:span><text:span text:style-name="T18">HandleEvent</text:span><text:span text:style-name="T12">(</text:span><text:span text:style-name="T17">const </text:span><text:span text:style-name="T19">TEvent</text:span><text:span text:style-name="T12">&amp; </text:span><text:span text:style-name="T19">e</text:span><text:span text:style-name="T12">) = </text:span><text:span text:style-name="T20">0</text:span><text:span text:style-name="T12">;<text:line-break/>};</text:span></text:p>
      <text:p text:style-name="P18">Print.h</text:p>
      <text:p text:style-name="P19" loext:marker-style-name="T12"><text:span text:style-name="T14">#pragma </text:span><text:span text:style-name="T17">once<text:line-break/></text:span><text:span text:style-name="T14">#include </text:span><text:span text:style-name="T15">"Object.h"<text:line-break/></text:span><text:span text:style-name="T14">#include </text:span><text:span text:style-name="T15">&lt;string&gt;<text:line-break/><text:line-break/></text:span><text:span text:style-name="T17">class </text:span><text:span text:style-name="T19">Print </text:span><text:span text:style-name="T12">:<text:line-break/> <text:s text:c="3"/></text:span><text:span text:style-name="T17">public </text:span><text:span text:style-name="T19">Object </text:span><text:span text:style-name="T16">//Inheritor of object, basic class<text:line-break/></text:span><text:span text:style-name="T12">{<text:line-break/></text:span><text:span text:style-name="T17">protected</text:span><text:span text:style-name="T12">: </text:span><text:span text:style-name="T16">//attributes<text:line-break/> <text:s text:c="3"/></text:span><text:span text:style-name="T19">std</text:span><text:span text:style-name="T12">::</text:span><text:span text:style-name="T19">string </text:span><text:span text:style-name="T21">name</text:span><text:span text:style-name="T12">;<text:line-break/> <text:s text:c="3"/></text:span><text:span text:style-name="T19">std</text:span><text:span text:style-name="T12">::</text:span><text:span text:style-name="T19">string </text:span><text:span text:style-name="T21">author</text:span><text:span text:style-name="T12">;<text:line-break/></text:span><text:span text:style-name="T17">public</text:span><text:span text:style-name="T12">:<text:line-break/></text:span><text:soft-page-break/><text:span text:style-name="T12"> <text:s text:c="3"/></text:span><text:span text:style-name="T16">//basic constructors and a virtual destructor<text:line-break/> <text:s text:c="3"/></text:span><text:span text:style-name="T18">Print</text:span><text:span text:style-name="T12">();<text:line-break/> <text:s text:c="3"/></text:span><text:span text:style-name="T18">Print</text:span><text:span text:style-name="T12">(</text:span><text:span text:style-name="T19">std</text:span><text:span text:style-name="T12">::</text:span><text:span text:style-name="T19">string</text:span><text:span text:style-name="T12">, </text:span><text:span text:style-name="T19">std</text:span><text:span text:style-name="T12">::</text:span><text:span text:style-name="T19">string</text:span><text:span text:style-name="T12">);<text:line-break/> <text:s text:c="3"/></text:span><text:span text:style-name="T18">Print</text:span><text:span text:style-name="T12">(</text:span><text:span text:style-name="T17">const </text:span><text:span text:style-name="T19">Print</text:span><text:span text:style-name="T12">&amp;);<text:line-break/><text:line-break/> <text:s text:c="3"/></text:span><text:span text:style-name="T17">virtual </text:span><text:span text:style-name="T18">~Print</text:span><text:span text:style-name="T12">();<text:line-break/><text:line-break/> <text:s text:c="3"/></text:span><text:span text:style-name="T16">//i/o methods<text:line-break/> <text:s text:c="3"/></text:span><text:span text:style-name="T17">void </text:span><text:span text:style-name="T18">Show</text:span><text:span text:style-name="T12">();<text:line-break/> <text:s text:c="3"/></text:span><text:span text:style-name="T17">void </text:span><text:span text:style-name="T18">Input</text:span><text:span text:style-name="T12">();<text:line-break/><text:line-break/> <text:s text:c="3"/></text:span><text:span text:style-name="T16">//getters and setters<text:line-break/> <text:s text:c="3"/></text:span><text:span text:style-name="T19">std</text:span><text:span text:style-name="T12">::</text:span><text:span text:style-name="T19">string </text:span><text:span text:style-name="T18">getName</text:span><text:span text:style-name="T12">();<text:line-break/> <text:s text:c="3"/></text:span><text:span text:style-name="T19">std</text:span><text:span text:style-name="T12">::</text:span><text:span text:style-name="T19">string </text:span><text:span text:style-name="T18">getAuthor</text:span><text:span text:style-name="T12">();<text:line-break/> <text:s text:c="3"/></text:span><text:span text:style-name="T17">void </text:span><text:span text:style-name="T18">setName</text:span><text:span text:style-name="T12">(</text:span><text:span text:style-name="T19">std</text:span><text:span text:style-name="T12">::</text:span><text:span text:style-name="T19">string name_</text:span><text:span text:style-name="T12">);<text:line-break/> <text:s text:c="3"/></text:span><text:span text:style-name="T17">void </text:span><text:span text:style-name="T18">setAuthor</text:span><text:span text:style-name="T12">(</text:span><text:span text:style-name="T19">std</text:span><text:span text:style-name="T12">::</text:span><text:span text:style-name="T19">string author_</text:span><text:span text:style-name="T12">);<text:line-break/> <text:s text:c="3"/></text:span><text:span text:style-name="T16">//assignment overload<text:line-break/> <text:s text:c="3"/></text:span><text:span text:style-name="T19">Print</text:span><text:span text:style-name="T12">&amp; </text:span><text:span text:style-name="T17">operator</text:span><text:span text:style-name="T12">=(</text:span><text:span text:style-name="T17">const </text:span><text:span text:style-name="T19">Print</text:span><text:span text:style-name="T12">&amp;);<text:line-break/> <text:s text:c="3"/></text:span><text:span text:style-name="T16">//Event Handler<text:line-break/> <text:s text:c="3"/></text:span><text:span text:style-name="T17">void </text:span><text:span text:style-name="T18">HandleEvent</text:span><text:span text:style-name="T12">(</text:span><text:span text:style-name="T17">const </text:span><text:span text:style-name="T19">TEvent</text:span><text:span text:style-name="T12">&amp; </text:span><text:span text:style-name="T19">e</text:span><text:span text:style-name="T12">);<text:line-break/>};</text:span></text:p>
      <text:p text:style-name="P18">Print.cpp</text:p>
      <text:p text:style-name="P19" loext:marker-style-name="T12"><text:span text:style-name="T14">#include </text:span><text:span text:style-name="T15">"Print.h"<text:line-break/></text:span><text:span text:style-name="T14">#include </text:span><text:span text:style-name="T15">&lt;string&gt;<text:line-break/></text:span><text:span text:style-name="T14">#include </text:span><text:span text:style-name="T15">&lt;iostream&gt;<text:line-break/></text:span><text:span text:style-name="T14">#include </text:span><text:span text:style-name="T15">"Event.h"<text:line-break/><text:line-break/></text:span><text:span text:style-name="T16">//Basic constructors and a destructor<text:line-break/></text:span><text:span text:style-name="T19">Print</text:span><text:span text:style-name="T12">::</text:span><text:span text:style-name="T18">Print</text:span><text:span text:style-name="T12">() : </text:span><text:span text:style-name="T21">name</text:span><text:span text:style-name="T18">(</text:span><text:span text:style-name="T15">""</text:span><text:span text:style-name="T18">)</text:span><text:span text:style-name="T12">, </text:span><text:span text:style-name="T21">author</text:span><text:span text:style-name="T18">(</text:span><text:span text:style-name="T15">""</text:span><text:span text:style-name="T18">) </text:span><text:span text:style-name="T12">{}<text:line-break/></text:span><text:span text:style-name="T19">Print</text:span><text:span text:style-name="T12">::</text:span><text:span text:style-name="T18">Print</text:span><text:span text:style-name="T12">(</text:span><text:span text:style-name="T19">std</text:span><text:span text:style-name="T12">::</text:span><text:span text:style-name="T19">string name_</text:span><text:span text:style-name="T12">, </text:span><text:span text:style-name="T19">std</text:span><text:span text:style-name="T12">::</text:span><text:span text:style-name="T19">string author_</text:span><text:span text:style-name="T12">) : </text:span><text:span text:style-name="T21">name</text:span><text:span text:style-name="T18">(</text:span><text:span text:style-name="T19">name_</text:span><text:span text:style-name="T18">)</text:span><text:span text:style-name="T12">, </text:span><text:span text:style-name="T21">author</text:span><text:span text:style-name="T18">(</text:span><text:span text:style-name="T19">author_</text:span><text:span text:style-name="T18">) </text:span><text:span text:style-name="T12">{}<text:line-break/></text:span><text:span text:style-name="T19">Print</text:span><text:span text:style-name="T12">::</text:span><text:span text:style-name="T18">Print</text:span><text:span text:style-name="T12">(</text:span><text:span text:style-name="T17">const </text:span><text:span text:style-name="T19">Print</text:span><text:span text:style-name="T12">&amp; </text:span><text:span text:style-name="T19">oth</text:span><text:span text:style-name="T12">) {<text:line-break/><text:tab/></text:span><text:span text:style-name="T21">name </text:span><text:span text:style-name="T18">= </text:span><text:span text:style-name="T19">oth</text:span><text:span text:style-name="T12">.</text:span><text:span text:style-name="T21">name</text:span><text:span text:style-name="T12">;<text:line-break/><text:tab/></text:span><text:span text:style-name="T21">author </text:span><text:span text:style-name="T18">= </text:span><text:span text:style-name="T19">oth</text:span><text:span text:style-name="T12">.</text:span><text:span text:style-name="T21">author</text:span><text:span text:style-name="T12">;<text:line-break/>}<text:line-break/></text:span><text:span text:style-name="T19">Print</text:span><text:span text:style-name="T12">::</text:span><text:span text:style-name="T18">~Print</text:span><text:span text:style-name="T12">() {}<text:line-break/><text:line-break/></text:span><text:span text:style-name="T16">//Formatted input and output<text:line-break/></text:span><text:span text:style-name="T17">void </text:span><text:span text:style-name="T19">Print</text:span><text:span text:style-name="T12">::</text:span><text:span text:style-name="T18">Show</text:span><text:span text:style-name="T12">() {<text:line-break/></text:span><text:soft-page-break/><text:span text:style-name="T12"><text:tab/></text:span><text:span text:style-name="T19">std</text:span><text:span text:style-name="T12">::</text:span><text:span text:style-name="T19">cout </text:span><text:span text:style-name="T18">&lt;&lt; </text:span><text:span text:style-name="T15">"</text:span><text:span text:style-name="T22">\n</text:span><text:span text:style-name="T15">Name: " </text:span><text:span text:style-name="T18">&lt;&lt; </text:span><text:span text:style-name="T21">name </text:span><text:span text:style-name="T18">&lt;&lt; </text:span><text:span text:style-name="T15">"</text:span><text:span text:style-name="T22">\n</text:span><text:span text:style-name="T15">Author: " </text:span><text:span text:style-name="T18">&lt;&lt; </text:span><text:span text:style-name="T21">author</text:span><text:span text:style-name="T12">;<text:line-break/>}<text:line-break/></text:span><text:span text:style-name="T17">void </text:span><text:span text:style-name="T19">Print</text:span><text:span text:style-name="T12">::</text:span><text:span text:style-name="T18">Input</text:span><text:span text:style-name="T12">() {<text:line-break/><text:tab/></text:span><text:span text:style-name="T19">std</text:span><text:span text:style-name="T12">::</text:span><text:span text:style-name="T19">cout </text:span><text:span text:style-name="T18">&lt;&lt; </text:span><text:span text:style-name="T15">"Name?</text:span><text:span text:style-name="T22">\n</text:span><text:span text:style-name="T15">"</text:span><text:span text:style-name="T12">;<text:line-break/><text:tab/></text:span><text:span text:style-name="T19">std</text:span><text:span text:style-name="T12">::</text:span><text:span text:style-name="T18">getline</text:span><text:span text:style-name="T12">(</text:span><text:span text:style-name="T19">std</text:span><text:span text:style-name="T12">::</text:span><text:span text:style-name="T19">cin</text:span><text:span text:style-name="T12">, </text:span><text:span text:style-name="T21">name</text:span><text:span text:style-name="T12">);<text:line-break/><text:tab/></text:span><text:span text:style-name="T19">std</text:span><text:span text:style-name="T12">::</text:span><text:span text:style-name="T19">cout </text:span><text:span text:style-name="T18">&lt;&lt; </text:span><text:span text:style-name="T15">"Author?</text:span><text:span text:style-name="T22">\n</text:span><text:span text:style-name="T15">"</text:span><text:span text:style-name="T12">;<text:line-break/><text:tab/></text:span><text:span text:style-name="T19">std</text:span><text:span text:style-name="T12">::</text:span><text:span text:style-name="T18">getline</text:span><text:span text:style-name="T12">(</text:span><text:span text:style-name="T19">std</text:span><text:span text:style-name="T12">::</text:span><text:span text:style-name="T19">cin</text:span><text:span text:style-name="T12">, </text:span><text:span text:style-name="T21">author</text:span><text:span text:style-name="T12">);<text:line-break/>}<text:line-break/><text:line-break/></text:span><text:span text:style-name="T16">//Basic getters and setters<text:line-break/></text:span><text:span text:style-name="T19">std</text:span><text:span text:style-name="T12">::</text:span><text:span text:style-name="T19">string Print</text:span><text:span text:style-name="T12">::</text:span><text:span text:style-name="T18">getName</text:span><text:span text:style-name="T12">() { </text:span><text:span text:style-name="T17">return </text:span><text:span text:style-name="T21">name</text:span><text:span text:style-name="T12">; }<text:line-break/></text:span><text:span text:style-name="T19">std</text:span><text:span text:style-name="T12">::</text:span><text:span text:style-name="T19">string Print</text:span><text:span text:style-name="T12">::</text:span><text:span text:style-name="T18">getAuthor</text:span><text:span text:style-name="T12">() { </text:span><text:span text:style-name="T17">return </text:span><text:span text:style-name="T21">author</text:span><text:span text:style-name="T12">; }<text:line-break/></text:span><text:span text:style-name="T17">void </text:span><text:span text:style-name="T19">Print</text:span><text:span text:style-name="T12">::</text:span><text:span text:style-name="T18">setName</text:span><text:span text:style-name="T12">(</text:span><text:span text:style-name="T19">std</text:span><text:span text:style-name="T12">::</text:span><text:span text:style-name="T19">string name_</text:span><text:span text:style-name="T12">) { </text:span><text:span text:style-name="T21">name </text:span><text:span text:style-name="T18">= </text:span><text:span text:style-name="T19">name_</text:span><text:span text:style-name="T12">; }<text:line-break/></text:span><text:span text:style-name="T17">void </text:span><text:span text:style-name="T19">Print</text:span><text:span text:style-name="T12">::</text:span><text:span text:style-name="T18">setAuthor</text:span><text:span text:style-name="T12">(</text:span><text:span text:style-name="T19">std</text:span><text:span text:style-name="T12">::</text:span><text:span text:style-name="T19">string author_</text:span><text:span text:style-name="T12">) { </text:span><text:span text:style-name="T21">author </text:span><text:span text:style-name="T18">= </text:span><text:span text:style-name="T19">author_</text:span><text:span text:style-name="T12">; }<text:line-break/><text:line-break/></text:span><text:span text:style-name="T16">//basic assignment<text:line-break/></text:span><text:span text:style-name="T19">Print</text:span><text:span text:style-name="T12">&amp; </text:span><text:span text:style-name="T19">Print</text:span><text:span text:style-name="T12">::</text:span><text:span text:style-name="T17">operator</text:span><text:span text:style-name="T12">=(</text:span><text:span text:style-name="T17">const </text:span><text:span text:style-name="T19">Print</text:span><text:span text:style-name="T12">&amp; </text:span><text:span text:style-name="T19">oth</text:span><text:span text:style-name="T12">) {<text:line-break/><text:tab/></text:span><text:span text:style-name="T17">if </text:span><text:span text:style-name="T12">(</text:span><text:span text:style-name="T17">this </text:span><text:span text:style-name="T12">== &amp;</text:span><text:span text:style-name="T19">oth</text:span><text:span text:style-name="T12">) </text:span><text:span text:style-name="T17">return </text:span><text:span text:style-name="T12">*</text:span><text:span text:style-name="T17">this</text:span><text:span text:style-name="T12">; </text:span><text:span text:style-name="T16">//self-assignment defense<text:line-break/><text:tab/></text:span><text:span text:style-name="T21">name </text:span><text:span text:style-name="T18">= </text:span><text:span text:style-name="T19">oth</text:span><text:span text:style-name="T12">.</text:span><text:span text:style-name="T21">name</text:span><text:span text:style-name="T12">;<text:line-break/><text:tab/></text:span><text:span text:style-name="T21">author </text:span><text:span text:style-name="T18">= </text:span><text:span text:style-name="T19">oth</text:span><text:span text:style-name="T12">.</text:span><text:span text:style-name="T21">author</text:span><text:span text:style-name="T12">;<text:line-break/><text:tab/></text:span><text:span text:style-name="T17">return </text:span><text:span text:style-name="T12">*</text:span><text:span text:style-name="T17">this</text:span><text:span text:style-name="T12">;<text:line-break/>}<text:line-break/><text:line-break/></text:span><text:span text:style-name="T16">//On an event -- give the name of a print<text:line-break/></text:span><text:span text:style-name="T17">void </text:span><text:span text:style-name="T19">Print</text:span><text:span text:style-name="T12">::</text:span><text:span text:style-name="T18">HandleEvent</text:span><text:span text:style-name="T12">(</text:span><text:span text:style-name="T17">const </text:span><text:span text:style-name="T19">TEvent</text:span><text:span text:style-name="T12">&amp; </text:span><text:span text:style-name="T19">e</text:span><text:span text:style-name="T12">) {<text:line-break/><text:tab/></text:span><text:span text:style-name="T17">if </text:span><text:span text:style-name="T12">(</text:span><text:span text:style-name="T19">e</text:span><text:span text:style-name="T12">.</text:span><text:span text:style-name="T21">what </text:span><text:span text:style-name="T12">== </text:span><text:span text:style-name="T23">evMessage</text:span><text:span text:style-name="T12">) {<text:line-break/><text:tab/><text:tab/></text:span><text:span text:style-name="T17">switch </text:span><text:span text:style-name="T12">(</text:span><text:span text:style-name="T19">e</text:span><text:span text:style-name="T12">.</text:span><text:span text:style-name="T21">command</text:span><text:span text:style-name="T12">) {<text:line-break/><text:tab/><text:tab/></text:span><text:span text:style-name="T17">case </text:span><text:span text:style-name="T23">cmName</text:span><text:span text:style-name="T12">:<text:line-break/><text:tab/><text:tab/><text:tab/></text:span><text:span text:style-name="T19">std</text:span><text:span text:style-name="T12">::</text:span><text:span text:style-name="T19">cout </text:span><text:span text:style-name="T18">&lt;&lt; </text:span><text:span text:style-name="T15">"name = " </text:span><text:span text:style-name="T18">&lt;&lt; getName</text:span><text:span text:style-name="T12">() </text:span><text:span text:style-name="T18">&lt;&lt; </text:span><text:span text:style-name="T19">std</text:span><text:span text:style-name="T12">::</text:span><text:span text:style-name="T18">endl</text:span><text:span text:style-name="T12">;<text:line-break/><text:tab/><text:tab/><text:tab/></text:span><text:span text:style-name="T17">break</text:span><text:span text:style-name="T12">;<text:line-break/><text:tab/><text:tab/>}<text:line-break/><text:tab/>}<text:line-break/>}</text:span></text:p>
      <text:p text:style-name="P18">Magazin.h</text:p>
      <text:p text:style-name="P19" loext:marker-style-name="T12"><text:span text:style-name="T14">#pragma </text:span><text:span text:style-name="T17">once<text:line-break/></text:span><text:span text:style-name="T14">#include </text:span><text:span text:style-name="T15">"Print.h"<text:line-break/></text:span><text:span text:style-name="T14">#include </text:span><text:span text:style-name="T15">&lt;string&gt;<text:line-break/><text:line-break/></text:span><text:span text:style-name="T16">//Magazine class inheriting from Print<text:line-break/></text:span><text:soft-page-break/><text:span text:style-name="T17">class </text:span><text:span text:style-name="T19">Magazin </text:span><text:span text:style-name="T12">:<text:line-break/> <text:s text:c="3"/></text:span><text:span text:style-name="T17">public </text:span><text:span text:style-name="T19">Print<text:line-break/></text:span><text:span text:style-name="T12">{<text:line-break/></text:span><text:span text:style-name="T17">protected</text:span><text:span text:style-name="T12">:<text:line-break/> <text:s text:c="3"/></text:span><text:span text:style-name="T17">int </text:span><text:span text:style-name="T21">pages</text:span><text:span text:style-name="T12">; </text:span><text:span text:style-name="T16">//number of pages in the magazine<text:line-break/><text:line-break/></text:span><text:span text:style-name="T17">public</text:span><text:span text:style-name="T12">:<text:line-break/> <text:s text:c="3"/></text:span><text:span text:style-name="T16">//Basic constructors and destructor<text:line-break/> <text:s text:c="3"/></text:span><text:span text:style-name="T18">Magazin</text:span><text:span text:style-name="T12">();<text:line-break/> <text:s text:c="3"/></text:span><text:span text:style-name="T18">Magazin</text:span><text:span text:style-name="T12">(</text:span><text:span text:style-name="T19">std</text:span><text:span text:style-name="T12">::</text:span><text:span text:style-name="T19">string</text:span><text:span text:style-name="T12">, </text:span><text:span text:style-name="T19">std</text:span><text:span text:style-name="T12">::</text:span><text:span text:style-name="T19">string</text:span><text:span text:style-name="T12">, </text:span><text:span text:style-name="T17">int</text:span><text:span text:style-name="T12">);<text:line-break/> <text:s text:c="3"/></text:span><text:span text:style-name="T18">Magazin</text:span><text:span text:style-name="T12">(</text:span><text:span text:style-name="T17">const </text:span><text:span text:style-name="T19">Magazin</text:span><text:span text:style-name="T12">&amp;);<text:line-break/><text:line-break/> <text:s text:c="3"/></text:span><text:span text:style-name="T18">~Magazin</text:span><text:span text:style-name="T12">();<text:line-break/><text:line-break/> <text:s text:c="3"/></text:span><text:span text:style-name="T16">//Formatted input and output<text:line-break/> <text:s text:c="3"/></text:span><text:span text:style-name="T17">void </text:span><text:span text:style-name="T18">Show</text:span><text:span text:style-name="T12">();<text:line-break/> <text:s text:c="3"/></text:span><text:span text:style-name="T17">void </text:span><text:span text:style-name="T18">Input</text:span><text:span text:style-name="T12">();<text:line-break/><text:line-break/> <text:s text:c="3"/></text:span><text:span text:style-name="T16">//Basic getters and setters<text:line-break/> <text:s text:c="3"/></text:span><text:span text:style-name="T17">int </text:span><text:span text:style-name="T18">getPages</text:span><text:span text:style-name="T12">();<text:line-break/> <text:s text:c="3"/></text:span><text:span text:style-name="T17">void </text:span><text:span text:style-name="T18">setPages</text:span><text:span text:style-name="T12">(</text:span><text:span text:style-name="T17">int</text:span><text:span text:style-name="T12">);<text:line-break/><text:line-break/> <text:s text:c="3"/></text:span><text:span text:style-name="T16">//Assignment operator<text:line-break/> <text:s text:c="3"/></text:span><text:span text:style-name="T19">Magazin</text:span><text:span text:style-name="T12">&amp; </text:span><text:span text:style-name="T17">operator</text:span><text:span text:style-name="T12">= (</text:span><text:span text:style-name="T17">const </text:span><text:span text:style-name="T19">Magazin</text:span><text:span text:style-name="T12">&amp;);<text:line-break/>};</text:span></text:p>
      <text:p text:style-name="P18">Magazin.cpp</text:p>
      <text:p text:style-name="P19" loext:marker-style-name="T12"><text:span text:style-name="T14">#include </text:span><text:span text:style-name="T15">"Magazin.h"<text:line-break/></text:span><text:span text:style-name="T14">#include </text:span><text:span text:style-name="T15">&lt;string&gt;<text:line-break/></text:span><text:span text:style-name="T14">#include </text:span><text:span text:style-name="T15">&lt;iostream&gt;<text:line-break/><text:line-break/></text:span><text:span text:style-name="T16">//Basic constructors and a destructor<text:line-break/></text:span><text:span text:style-name="T19">Magazin</text:span><text:span text:style-name="T12">::</text:span><text:span text:style-name="T18">Magazin</text:span><text:span text:style-name="T12">() : </text:span><text:span text:style-name="T13">Print()</text:span><text:span text:style-name="T12">, </text:span><text:span text:style-name="T21">pages</text:span><text:span text:style-name="T12">(</text:span><text:span text:style-name="T20">0</text:span><text:span text:style-name="T12">) {}<text:line-break/></text:span><text:span text:style-name="T19">Magazin</text:span><text:span text:style-name="T12">::</text:span><text:span text:style-name="T18">Magazin</text:span><text:span text:style-name="T12">(</text:span><text:span text:style-name="T19">std</text:span><text:span text:style-name="T12">::</text:span><text:span text:style-name="T19">string s1</text:span><text:span text:style-name="T12">, </text:span><text:span text:style-name="T19">std</text:span><text:span text:style-name="T12">::</text:span><text:span text:style-name="T19">string s2</text:span><text:span text:style-name="T12">, </text:span><text:span text:style-name="T17">int </text:span><text:span text:style-name="T19">p</text:span><text:span text:style-name="T12">) : </text:span><text:span text:style-name="T19">Print</text:span><text:span text:style-name="T18">(</text:span><text:span text:style-name="T19">s1</text:span><text:span text:style-name="T12">, </text:span><text:span text:style-name="T19">s2</text:span><text:span text:style-name="T18">)</text:span><text:span text:style-name="T12">, </text:span><text:span text:style-name="T21">pages</text:span><text:span text:style-name="T12">(</text:span><text:span text:style-name="T19">p</text:span><text:span text:style-name="T12">) {}<text:line-break/></text:span><text:span text:style-name="T19">Magazin</text:span><text:span text:style-name="T12">::</text:span><text:span text:style-name="T18">Magazin</text:span><text:span text:style-name="T12">(</text:span><text:span text:style-name="T17">const </text:span><text:span text:style-name="T19">Magazin</text:span><text:span text:style-name="T12">&amp; </text:span><text:span text:style-name="T19">oth</text:span><text:span text:style-name="T12">) {<text:line-break/><text:tab/></text:span><text:span text:style-name="T21">name </text:span><text:span text:style-name="T18">= </text:span><text:span text:style-name="T19">oth</text:span><text:span text:style-name="T12">.</text:span><text:span text:style-name="T21">name</text:span><text:span text:style-name="T12">;<text:line-break/><text:tab/></text:span><text:span text:style-name="T21">author </text:span><text:span text:style-name="T18">= </text:span><text:span text:style-name="T19">oth</text:span><text:span text:style-name="T12">.</text:span><text:span text:style-name="T21">author</text:span><text:span text:style-name="T12">;<text:line-break/><text:tab/></text:span><text:span text:style-name="T21">pages </text:span><text:span text:style-name="T12">= </text:span><text:span text:style-name="T19">oth</text:span><text:span text:style-name="T12">.</text:span><text:span text:style-name="T21">pages</text:span><text:span text:style-name="T12">;<text:line-break/>}<text:line-break/></text:span><text:soft-page-break/><text:span text:style-name="T12"><text:line-break/></text:span><text:span text:style-name="T19">Magazin</text:span><text:span text:style-name="T12">::</text:span><text:span text:style-name="T18">~Magazin</text:span><text:span text:style-name="T12">() {}<text:line-break/><text:line-break/></text:span><text:span text:style-name="T16">//Formatted input and output<text:line-break/></text:span><text:span text:style-name="T17">void </text:span><text:span text:style-name="T19">Magazin</text:span><text:span text:style-name="T12">::</text:span><text:span text:style-name="T18">Show</text:span><text:span text:style-name="T12">() {<text:line-break/><text:tab/></text:span><text:span text:style-name="T19">std</text:span><text:span text:style-name="T12">::</text:span><text:span text:style-name="T19">cout </text:span><text:span text:style-name="T18">&lt;&lt; </text:span><text:span text:style-name="T15">"Name: " </text:span><text:span text:style-name="T18">&lt;&lt; </text:span><text:span text:style-name="T21">name </text:span><text:span text:style-name="T18">&lt;&lt; </text:span><text:span text:style-name="T15">"</text:span><text:span text:style-name="T22">\n</text:span><text:span text:style-name="T15">Author: " </text:span><text:span text:style-name="T18">&lt;&lt; </text:span><text:span text:style-name="T21">author </text:span><text:span text:style-name="T18">&lt;&lt; </text:span><text:span text:style-name="T15">"</text:span><text:span text:style-name="T22">\n</text:span><text:span text:style-name="T15">Pages: " </text:span><text:span text:style-name="T18">&lt;&lt; </text:span><text:span text:style-name="T21">pages</text:span><text:span text:style-name="T12">;<text:line-break/>}<text:line-break/></text:span><text:span text:style-name="T17">void </text:span><text:span text:style-name="T19">Magazin</text:span><text:span text:style-name="T12">::</text:span><text:span text:style-name="T18">Input</text:span><text:span text:style-name="T12">() {<text:line-break/><text:tab/></text:span><text:span text:style-name="T19">std</text:span><text:span text:style-name="T12">::</text:span><text:span text:style-name="T19">cout </text:span><text:span text:style-name="T18">&lt;&lt; </text:span><text:span text:style-name="T15">"Name?</text:span><text:span text:style-name="T22">\n</text:span><text:span text:style-name="T15">"</text:span><text:span text:style-name="T12">;<text:line-break/><text:tab/></text:span><text:span text:style-name="T19">std</text:span><text:span text:style-name="T12">::</text:span><text:span text:style-name="T18">getline</text:span><text:span text:style-name="T12">(</text:span><text:span text:style-name="T19">std</text:span><text:span text:style-name="T12">::</text:span><text:span text:style-name="T19">cin</text:span><text:span text:style-name="T12">, </text:span><text:span text:style-name="T21">name</text:span><text:span text:style-name="T12">);<text:line-break/><text:tab/></text:span><text:span text:style-name="T19">std</text:span><text:span text:style-name="T12">::</text:span><text:span text:style-name="T19">cout </text:span><text:span text:style-name="T18">&lt;&lt; </text:span><text:span text:style-name="T15">"Author?</text:span><text:span text:style-name="T22">\n</text:span><text:span text:style-name="T15">"</text:span><text:span text:style-name="T12">;<text:line-break/><text:tab/></text:span><text:span text:style-name="T19">std</text:span><text:span text:style-name="T12">::</text:span><text:span text:style-name="T18">getline</text:span><text:span text:style-name="T12">(</text:span><text:span text:style-name="T19">std</text:span><text:span text:style-name="T12">::</text:span><text:span text:style-name="T19">cin</text:span><text:span text:style-name="T12">, </text:span><text:span text:style-name="T21">author</text:span><text:span text:style-name="T12">);<text:line-break/><text:tab/></text:span><text:span text:style-name="T19">std</text:span><text:span text:style-name="T12">::</text:span><text:span text:style-name="T19">cout </text:span><text:span text:style-name="T18">&lt;&lt; </text:span><text:span text:style-name="T15">"Pages?</text:span><text:span text:style-name="T22">\n</text:span><text:span text:style-name="T15">"</text:span><text:span text:style-name="T12">;<text:line-break/><text:tab/></text:span><text:span text:style-name="T19">std</text:span><text:span text:style-name="T12">::</text:span><text:span text:style-name="T19">string buf</text:span><text:span text:style-name="T12">;<text:line-break/><text:tab/></text:span><text:span text:style-name="T19">std</text:span><text:span text:style-name="T12">::</text:span><text:span text:style-name="T18">getline</text:span><text:span text:style-name="T12">(</text:span><text:span text:style-name="T19">std</text:span><text:span text:style-name="T12">::</text:span><text:span text:style-name="T19">cin</text:span><text:span text:style-name="T12">, </text:span><text:span text:style-name="T19">buf</text:span><text:span text:style-name="T12">);<text:line-break/><text:tab/></text:span><text:span text:style-name="T21">pages </text:span><text:span text:style-name="T12">= </text:span><text:span text:style-name="T19">std</text:span><text:span text:style-name="T12">::</text:span><text:span text:style-name="T18">stoi</text:span><text:span text:style-name="T12">(</text:span><text:span text:style-name="T19">buf</text:span><text:span text:style-name="T12">); </text:span><text:span text:style-name="T16">//convert string input to integer<text:line-break/></text:span><text:span text:style-name="T12">}<text:line-break/><text:line-break/></text:span><text:span text:style-name="T16">//Basic getters and setters<text:line-break/></text:span><text:span text:style-name="T17">int </text:span><text:span text:style-name="T19">Magazin</text:span><text:span text:style-name="T12">::</text:span><text:span text:style-name="T18">getPages</text:span><text:span text:style-name="T12">() { </text:span><text:span text:style-name="T17">return </text:span><text:span text:style-name="T21">pages</text:span><text:span text:style-name="T12">; }<text:line-break/></text:span><text:span text:style-name="T17">void </text:span><text:span text:style-name="T19">Magazin</text:span><text:span text:style-name="T12">::</text:span><text:span text:style-name="T18">setPages</text:span><text:span text:style-name="T12">(</text:span><text:span text:style-name="T17">int </text:span><text:span text:style-name="T19">p</text:span><text:span text:style-name="T12">) { </text:span><text:span text:style-name="T21">pages </text:span><text:span text:style-name="T12">= </text:span><text:span text:style-name="T19">p</text:span><text:span text:style-name="T12">; }<text:line-break/><text:line-break/></text:span><text:span text:style-name="T16">//Assignment operator with self-assignment defense<text:line-break/></text:span><text:span text:style-name="T19">Magazin</text:span><text:span text:style-name="T12">&amp; </text:span><text:span text:style-name="T19">Magazin</text:span><text:span text:style-name="T12">::</text:span><text:span text:style-name="T17">operator</text:span><text:span text:style-name="T12">=(</text:span><text:span text:style-name="T17">const </text:span><text:span text:style-name="T19">Magazin</text:span><text:span text:style-name="T12">&amp; </text:span><text:span text:style-name="T19">oth</text:span><text:span text:style-name="T12">) {<text:line-break/><text:tab/></text:span><text:span text:style-name="T17">if </text:span><text:span text:style-name="T12">(&amp;</text:span><text:span text:style-name="T19">oth </text:span><text:span text:style-name="T12">== </text:span><text:span text:style-name="T17">this</text:span><text:span text:style-name="T12">) </text:span><text:span text:style-name="T17">return </text:span><text:span text:style-name="T12">*</text:span><text:span text:style-name="T17">this</text:span><text:span text:style-name="T12">;<text:line-break/><text:tab/></text:span><text:span text:style-name="T21">name </text:span><text:span text:style-name="T18">= </text:span><text:span text:style-name="T19">oth</text:span><text:span text:style-name="T12">.</text:span><text:span text:style-name="T21">name</text:span><text:span text:style-name="T12">;<text:line-break/><text:tab/></text:span><text:span text:style-name="T21">author </text:span><text:span text:style-name="T18">= </text:span><text:span text:style-name="T19">oth</text:span><text:span text:style-name="T12">.</text:span><text:span text:style-name="T21">author</text:span><text:span text:style-name="T12">;<text:line-break/><text:tab/></text:span><text:span text:style-name="T21">pages </text:span><text:span text:style-name="T12">= </text:span><text:span text:style-name="T19">oth</text:span><text:span text:style-name="T12">.</text:span><text:span text:style-name="T21">pages</text:span><text:span text:style-name="T12">;<text:line-break/><text:tab/></text:span><text:span text:style-name="T17">return </text:span><text:span text:style-name="T12">*</text:span><text:span text:style-name="T17">this</text:span><text:span text:style-name="T12">;<text:line-break/>}</text:span></text:p>
      <text:p text:style-name="P18">List.h</text:p>
      <text:p text:style-name="P19" loext:marker-style-name="T12"><text:span text:style-name="T14">#pragma </text:span><text:span text:style-name="T17">once<text:line-break/></text:span><text:span text:style-name="T14">#include </text:span><text:span text:style-name="T15">"Object.h"<text:line-break/></text:span><text:span text:style-name="T13">#include &lt;iostream&gt;<text:line-break/><text:line-break/></text:span><text:span text:style-name="T16">//Node structure for doubly linked list<text:line-break/></text:span><text:span text:style-name="T17">struct </text:span><text:span text:style-name="T19">Node </text:span><text:span text:style-name="T12">{<text:line-break/><text:tab/>Object * </text:span><text:span text:style-name="T21">data</text:span><text:span text:style-name="T12">;<text:line-break/></text:span><text:soft-page-break/><text:span text:style-name="T12"><text:tab/></text:span><text:span text:style-name="T19">Node</text:span><text:span text:style-name="T12">* </text:span><text:span text:style-name="T21">next</text:span><text:span text:style-name="T12">;<text:line-break/><text:tab/></text:span><text:span text:style-name="T19">Node</text:span><text:span text:style-name="T12">* </text:span><text:span text:style-name="T21">prev</text:span><text:span text:style-name="T12">;<text:line-break/><text:line-break/><text:tab/></text:span><text:span text:style-name="T16">//Node constructors with different initialization patterns<text:line-break/><text:tab/></text:span><text:span text:style-name="T18">Node</text:span><text:span text:style-name="T12">(Object * </text:span><text:span text:style-name="T19">i</text:span><text:span text:style-name="T12">) : </text:span><text:span text:style-name="T21">data</text:span><text:span text:style-name="T12">(</text:span><text:span text:style-name="T19">i</text:span><text:span text:style-name="T12">), </text:span><text:span text:style-name="T21">next</text:span><text:span text:style-name="T12">(</text:span><text:span text:style-name="T17">nullptr</text:span><text:span text:style-name="T12">), </text:span><text:span text:style-name="T21">prev</text:span><text:span text:style-name="T12">(</text:span><text:span text:style-name="T17">nullptr</text:span><text:span text:style-name="T12">) {}<text:line-break/><text:tab/></text:span><text:span text:style-name="T18">Node</text:span><text:span text:style-name="T12">() : </text:span><text:span text:style-name="T21">data</text:span><text:span text:style-name="T12">(</text:span><text:span text:style-name="T17">nullptr</text:span><text:span text:style-name="T12">), </text:span><text:span text:style-name="T21">next</text:span><text:span text:style-name="T12">(</text:span><text:span text:style-name="T17">nullptr</text:span><text:span text:style-name="T12">), </text:span><text:span text:style-name="T21">prev</text:span><text:span text:style-name="T12">(</text:span><text:span text:style-name="T17">nullptr</text:span><text:span text:style-name="T12">) {}<text:line-break/><text:tab/></text:span><text:span text:style-name="T18">Node</text:span><text:span text:style-name="T12">(Object * </text:span><text:span text:style-name="T19">i</text:span><text:span text:style-name="T12">, </text:span><text:span text:style-name="T19">Node</text:span><text:span text:style-name="T12">* </text:span><text:span text:style-name="T19">first</text:span><text:span text:style-name="T12">, </text:span><text:span text:style-name="T19">Node</text:span><text:span text:style-name="T12">* </text:span><text:span text:style-name="T19">second</text:span><text:span text:style-name="T12">) : </text:span><text:span text:style-name="T21">data</text:span><text:span text:style-name="T12">(</text:span><text:span text:style-name="T19">i</text:span><text:span text:style-name="T12">), </text:span><text:span text:style-name="T21">next</text:span><text:span text:style-name="T12">(</text:span><text:span text:style-name="T19">first</text:span><text:span text:style-name="T12">), </text:span><text:span text:style-name="T21">prev</text:span><text:span text:style-name="T12">(</text:span><text:span text:style-name="T19">second</text:span><text:span text:style-name="T12">) {}<text:line-break/>};<text:line-break/><text:line-break/></text:span><text:span text:style-name="T17">class </text:span><text:span text:style-name="T19">List </text:span><text:span text:style-name="T12">{<text:line-break/></text:span><text:span text:style-name="T17">protected</text:span><text:span text:style-name="T12">:<text:line-break/><text:tab/></text:span><text:span text:style-name="T17">int </text:span><text:span text:style-name="T21">size</text:span><text:span text:style-name="T12">; <text:s text:c="5"/></text:span><text:span text:style-name="T16">//current number of elements<text:line-break/><text:tab/></text:span><text:span text:style-name="T19">Node</text:span><text:span text:style-name="T12">* </text:span><text:span text:style-name="T21">head</text:span><text:span text:style-name="T12">; <text:s text:c="3"/></text:span><text:span text:style-name="T16">//pointer to first element<text:line-break/><text:tab/></text:span><text:span text:style-name="T19">Node</text:span><text:span text:style-name="T12">* </text:span><text:span text:style-name="T21">tail</text:span><text:span text:style-name="T12">; <text:s text:c="3"/></text:span><text:span text:style-name="T16">//pointer to last element<text:line-break/><text:line-break/></text:span><text:span text:style-name="T17">public</text:span><text:span text:style-name="T12">:<text:line-break/><text:tab/></text:span><text:span text:style-name="T16">//Basic constructors and destructor<text:line-break/><text:tab/></text:span><text:span text:style-name="T18">List</text:span><text:span text:style-name="T12">();<text:line-break/><text:tab/></text:span><text:span text:style-name="T18">List</text:span><text:span text:style-name="T12">(</text:span><text:span text:style-name="T17">int </text:span><text:span text:style-name="T19">s</text:span><text:span text:style-name="T12">);<text:line-break/><text:tab/></text:span><text:span text:style-name="T18">List</text:span><text:span text:style-name="T12">(</text:span><text:span text:style-name="T17">const </text:span><text:span text:style-name="T19">List</text:span><text:span text:style-name="T12">&amp; </text:span><text:span text:style-name="T19">l</text:span><text:span text:style-name="T12">);<text:line-break/><text:tab/></text:span><text:span text:style-name="T18">~List</text:span><text:span text:style-name="T12">();<text:line-break/><text:line-break/><text:tab/></text:span><text:span text:style-name="T16">//Assignment operator<text:line-break/><text:tab/></text:span><text:span text:style-name="T19">List</text:span><text:span text:style-name="T12">&amp; </text:span><text:span text:style-name="T17">operator</text:span><text:span text:style-name="T12">=(</text:span><text:span text:style-name="T17">const </text:span><text:span text:style-name="T19">List</text:span><text:span text:style-name="T12">&amp; </text:span><text:span text:style-name="T19">l</text:span><text:span text:style-name="T12">);<text:line-break/><text:line-break/><text:tab/></text:span><text:span text:style-name="T16">//List operations<text:line-break/><text:tab/></text:span><text:span text:style-name="T17">void </text:span><text:span text:style-name="T18">Add</text:span><text:span text:style-name="T12">();<text:line-break/><text:tab/></text:span><text:span text:style-name="T17">void </text:span><text:span text:style-name="T18">Del</text:span><text:span text:style-name="T12">();<text:line-break/><text:tab/></text:span><text:span text:style-name="T17">void </text:span><text:span text:style-name="T18">Show</text:span><text:span text:style-name="T12">();<text:line-break/><text:line-break/><text:tab/></text:span><text:span text:style-name="T16">//Event handling<text:line-break/><text:tab/></text:span><text:span text:style-name="T17">void </text:span><text:span text:style-name="T18">HandleEvent</text:span><text:span text:style-name="T12">(</text:span><text:span text:style-name="T17">const </text:span><text:span text:style-name="T12">TEvent&amp; </text:span><text:span text:style-name="T19">e</text:span><text:span text:style-name="T12">);<text:line-break/><text:line-break/><text:tab/></text:span><text:span text:style-name="T16">//Returns list size<text:line-break/><text:tab/></text:span><text:span text:style-name="T17">int operator</text:span><text:span text:style-name="T12">() ();<text:line-break/>};</text:span></text:p>
      <text:p text:style-name="P18">List.cpp</text:p>
      <text:p text:style-name="P19" loext:marker-style-name="T12"><text:soft-page-break/><text:span text:style-name="T14">#include </text:span><text:span text:style-name="T15">&lt;iostream&gt;<text:line-break/></text:span><text:span text:style-name="T14">#include </text:span><text:span text:style-name="T15">&lt;string&gt;<text:line-break/></text:span><text:span text:style-name="T14">#include </text:span><text:span text:style-name="T15">"List.h"<text:line-break/></text:span><text:span text:style-name="T14">#include </text:span><text:span text:style-name="T15">"Print.h"<text:line-break/></text:span><text:span text:style-name="T14">#include </text:span><text:span text:style-name="T15">"Magazin.h"<text:line-break/><text:line-break/></text:span><text:span text:style-name="T16">//Basic constructors and destructor<text:line-break/></text:span><text:span text:style-name="T19">List</text:span><text:span text:style-name="T12">::</text:span><text:span text:style-name="T18">List</text:span><text:span text:style-name="T12">() : </text:span><text:span text:style-name="T21">head</text:span><text:span text:style-name="T12">(</text:span><text:span text:style-name="T17">nullptr</text:span><text:span text:style-name="T12">), </text:span><text:span text:style-name="T21">tail</text:span><text:span text:style-name="T12">(</text:span><text:span text:style-name="T17">nullptr</text:span><text:span text:style-name="T12">), </text:span><text:span text:style-name="T21">size</text:span><text:span text:style-name="T12">(</text:span><text:span text:style-name="T20">0</text:span><text:span text:style-name="T12">) {}<text:line-break/><text:line-break/></text:span><text:span text:style-name="T19">List</text:span><text:span text:style-name="T12">::</text:span><text:span text:style-name="T18">List</text:span><text:span text:style-name="T12">(</text:span><text:span text:style-name="T17">int </text:span><text:span text:style-name="T19">s</text:span><text:span text:style-name="T12">) {<text:line-break/><text:tab/></text:span><text:span text:style-name="T21">size </text:span><text:span text:style-name="T12">= </text:span><text:span text:style-name="T19">s</text:span><text:span text:style-name="T12">;<text:line-break/><text:tab/></text:span><text:span text:style-name="T17">if </text:span><text:span text:style-name="T12">(</text:span><text:span text:style-name="T21">size </text:span><text:span text:style-name="T12">== </text:span><text:span text:style-name="T20">0</text:span><text:span text:style-name="T12">) {<text:line-break/><text:tab/><text:tab/></text:span><text:span text:style-name="T21">head </text:span><text:span text:style-name="T12">= </text:span><text:span text:style-name="T17">nullptr</text:span><text:span text:style-name="T12">;<text:line-break/><text:tab/><text:tab/></text:span><text:span text:style-name="T21">tail </text:span><text:span text:style-name="T12">= </text:span><text:span text:style-name="T17">nullptr</text:span><text:span text:style-name="T12">;<text:line-break/><text:tab/>}<text:line-break/><text:tab/></text:span><text:span text:style-name="T17">else </text:span><text:span text:style-name="T12">{<text:line-break/><text:tab/><text:tab/></text:span><text:span text:style-name="T16">//Populate list with interactive user input for each element<text:line-break/><text:tab/><text:tab/></text:span><text:span text:style-name="T17">for </text:span><text:span text:style-name="T12">(</text:span><text:span text:style-name="T17">int </text:span><text:span text:style-name="T19">i </text:span><text:span text:style-name="T12">= </text:span><text:span text:style-name="T20">0</text:span><text:span text:style-name="T12">; </text:span><text:span text:style-name="T19">i </text:span><text:span text:style-name="T12">&lt; </text:span><text:span text:style-name="T21">size</text:span><text:span text:style-name="T12">; </text:span><text:span text:style-name="T19">i</text:span><text:span text:style-name="T12">++) {<text:line-break/><text:tab/><text:tab/><text:tab/></text:span><text:span text:style-name="T18">Add</text:span><text:span text:style-name="T12">();<text:line-break/><text:tab/><text:tab/>}<text:line-break/><text:tab/>}<text:line-break/>}<text:line-break/><text:line-break/></text:span><text:span text:style-name="T16">//Copy constructor - deep copy of entire list<text:line-break/></text:span><text:span text:style-name="T19">List</text:span><text:span text:style-name="T12">::</text:span><text:span text:style-name="T18">List</text:span><text:span text:style-name="T12">(</text:span><text:span text:style-name="T17">const </text:span><text:span text:style-name="T19">List</text:span><text:span text:style-name="T12">&amp; </text:span><text:span text:style-name="T19">l</text:span><text:span text:style-name="T12">) {<text:line-break/><text:tab/></text:span><text:span text:style-name="T19">Node</text:span><text:span text:style-name="T12">* </text:span><text:span text:style-name="T19">cur </text:span><text:span text:style-name="T12">= </text:span><text:span text:style-name="T19">l</text:span><text:span text:style-name="T12">.</text:span><text:span text:style-name="T21">head</text:span><text:span text:style-name="T12">;<text:line-break/><text:line-break/><text:tab/></text:span><text:span text:style-name="T17">while </text:span><text:span text:style-name="T12">(</text:span><text:span text:style-name="T19">cur</text:span><text:span text:style-name="T12">) {<text:line-break/><text:tab/><text:tab/></text:span><text:span text:style-name="T19">Node</text:span><text:span text:style-name="T12">* </text:span><text:span text:style-name="T19">to_add </text:span><text:span text:style-name="T12">= </text:span><text:span text:style-name="T17">new </text:span><text:span text:style-name="T19">Node</text:span><text:span text:style-name="T18">(</text:span><text:span text:style-name="T19">cur</text:span><text:span text:style-name="T12">-&gt;</text:span><text:span text:style-name="T21">data</text:span><text:span text:style-name="T18">)</text:span><text:span text:style-name="T12">;<text:line-break/><text:tab/><text:tab/></text:span><text:span text:style-name="T17">if </text:span><text:span text:style-name="T12">(!</text:span><text:span text:style-name="T21">head</text:span><text:span text:style-name="T12">) {<text:line-break/><text:tab/><text:tab/><text:tab/></text:span><text:span text:style-name="T21">head </text:span><text:span text:style-name="T12">= </text:span><text:span text:style-name="T19">to_add</text:span><text:span text:style-name="T12">;<text:line-break/><text:tab/><text:tab/><text:tab/></text:span><text:span text:style-name="T21">tail </text:span><text:span text:style-name="T12">= </text:span><text:span text:style-name="T19">to_add</text:span><text:span text:style-name="T12">;<text:line-break/><text:tab/><text:tab/>}<text:line-break/><text:tab/><text:tab/></text:span><text:span text:style-name="T17">else </text:span><text:span text:style-name="T12">{<text:line-break/><text:tab/><text:tab/><text:tab/></text:span><text:span text:style-name="T21">tail</text:span><text:span text:style-name="T12">-&gt;</text:span><text:span text:style-name="T21">next </text:span><text:span text:style-name="T12">= </text:span><text:span text:style-name="T19">to_add</text:span><text:span text:style-name="T12">;<text:line-break/><text:tab/><text:tab/><text:tab/></text:span><text:span text:style-name="T21">tail</text:span><text:span text:style-name="T12">-&gt;</text:span><text:span text:style-name="T21">next</text:span><text:span text:style-name="T12">-&gt;</text:span><text:span text:style-name="T21">prev </text:span><text:span text:style-name="T12">= </text:span><text:span text:style-name="T21">tail</text:span><text:span text:style-name="T12">;<text:line-break/><text:tab/><text:tab/><text:tab/></text:span><text:span text:style-name="T21">tail </text:span><text:span text:style-name="T12">= </text:span><text:span text:style-name="T19">to_add</text:span><text:span text:style-name="T12">;<text:line-break/><text:tab/><text:tab/>}<text:line-break/></text:span><text:soft-page-break/><text:span text:style-name="T12"><text:tab/><text:tab/></text:span><text:span text:style-name="T19">cur </text:span><text:span text:style-name="T12">= </text:span><text:span text:style-name="T19">cur</text:span><text:span text:style-name="T12">-&gt;</text:span><text:span text:style-name="T21">next</text:span><text:span text:style-name="T12">;<text:line-break/><text:tab/>}<text:line-break/>}<text:line-break/><text:line-break/></text:span><text:span text:style-name="T19">List</text:span><text:span text:style-name="T12">::</text:span><text:span text:style-name="T18">~List</text:span><text:span text:style-name="T12">() {<text:line-break/><text:tab/></text:span><text:span text:style-name="T19">Node</text:span><text:span text:style-name="T12">* </text:span><text:span text:style-name="T19">cur </text:span><text:span text:style-name="T12">= </text:span><text:span text:style-name="T21">head</text:span><text:span text:style-name="T12">;<text:line-break/><text:tab/></text:span><text:span text:style-name="T19">Node</text:span><text:span text:style-name="T12">* </text:span><text:span text:style-name="T19">buf</text:span><text:span text:style-name="T12">;<text:line-break/><text:tab/></text:span><text:span text:style-name="T17">while </text:span><text:span text:style-name="T12">(</text:span><text:span text:style-name="T19">cur</text:span><text:span text:style-name="T12">) {<text:line-break/><text:tab/><text:tab/></text:span><text:span text:style-name="T19">buf </text:span><text:span text:style-name="T12">= </text:span><text:span text:style-name="T19">cur</text:span><text:span text:style-name="T12">;<text:line-break/><text:tab/><text:tab/></text:span><text:span text:style-name="T19">cur </text:span><text:span text:style-name="T12">= </text:span><text:span text:style-name="T19">cur</text:span><text:span text:style-name="T12">-&gt;</text:span><text:span text:style-name="T21">next</text:span><text:span text:style-name="T12">;<text:line-break/><text:tab/><text:tab/></text:span><text:span text:style-name="T17">delete </text:span><text:span text:style-name="T19">buf</text:span><text:span text:style-name="T12">;<text:line-break/><text:tab/>}<text:line-break/><text:tab/></text:span><text:span text:style-name="T21">head </text:span><text:span text:style-name="T12">= </text:span><text:span text:style-name="T17">nullptr</text:span><text:span text:style-name="T12">;<text:line-break/><text:tab/></text:span><text:span text:style-name="T21">tail </text:span><text:span text:style-name="T12">= </text:span><text:span text:style-name="T17">nullptr</text:span><text:span text:style-name="T12">;<text:line-break/>}<text:line-break/><text:line-break/></text:span><text:span text:style-name="T16">//Assignment operator with self-assignment defense<text:line-break/></text:span><text:span text:style-name="T19">List</text:span><text:span text:style-name="T12">&amp; </text:span><text:span text:style-name="T19">List</text:span><text:span text:style-name="T12">::</text:span><text:span text:style-name="T17">operator</text:span><text:span text:style-name="T12">=(</text:span><text:span text:style-name="T17">const </text:span><text:span text:style-name="T19">List</text:span><text:span text:style-name="T12">&amp; </text:span><text:span text:style-name="T19">l</text:span><text:span text:style-name="T12">) {<text:line-break/><text:tab/></text:span><text:span text:style-name="T17">if </text:span><text:span text:style-name="T12">(</text:span><text:span text:style-name="T17">this </text:span><text:span text:style-name="T12">== &amp;</text:span><text:span text:style-name="T19">l</text:span><text:span text:style-name="T12">) </text:span><text:span text:style-name="T17">return </text:span><text:span text:style-name="T12">*</text:span><text:span text:style-name="T17">this</text:span><text:span text:style-name="T12">;<text:line-break/><text:tab/></text:span><text:span text:style-name="T21">size </text:span><text:span text:style-name="T12">= </text:span><text:span text:style-name="T19">l</text:span><text:span text:style-name="T12">.</text:span><text:span text:style-name="T21">size</text:span><text:span text:style-name="T12">;<text:line-break/><text:line-break/><text:tab/></text:span><text:span text:style-name="T16">//Clear existing list before copying<text:line-break/><text:tab/></text:span><text:span text:style-name="T17">if </text:span><text:span text:style-name="T12">(</text:span><text:span text:style-name="T21">head</text:span><text:span text:style-name="T12">) {<text:line-break/><text:tab/><text:tab/></text:span><text:span text:style-name="T19">Node</text:span><text:span text:style-name="T12">* </text:span><text:span text:style-name="T19">cur </text:span><text:span text:style-name="T12">= </text:span><text:span text:style-name="T21">head</text:span><text:span text:style-name="T12">;<text:line-break/><text:tab/><text:tab/></text:span><text:span text:style-name="T19">Node</text:span><text:span text:style-name="T12">* </text:span><text:span text:style-name="T19">buf</text:span><text:span text:style-name="T12">;<text:line-break/><text:tab/><text:tab/></text:span><text:span text:style-name="T17">while </text:span><text:span text:style-name="T12">(</text:span><text:span text:style-name="T19">cur</text:span><text:span text:style-name="T12">) {<text:line-break/><text:tab/><text:tab/><text:tab/></text:span><text:span text:style-name="T19">buf </text:span><text:span text:style-name="T12">= </text:span><text:span text:style-name="T19">cur</text:span><text:span text:style-name="T12">;<text:line-break/><text:tab/><text:tab/><text:tab/></text:span><text:span text:style-name="T19">cur </text:span><text:span text:style-name="T12">= </text:span><text:span text:style-name="T19">cur</text:span><text:span text:style-name="T12">-&gt;</text:span><text:span text:style-name="T21">next</text:span><text:span text:style-name="T12">;<text:line-break/><text:tab/><text:tab/><text:tab/></text:span><text:span text:style-name="T17">delete </text:span><text:span text:style-name="T19">buf</text:span><text:span text:style-name="T12">;<text:line-break/><text:tab/><text:tab/>}<text:line-break/><text:tab/><text:tab/></text:span><text:span text:style-name="T21">head </text:span><text:span text:style-name="T12">= </text:span><text:span text:style-name="T17">nullptr</text:span><text:span text:style-name="T12">;<text:line-break/><text:tab/><text:tab/></text:span><text:span text:style-name="T21">tail </text:span><text:span text:style-name="T12">= </text:span><text:span text:style-name="T17">nullptr</text:span><text:span text:style-name="T12">;<text:line-break/><text:tab/>}<text:line-break/><text:line-break/><text:tab/></text:span><text:span text:style-name="T16">//Deep copy elements from source list<text:line-break/><text:tab/></text:span><text:span text:style-name="T19">Node</text:span><text:span text:style-name="T12">* </text:span><text:span text:style-name="T19">cur </text:span><text:span text:style-name="T12">= </text:span><text:span text:style-name="T19">l</text:span><text:span text:style-name="T12">.</text:span><text:span text:style-name="T21">head</text:span><text:span text:style-name="T12">;<text:line-break/><text:tab/></text:span><text:span text:style-name="T17">for </text:span><text:span text:style-name="T12">(</text:span><text:span text:style-name="T17">int </text:span><text:span text:style-name="T19">i </text:span><text:span text:style-name="T12">= </text:span><text:span text:style-name="T20">0</text:span><text:span text:style-name="T12">; </text:span><text:span text:style-name="T19">i </text:span><text:span text:style-name="T12">&lt; </text:span><text:span text:style-name="T21">size</text:span><text:span text:style-name="T12">; </text:span><text:span text:style-name="T19">i</text:span><text:span text:style-name="T12">++) {<text:line-break/><text:tab/><text:tab/></text:span><text:span text:style-name="T19">Node</text:span><text:span text:style-name="T12">* </text:span><text:span text:style-name="T19">to_add </text:span><text:span text:style-name="T12">= </text:span><text:span text:style-name="T17">new </text:span><text:span text:style-name="T19">Node</text:span><text:span text:style-name="T18">(</text:span><text:span text:style-name="T19">cur</text:span><text:span text:style-name="T12">-&gt;</text:span><text:span text:style-name="T21">data</text:span><text:span text:style-name="T18">)</text:span><text:span text:style-name="T12">;<text:line-break/><text:tab/><text:tab/></text:span><text:span text:style-name="T17">if </text:span><text:span text:style-name="T12">(!</text:span><text:span text:style-name="T21">head</text:span><text:span text:style-name="T12">) {<text:line-break/></text:span><text:soft-page-break/><text:span text:style-name="T12"><text:tab/><text:tab/><text:tab/></text:span><text:span text:style-name="T21">head </text:span><text:span text:style-name="T12">= </text:span><text:span text:style-name="T19">to_add</text:span><text:span text:style-name="T12">;<text:line-break/><text:tab/><text:tab/><text:tab/></text:span><text:span text:style-name="T21">tail </text:span><text:span text:style-name="T12">= </text:span><text:span text:style-name="T19">to_add</text:span><text:span text:style-name="T12">;<text:line-break/><text:tab/><text:tab/>}<text:line-break/><text:tab/><text:tab/></text:span><text:span text:style-name="T17">else </text:span><text:span text:style-name="T12">{<text:line-break/><text:tab/><text:tab/><text:tab/></text:span><text:span text:style-name="T21">tail</text:span><text:span text:style-name="T12">-&gt;</text:span><text:span text:style-name="T21">next </text:span><text:span text:style-name="T12">= </text:span><text:span text:style-name="T19">to_add</text:span><text:span text:style-name="T12">;<text:line-break/><text:tab/><text:tab/><text:tab/></text:span><text:span text:style-name="T21">tail</text:span><text:span text:style-name="T12">-&gt;</text:span><text:span text:style-name="T21">next</text:span><text:span text:style-name="T12">-&gt;</text:span><text:span text:style-name="T21">prev </text:span><text:span text:style-name="T12">= </text:span><text:span text:style-name="T21">tail</text:span><text:span text:style-name="T12">;<text:line-break/><text:tab/><text:tab/><text:tab/></text:span><text:span text:style-name="T21">tail </text:span><text:span text:style-name="T12">= </text:span><text:span text:style-name="T19">to_add</text:span><text:span text:style-name="T12">;<text:line-break/><text:tab/><text:tab/>}<text:line-break/><text:tab/><text:tab/></text:span><text:span text:style-name="T19">cur </text:span><text:span text:style-name="T12">= </text:span><text:span text:style-name="T19">cur</text:span><text:span text:style-name="T12">-&gt;</text:span><text:span text:style-name="T21">next</text:span><text:span text:style-name="T12">;<text:line-break/><text:tab/>}<text:line-break/><text:line-break/><text:tab/></text:span><text:span text:style-name="T17">return </text:span><text:span text:style-name="T12">*</text:span><text:span text:style-name="T17">this</text:span><text:span text:style-name="T12">;<text:line-break/>}<text:line-break/><text:line-break/></text:span><text:span text:style-name="T16">//Returns current list size<text:line-break/></text:span><text:span text:style-name="T17">int </text:span><text:span text:style-name="T19">List</text:span><text:span text:style-name="T12">::</text:span><text:span text:style-name="T17">operator</text:span><text:span text:style-name="T12">() () {<text:line-break/><text:tab/></text:span><text:span text:style-name="T17">return </text:span><text:span text:style-name="T21">size</text:span><text:span text:style-name="T12">;<text:line-break/>}<text:line-break/><text:line-break/></text:span><text:span text:style-name="T16">//Add new element to the end of the list with user input<text:line-break/></text:span><text:span text:style-name="T17">void </text:span><text:span text:style-name="T19">List</text:span><text:span text:style-name="T12">::</text:span><text:span text:style-name="T18">Add</text:span><text:span text:style-name="T12">() {<text:line-break/><text:tab/></text:span><text:span text:style-name="T19">std</text:span><text:span text:style-name="T12">::</text:span><text:span text:style-name="T19">string pars</text:span><text:span text:style-name="T12">;<text:line-break/><text:tab/></text:span><text:span text:style-name="T19">Node</text:span><text:span text:style-name="T12">* </text:span><text:span text:style-name="T19">to_add </text:span><text:span text:style-name="T12">= </text:span><text:span text:style-name="T17">new </text:span><text:span text:style-name="T19">Node</text:span><text:span text:style-name="T18">()</text:span><text:span text:style-name="T12">;<text:line-break/><text:tab/></text:span><text:span text:style-name="T19">std</text:span><text:span text:style-name="T12">::</text:span><text:span text:style-name="T19">cout </text:span><text:span text:style-name="T18">&lt;&lt; </text:span><text:span text:style-name="T15">"</text:span><text:span text:style-name="T22">\n</text:span><text:span text:style-name="T15">1. Print</text:span><text:span text:style-name="T22">\n</text:span><text:span text:style-name="T15">2. Magazin</text:span><text:span text:style-name="T22">\n</text:span><text:span text:style-name="T15">Enter 1/2: "</text:span><text:span text:style-name="T12">;<text:line-break/><text:tab/></text:span><text:span text:style-name="T19">std</text:span><text:span text:style-name="T12">::</text:span><text:span text:style-name="T18">getline</text:span><text:span text:style-name="T12">(</text:span><text:span text:style-name="T19">std</text:span><text:span text:style-name="T12">::</text:span><text:span text:style-name="T19">cin</text:span><text:span text:style-name="T12">, </text:span><text:span text:style-name="T19">pars</text:span><text:span text:style-name="T12">);<text:line-break/><text:tab/></text:span><text:span text:style-name="T17">int </text:span><text:span text:style-name="T19">par </text:span><text:span text:style-name="T12">= </text:span><text:span text:style-name="T19">std</text:span><text:span text:style-name="T12">::</text:span><text:span text:style-name="T18">stoi</text:span><text:span text:style-name="T12">(</text:span><text:span text:style-name="T19">pars</text:span><text:span text:style-name="T12">);<text:line-break/><text:tab/></text:span><text:span text:style-name="T17">if </text:span><text:span text:style-name="T12">(</text:span><text:span text:style-name="T19">par </text:span><text:span text:style-name="T12">== </text:span><text:span text:style-name="T20">1</text:span><text:span text:style-name="T12">) {<text:line-break/><text:tab/><text:tab/></text:span><text:span text:style-name="T19">Print</text:span><text:span text:style-name="T12">* </text:span><text:span text:style-name="T19">a </text:span><text:span text:style-name="T12">= </text:span><text:span text:style-name="T17">new </text:span><text:span text:style-name="T19">Print</text:span><text:span text:style-name="T18">()</text:span><text:span text:style-name="T12">;<text:line-break/><text:tab/><text:tab/></text:span><text:span text:style-name="T19">a</text:span><text:span text:style-name="T12">-&gt;</text:span><text:span text:style-name="T18">Input</text:span><text:span text:style-name="T12">();<text:line-break/><text:tab/><text:tab/></text:span><text:span text:style-name="T19">to_add</text:span><text:span text:style-name="T12">-&gt;</text:span><text:span text:style-name="T21">data </text:span><text:span text:style-name="T12">= </text:span><text:span text:style-name="T19">a</text:span><text:span text:style-name="T12">;<text:line-break/><text:tab/>}<text:line-break/><text:tab/></text:span><text:span text:style-name="T17">else if </text:span><text:span text:style-name="T12">(</text:span><text:span text:style-name="T19">par </text:span><text:span text:style-name="T12">== </text:span><text:span text:style-name="T20">2</text:span><text:span text:style-name="T12">) {<text:line-break/><text:tab/><text:tab/></text:span><text:span text:style-name="T19">Magazin</text:span><text:span text:style-name="T12">* </text:span><text:span text:style-name="T19">a </text:span><text:span text:style-name="T12">= </text:span><text:span text:style-name="T17">new </text:span><text:span text:style-name="T19">Magazin</text:span><text:span text:style-name="T18">()</text:span><text:span text:style-name="T12">;<text:line-break/><text:tab/><text:tab/></text:span><text:span text:style-name="T19">a</text:span><text:span text:style-name="T12">-&gt;</text:span><text:span text:style-name="T18">Input</text:span><text:span text:style-name="T12">();<text:line-break/><text:tab/><text:tab/></text:span><text:span text:style-name="T19">to_add</text:span><text:span text:style-name="T12">-&gt;</text:span><text:span text:style-name="T21">data </text:span><text:span text:style-name="T12">= </text:span><text:span text:style-name="T19">a</text:span><text:span text:style-name="T12">;<text:line-break/><text:tab/>}<text:line-break/><text:tab/></text:span><text:span text:style-name="T17">if </text:span><text:span text:style-name="T12">(</text:span><text:span text:style-name="T19">par </text:span><text:span text:style-name="T12">&gt; </text:span><text:span text:style-name="T20">2 </text:span><text:span text:style-name="T12">|| </text:span><text:span text:style-name="T19">par </text:span><text:span text:style-name="T12">&lt; </text:span><text:span text:style-name="T20">1</text:span><text:span text:style-name="T12">) {<text:line-break/><text:tab/><text:tab/></text:span><text:span text:style-name="T19">std</text:span><text:span text:style-name="T12">::</text:span><text:span text:style-name="T19">cout </text:span><text:span text:style-name="T18">&lt;&lt; </text:span><text:span text:style-name="T15">"ERROR</text:span><text:span text:style-name="T22">\n</text:span><text:span text:style-name="T15">"</text:span><text:span text:style-name="T12">;<text:line-break/><text:tab/><text:tab/></text:span><text:span text:style-name="T17">return</text:span><text:span text:style-name="T12">;<text:line-break/></text:span><text:soft-page-break/><text:span text:style-name="T12"><text:tab/>}<text:line-break/><text:tab/></text:span><text:span text:style-name="T17">if </text:span><text:span text:style-name="T12">(</text:span><text:span text:style-name="T21">size </text:span><text:span text:style-name="T12">== </text:span><text:span text:style-name="T20">0</text:span><text:span text:style-name="T12">) {<text:line-break/><text:tab/><text:tab/></text:span><text:span text:style-name="T21">head </text:span><text:span text:style-name="T12">= </text:span><text:span text:style-name="T19">to_add</text:span><text:span text:style-name="T12">;<text:line-break/><text:tab/><text:tab/></text:span><text:span text:style-name="T21">tail </text:span><text:span text:style-name="T12">= </text:span><text:span text:style-name="T19">to_add</text:span><text:span text:style-name="T12">;<text:line-break/><text:tab/><text:tab/></text:span><text:span text:style-name="T21">size </text:span><text:span text:style-name="T12">= </text:span><text:span text:style-name="T20">1</text:span><text:span text:style-name="T12">;<text:line-break/><text:tab/><text:tab/></text:span><text:span text:style-name="T17">return</text:span><text:span text:style-name="T12">;<text:line-break/><text:tab/>}<text:line-break/><text:tab/></text:span><text:span text:style-name="T19">to_add</text:span><text:span text:style-name="T12">-&gt;</text:span><text:span text:style-name="T21">prev </text:span><text:span text:style-name="T12">= </text:span><text:span text:style-name="T21">tail</text:span><text:span text:style-name="T12">;<text:line-break/><text:tab/></text:span><text:span text:style-name="T21">tail</text:span><text:span text:style-name="T12">-&gt;</text:span><text:span text:style-name="T21">next </text:span><text:span text:style-name="T12">= </text:span><text:span text:style-name="T19">to_add</text:span><text:span text:style-name="T12">;<text:line-break/><text:tab/></text:span><text:span text:style-name="T21">tail </text:span><text:span text:style-name="T12">= </text:span><text:span text:style-name="T19">to_add</text:span><text:span text:style-name="T12">;<text:line-break/><text:tab/></text:span><text:span text:style-name="T21">size</text:span><text:span text:style-name="T12">++;<text:line-break/>}<text:line-break/><text:line-break/></text:span><text:span text:style-name="T16">//Delete the last element from the list<text:line-break/></text:span><text:span text:style-name="T17">void </text:span><text:span text:style-name="T19">List</text:span><text:span text:style-name="T12">::</text:span><text:span text:style-name="T18">Del</text:span><text:span text:style-name="T12">() {<text:line-break/><text:tab/></text:span><text:span text:style-name="T17">if </text:span><text:span text:style-name="T12">(</text:span><text:span text:style-name="T21">size </text:span><text:span text:style-name="T12">== </text:span><text:span text:style-name="T20">0</text:span><text:span text:style-name="T12">) {<text:line-break/><text:tab/><text:tab/></text:span><text:span text:style-name="T19">std</text:span><text:span text:style-name="T12">::</text:span><text:span text:style-name="T19">cout </text:span><text:span text:style-name="T18">&lt;&lt; </text:span><text:span text:style-name="T15">"Empty!</text:span><text:span text:style-name="T22">\n</text:span><text:span text:style-name="T15">"</text:span><text:span text:style-name="T12">;<text:line-break/><text:tab/><text:tab/></text:span><text:span text:style-name="T17">return</text:span><text:span text:style-name="T12">;<text:line-break/><text:tab/>}<text:line-break/><text:tab/></text:span><text:span text:style-name="T17">if </text:span><text:span text:style-name="T12">(</text:span><text:span text:style-name="T21">size </text:span><text:span text:style-name="T12">== </text:span><text:span text:style-name="T20">1</text:span><text:span text:style-name="T12">) {<text:line-break/><text:tab/><text:tab/></text:span><text:span text:style-name="T17">delete </text:span><text:span text:style-name="T21">tail</text:span><text:span text:style-name="T12">;<text:line-break/><text:tab/><text:tab/></text:span><text:span text:style-name="T21">tail </text:span><text:span text:style-name="T12">= </text:span><text:span text:style-name="T17">nullptr</text:span><text:span text:style-name="T12">;<text:line-break/><text:tab/><text:tab/></text:span><text:span text:style-name="T21">head </text:span><text:span text:style-name="T12">= </text:span><text:span text:style-name="T17">nullptr</text:span><text:span text:style-name="T12">;<text:line-break/><text:tab/><text:tab/></text:span><text:span text:style-name="T21">size </text:span><text:span text:style-name="T12">= </text:span><text:span text:style-name="T20">0</text:span><text:span text:style-name="T12">;<text:line-break/><text:tab/><text:tab/></text:span><text:span text:style-name="T17">return</text:span><text:span text:style-name="T12">;<text:line-break/><text:tab/>}<text:line-break/><text:tab/></text:span><text:span text:style-name="T21">tail </text:span><text:span text:style-name="T12">= </text:span><text:span text:style-name="T21">tail</text:span><text:span text:style-name="T12">-&gt;</text:span><text:span text:style-name="T21">prev</text:span><text:span text:style-name="T12">;<text:line-break/><text:tab/></text:span><text:span text:style-name="T17">delete </text:span><text:span text:style-name="T21">tail</text:span><text:span text:style-name="T12">-&gt;</text:span><text:span text:style-name="T21">next</text:span><text:span text:style-name="T12">;<text:line-break/><text:tab/></text:span><text:span text:style-name="T21">tail</text:span><text:span text:style-name="T12">-&gt;</text:span><text:span text:style-name="T21">next </text:span><text:span text:style-name="T12">= </text:span><text:span text:style-name="T17">nullptr</text:span><text:span text:style-name="T12">;<text:line-break/><text:tab/></text:span><text:span text:style-name="T21">size</text:span><text:span text:style-name="T12">--;<text:line-break/>}<text:line-break/><text:line-break/></text:span><text:span text:style-name="T16">//Display all elements in the list<text:line-break/></text:span><text:span text:style-name="T17">void </text:span><text:span text:style-name="T19">List</text:span><text:span text:style-name="T12">::</text:span><text:span text:style-name="T18">Show</text:span><text:span text:style-name="T12">() {<text:line-break/><text:tab/></text:span><text:span text:style-name="T17">if </text:span><text:span text:style-name="T12">(!</text:span><text:span text:style-name="T21">head</text:span><text:span text:style-name="T12">) {<text:line-break/><text:tab/><text:tab/></text:span><text:span text:style-name="T19">std</text:span><text:span text:style-name="T12">::</text:span><text:span text:style-name="T19">cout </text:span><text:span text:style-name="T18">&lt;&lt; </text:span><text:span text:style-name="T15">"Empty!</text:span><text:span text:style-name="T22">\n</text:span><text:span text:style-name="T15">"</text:span><text:span text:style-name="T12">;<text:line-break/><text:tab/><text:tab/></text:span><text:span text:style-name="T17">return</text:span><text:span text:style-name="T12">;<text:line-break/><text:tab/>}<text:line-break/><text:line-break/></text:span><text:soft-page-break/><text:span text:style-name="T12"><text:tab/></text:span><text:span text:style-name="T19">Node </text:span><text:span text:style-name="T12">* </text:span><text:span text:style-name="T19">cur </text:span><text:span text:style-name="T12">= </text:span><text:span text:style-name="T21">head</text:span><text:span text:style-name="T12">;<text:line-break/><text:tab/></text:span><text:span text:style-name="T17">while </text:span><text:span text:style-name="T12">(</text:span><text:span text:style-name="T19">cur</text:span><text:span text:style-name="T12">) {<text:line-break/><text:tab/><text:tab/></text:span><text:span text:style-name="T19">cur</text:span><text:span text:style-name="T12">-&gt;</text:span><text:span text:style-name="T21">data</text:span><text:span text:style-name="T12">-&gt;</text:span><text:span text:style-name="T19">Show</text:span><text:span text:style-name="T12">();<text:line-break/><text:tab/><text:tab/></text:span><text:span text:style-name="T19">std</text:span><text:span text:style-name="T12">::</text:span><text:span text:style-name="T19">cout </text:span><text:span text:style-name="T18">&lt;&lt; </text:span><text:span text:style-name="T15">'</text:span><text:span text:style-name="T22">\n</text:span><text:span text:style-name="T15">'</text:span><text:span text:style-name="T12">;<text:line-break/><text:tab/><text:tab/></text:span><text:span text:style-name="T19">cur </text:span><text:span text:style-name="T12">= </text:span><text:span text:style-name="T19">cur</text:span><text:span text:style-name="T12">-&gt;</text:span><text:span text:style-name="T21">next</text:span><text:span text:style-name="T12">;<text:line-break/><text:tab/>}<text:line-break/><text:tab/></text:span><text:span text:style-name="T19">std</text:span><text:span text:style-name="T12">::</text:span><text:span text:style-name="T19">cout </text:span><text:span text:style-name="T18">&lt;&lt; </text:span><text:span text:style-name="T15">'</text:span><text:span text:style-name="T22">\n</text:span><text:span text:style-name="T15">'</text:span><text:span text:style-name="T12">;<text:line-break/>}<text:line-break/><text:line-break/></text:span><text:span text:style-name="T16">//Assign event to all elements in the list<text:line-break/></text:span><text:span text:style-name="T17">void </text:span><text:span text:style-name="T19">List</text:span><text:span text:style-name="T12">::</text:span><text:span text:style-name="T18">HandleEvent</text:span><text:span text:style-name="T12">(</text:span><text:span text:style-name="T17">const </text:span><text:span text:style-name="T19">TEvent </text:span><text:span text:style-name="T12">&amp;</text:span><text:span text:style-name="T19">e</text:span><text:span text:style-name="T12">) {<text:line-break/><text:tab/></text:span><text:span text:style-name="T17">if </text:span><text:span text:style-name="T12">(!</text:span><text:span text:style-name="T21">head</text:span><text:span text:style-name="T12">) {<text:line-break/><text:tab/><text:tab/></text:span><text:span text:style-name="T19">std</text:span><text:span text:style-name="T12">::</text:span><text:span text:style-name="T19">cout </text:span><text:span text:style-name="T18">&lt;&lt; </text:span><text:span text:style-name="T15">"Empty!</text:span><text:span text:style-name="T22">\n</text:span><text:span text:style-name="T15">"</text:span><text:span text:style-name="T12">;<text:line-break/><text:tab/><text:tab/></text:span><text:span text:style-name="T17">return</text:span><text:span text:style-name="T12">;<text:line-break/><text:tab/>}<text:line-break/><text:line-break/><text:tab/></text:span><text:span text:style-name="T19">Node</text:span><text:span text:style-name="T12">* </text:span><text:span text:style-name="T19">cur </text:span><text:span text:style-name="T12">= </text:span><text:span text:style-name="T21">head</text:span><text:span text:style-name="T12">;<text:line-break/><text:tab/></text:span><text:span text:style-name="T17">while </text:span><text:span text:style-name="T12">(</text:span><text:span text:style-name="T19">cur</text:span><text:span text:style-name="T12">) {<text:line-break/><text:tab/><text:tab/></text:span><text:span text:style-name="T19">cur</text:span><text:span text:style-name="T12">-&gt;</text:span><text:span text:style-name="T21">data</text:span><text:span text:style-name="T12">-&gt;</text:span><text:span text:style-name="T19">HandleEvent</text:span><text:span text:style-name="T12">(</text:span><text:span text:style-name="T19">e</text:span><text:span text:style-name="T12">);<text:line-break/><text:tab/><text:tab/></text:span><text:span text:style-name="T19">cur </text:span><text:span text:style-name="T12">= </text:span><text:span text:style-name="T19">cur</text:span><text:span text:style-name="T12">-&gt;</text:span><text:span text:style-name="T21">next</text:span><text:span text:style-name="T12">;<text:line-break/><text:tab/>}<text:line-break/>}</text:span></text:p>
      <text:p text:style-name="P18">Event.h</text:p>
      <text:p text:style-name="P19" loext:marker-style-name="T12"><text:span text:style-name="T14">#pragma </text:span><text:span text:style-name="T17">once<text:line-break/></text:span><text:span text:style-name="T16">//Event type constants<text:line-break/></text:span><text:span text:style-name="T17">const int </text:span><text:span text:style-name="T23">evNothing </text:span><text:span text:style-name="T12">= </text:span><text:span text:style-name="T20">0</text:span><text:span text:style-name="T12">; <text:s text:c="2"/></text:span><text:span text:style-name="T16">//no event<text:line-break/></text:span><text:span text:style-name="T17">const int </text:span><text:span text:style-name="T23">evMessage </text:span><text:span text:style-name="T12">= </text:span><text:span text:style-name="T20">100</text:span><text:span text:style-name="T12">; </text:span><text:span text:style-name="T16">//message event<text:line-break/><text:line-break/>//Command constants for message events<text:line-break/></text:span><text:span text:style-name="T17">const int </text:span><text:span text:style-name="T23">cmAdd </text:span><text:span text:style-name="T12">= </text:span><text:span text:style-name="T20">1</text:span><text:span text:style-name="T12">; <text:s text:c="2"/></text:span><text:span text:style-name="T16">//add element to list<text:line-break/></text:span><text:span text:style-name="T17">const int </text:span><text:span text:style-name="T23">cmDel </text:span><text:span text:style-name="T12">= </text:span><text:span text:style-name="T20">2</text:span><text:span text:style-name="T12">; <text:s text:c="2"/></text:span><text:span text:style-name="T16">//delete element from list<text:line-break/></text:span><text:span text:style-name="T17">const int </text:span><text:span text:style-name="T23">cmShow </text:span><text:span text:style-name="T12">= </text:span><text:span text:style-name="T20">3</text:span><text:span text:style-name="T12">; <text:s/></text:span><text:span text:style-name="T16">//show all elements<text:line-break/></text:span><text:span text:style-name="T17">const int </text:span><text:span text:style-name="T23">cmName </text:span><text:span text:style-name="T12">= </text:span><text:span text:style-name="T20">4</text:span><text:span text:style-name="T12">; <text:s/></text:span><text:span text:style-name="T16">//display print name<text:line-break/></text:span><text:span text:style-name="T17">const int </text:span><text:span text:style-name="T23">cmMake </text:span><text:span text:style-name="T12">= </text:span><text:span text:style-name="T20">5</text:span><text:span text:style-name="T12">; <text:s/></text:span><text:span text:style-name="T16">//create something<text:line-break/></text:span><text:span text:style-name="T17">const int </text:span><text:span text:style-name="T23">cmSize </text:span><text:span text:style-name="T12">= </text:span><text:span text:style-name="T20">6</text:span><text:span text:style-name="T12">; <text:s/></text:span><text:span text:style-name="T16">//show list size<text:line-break/></text:span><text:span text:style-name="T17">const int </text:span><text:span text:style-name="T23">cmQuit </text:span><text:span text:style-name="T12">= </text:span><text:span text:style-name="T20">101</text:span><text:span text:style-name="T12">;</text:span><text:span text:style-name="T16">//exit application<text:line-break/><text:line-break/>//Event structure for handling commands<text:line-break/></text:span><text:span text:style-name="T17">struct </text:span><text:span text:style-name="T19">TEvent </text:span><text:span text:style-name="T12">{<text:line-break/></text:span><text:soft-page-break/><text:span text:style-name="T12"><text:tab/></text:span><text:span text:style-name="T17">int </text:span><text:span text:style-name="T21">what</text:span><text:span text:style-name="T12">; <text:s text:c="10"/></text:span><text:span text:style-name="T16">//type of event (evNothing or evMessage)<text:line-break/><text:tab/></text:span><text:span text:style-name="T17">union </text:span><text:span text:style-name="T12">{<text:line-break/><text:tab/><text:tab/></text:span><text:span text:style-name="T17">int </text:span><text:span text:style-name="T21">command</text:span><text:span text:style-name="T12">; <text:s text:c="4"/></text:span><text:span text:style-name="T16">//command for evMessage<text:line-break/><text:tab/><text:tab/></text:span><text:span text:style-name="T17">struct </text:span><text:span text:style-name="T12">{<text:line-break/><text:tab/><text:tab/><text:tab/></text:span><text:span text:style-name="T17">int </text:span><text:span text:style-name="T21">message</text:span><text:span text:style-name="T12">; <text:s/></text:span><text:span text:style-name="T16">//additional message data<text:line-break/><text:tab/><text:tab/><text:tab/></text:span><text:span text:style-name="T17">int </text:span><text:span text:style-name="T21">a</text:span><text:span text:style-name="T12">; <text:s text:c="7"/></text:span><text:span text:style-name="T16">//parameter<text:line-break/><text:tab/><text:tab/></text:span><text:span text:style-name="T12">};<text:line-break/><text:tab/>};<text:line-break/>};</text:span></text:p>
      <text:p text:style-name="P18">Dialog.h</text:p>
      <text:p text:style-name="P19" loext:marker-style-name="T12"><text:span text:style-name="T14">#pragma </text:span><text:span text:style-name="T17">once<text:line-break/></text:span><text:span text:style-name="T14">#include </text:span><text:span text:style-name="T15">"List.h"<text:line-break/></text:span><text:span text:style-name="T14">#include </text:span><text:span text:style-name="T15">"Event.h"<text:line-break/><text:line-break/></text:span><text:span text:style-name="T16">//Dialog class for user interaction and event-driven interface<text:line-break/></text:span><text:span text:style-name="T17">class </text:span><text:span text:style-name="T19">Dialog </text:span><text:span text:style-name="T12">:<text:line-break/> <text:s text:c="3"/></text:span><text:span text:style-name="T17">public </text:span><text:span text:style-name="T19">List<text:line-break/></text:span><text:span text:style-name="T12">{<text:line-break/></text:span><text:span text:style-name="T17">public</text:span><text:span text:style-name="T12">:<text:line-break/> <text:s text:c="3"/></text:span><text:span text:style-name="T18">Dialog</text:span><text:span text:style-name="T12">();<text:line-break/> <text:s text:c="3"/></text:span><text:span text:style-name="T17">virtual </text:span><text:span text:style-name="T18">~Dialog</text:span><text:span text:style-name="T12">();<text:line-break/><text:line-break/> <text:s text:c="3"/></text:span><text:span text:style-name="T16">//Event handling and execution flow<text:line-break/> <text:s text:c="3"/></text:span><text:span text:style-name="T17">virtual void </text:span><text:span text:style-name="T18">GetEvent</text:span><text:span text:style-name="T12">(</text:span><text:span text:style-name="T19">TEvent</text:span><text:span text:style-name="T12">&amp; </text:span><text:span text:style-name="T19">event</text:span><text:span text:style-name="T12">);<text:line-break/> <text:s text:c="3"/></text:span><text:span text:style-name="T17">virtual int </text:span><text:span text:style-name="T18">Execute</text:span><text:span text:style-name="T12">();<text:line-break/> <text:s text:c="3"/></text:span><text:span text:style-name="T17">virtual void </text:span><text:span text:style-name="T18">HandleEvent</text:span><text:span text:style-name="T12">(</text:span><text:span text:style-name="T19">TEvent</text:span><text:span text:style-name="T12">&amp; </text:span><text:span text:style-name="T19">event</text:span><text:span text:style-name="T12">);<text:line-break/> <text:s text:c="3"/></text:span><text:span text:style-name="T17">virtual void </text:span><text:span text:style-name="T18">ClearEvent</text:span><text:span text:style-name="T12">(</text:span><text:span text:style-name="T19">TEvent</text:span><text:span text:style-name="T12">&amp; </text:span><text:span text:style-name="T19">event</text:span><text:span text:style-name="T12">);<text:line-break/><text:line-break/> <text:s text:c="3"/></text:span><text:span text:style-name="T16">//State management<text:line-break/> <text:s text:c="3"/></text:span><text:span text:style-name="T17">bool </text:span><text:span text:style-name="T18">Valid</text:span><text:span text:style-name="T12">();<text:line-break/> <text:s text:c="3"/></text:span><text:span text:style-name="T17">void </text:span><text:span text:style-name="T18">EndExec</text:span><text:span text:style-name="T12">();<text:line-break/><text:line-break/></text:span><text:span text:style-name="T17">protected</text:span><text:span text:style-name="T12">:<text:line-break/> <text:s text:c="3"/></text:span><text:span text:style-name="T17">int </text:span><text:span text:style-name="T21">EndState</text:span><text:span text:style-name="T12">; <text:s/></text:span><text:span text:style-name="T16">//flag indicating whether to terminate execution<text:line-break/></text:span><text:span text:style-name="T12">};</text:span></text:p>
      <text:p text:style-name="P18">Dialog.cpp</text:p>
      <text:p text:style-name="P19" loext:marker-style-name="T12"><text:soft-page-break/><text:span text:style-name="T14">#include </text:span><text:span text:style-name="T15">"Dialog.h"<text:line-break/></text:span><text:span text:style-name="T14">#include </text:span><text:span text:style-name="T15">&lt;string&gt;<text:line-break/><text:line-break/></text:span><text:span text:style-name="T16">//Basic constructor - initializes empty list with execution flag false<text:line-break/></text:span><text:span text:style-name="T19">Dialog</text:span><text:span text:style-name="T12">::</text:span><text:span text:style-name="T18">Dialog</text:span><text:span text:style-name="T12">() : </text:span><text:span text:style-name="T19">List</text:span><text:span text:style-name="T18">(</text:span><text:span text:style-name="T20">0</text:span><text:span text:style-name="T18">) </text:span><text:span text:style-name="T12">{<text:line-break/><text:tab/></text:span><text:span text:style-name="T21">EndState </text:span><text:span text:style-name="T12">= </text:span><text:span text:style-name="T20">0</text:span><text:span text:style-name="T12">;<text:line-break/>}<text:line-break/></text:span><text:span text:style-name="T19">Dialog</text:span><text:span text:style-name="T12">::</text:span><text:span text:style-name="T18">~Dialog</text:span><text:span text:style-name="T12">() {}<text:line-break/><text:line-break/></text:span><text:span text:style-name="T16">//Parse user input and convert to event structure<text:line-break/></text:span><text:span text:style-name="T17">void </text:span><text:span text:style-name="T19">Dialog</text:span><text:span text:style-name="T12">::</text:span><text:span text:style-name="T18">GetEvent</text:span><text:span text:style-name="T12">(</text:span><text:span text:style-name="T19">TEvent</text:span><text:span text:style-name="T12">&amp; </text:span><text:span text:style-name="T19">event</text:span><text:span text:style-name="T12">) {<text:line-break/><text:tab/></text:span><text:span text:style-name="T19">std</text:span><text:span text:style-name="T12">::</text:span><text:span text:style-name="T19">string Operations </text:span><text:span text:style-name="T18">= </text:span><text:span text:style-name="T15">"+-mszq?"</text:span><text:span text:style-name="T12">;<text:line-break/><text:tab/></text:span><text:span text:style-name="T19">std</text:span><text:span text:style-name="T12">::</text:span><text:span text:style-name="T19">string s</text:span><text:span text:style-name="T12">;<text:line-break/><text:tab/></text:span><text:span text:style-name="T19">std</text:span><text:span text:style-name="T12">::</text:span><text:span text:style-name="T19">string param</text:span><text:span text:style-name="T12">;<text:line-break/><text:tab/></text:span><text:span text:style-name="T17">char </text:span><text:span text:style-name="T19">code</text:span><text:span text:style-name="T12">;<text:line-break/><text:tab/></text:span><text:span text:style-name="T19">std</text:span><text:span text:style-name="T12">::</text:span><text:span text:style-name="T19">cout </text:span><text:span text:style-name="T18">&lt;&lt; </text:span><text:span text:style-name="T15">'&gt;'</text:span><text:span text:style-name="T12">;<text:line-break/><text:tab/></text:span><text:span text:style-name="T19">std</text:span><text:span text:style-name="T12">::</text:span><text:span text:style-name="T18">getline</text:span><text:span text:style-name="T12">(</text:span><text:span text:style-name="T19">std</text:span><text:span text:style-name="T12">::</text:span><text:span text:style-name="T19">cin</text:span><text:span text:style-name="T12">, </text:span><text:span text:style-name="T19">s</text:span><text:span text:style-name="T12">);<text:line-break/><text:tab/></text:span><text:span text:style-name="T19">code </text:span><text:span text:style-name="T12">= </text:span><text:span text:style-name="T19">s</text:span><text:span text:style-name="T18">[</text:span><text:span text:style-name="T20">0</text:span><text:span text:style-name="T18">]</text:span><text:span text:style-name="T12">;<text:line-break/><text:tab/></text:span><text:span text:style-name="T17">if </text:span><text:span text:style-name="T12">(</text:span><text:span text:style-name="T19">Operations</text:span><text:span text:style-name="T12">.</text:span><text:span text:style-name="T18">find</text:span><text:span text:style-name="T12">(</text:span><text:span text:style-name="T19">code</text:span><text:span text:style-name="T12">) &gt;= </text:span><text:span text:style-name="T20">0</text:span><text:span text:style-name="T12">) {<text:line-break/><text:tab/><text:tab/></text:span><text:span text:style-name="T19">event</text:span><text:span text:style-name="T12">.</text:span><text:span text:style-name="T21">what </text:span><text:span text:style-name="T12">= </text:span><text:span text:style-name="T23">evMessage</text:span><text:span text:style-name="T12">;<text:line-break/><text:tab/><text:tab/></text:span><text:span text:style-name="T17">switch </text:span><text:span text:style-name="T12">(</text:span><text:span text:style-name="T19">code</text:span><text:span text:style-name="T12">) {<text:line-break/><text:tab/><text:tab/></text:span><text:span text:style-name="T17">case </text:span><text:span text:style-name="T15">'m'</text:span><text:span text:style-name="T12">: </text:span><text:span text:style-name="T19">event</text:span><text:span text:style-name="T12">.</text:span><text:span text:style-name="T21">command </text:span><text:span text:style-name="T12">= </text:span><text:span text:style-name="T23">cmMake</text:span><text:span text:style-name="T12">; </text:span><text:span text:style-name="T17">break</text:span><text:span text:style-name="T12">;</text:span><text:span text:style-name="T16">//create m size<text:line-break/><text:tab/><text:tab/></text:span><text:span text:style-name="T17">case </text:span><text:span text:style-name="T15">'+'</text:span><text:span text:style-name="T12">: </text:span><text:span text:style-name="T19">event</text:span><text:span text:style-name="T12">.</text:span><text:span text:style-name="T21">command </text:span><text:span text:style-name="T12">= </text:span><text:span text:style-name="T23">cmAdd</text:span><text:span text:style-name="T12">; </text:span><text:span text:style-name="T17">break</text:span><text:span text:style-name="T12">;</text:span><text:span text:style-name="T16">//Add<text:line-break/><text:tab/><text:tab/></text:span><text:span text:style-name="T17">case </text:span><text:span text:style-name="T15">'-'</text:span><text:span text:style-name="T12">: </text:span><text:span text:style-name="T19">event</text:span><text:span text:style-name="T12">.</text:span><text:span text:style-name="T21">command </text:span><text:span text:style-name="T12">= </text:span><text:span text:style-name="T23">cmDel</text:span><text:span text:style-name="T12">; </text:span><text:span text:style-name="T17">break</text:span><text:span text:style-name="T12">;</text:span><text:span text:style-name="T16">//Del<text:line-break/><text:tab/><text:tab/></text:span><text:span text:style-name="T17">case </text:span><text:span text:style-name="T15">'s'</text:span><text:span text:style-name="T12">: </text:span><text:span text:style-name="T19">event</text:span><text:span text:style-name="T12">.</text:span><text:span text:style-name="T21">command </text:span><text:span text:style-name="T12">= </text:span><text:span text:style-name="T23">cmShow</text:span><text:span text:style-name="T12">; </text:span><text:span text:style-name="T17">break</text:span><text:span text:style-name="T12">;</text:span><text:span text:style-name="T16">//Show<text:line-break/><text:tab/><text:tab/></text:span><text:span text:style-name="T17">case </text:span><text:span text:style-name="T15">'z'</text:span><text:span text:style-name="T12">: </text:span><text:span text:style-name="T19">event</text:span><text:span text:style-name="T12">.</text:span><text:span text:style-name="T21">command </text:span><text:span text:style-name="T12">= </text:span><text:span text:style-name="T23">cmName</text:span><text:span text:style-name="T12">; </text:span><text:span text:style-name="T17">break</text:span><text:span text:style-name="T12">;</text:span><text:span text:style-name="T16">//Names<text:line-break/><text:tab/><text:tab/></text:span><text:span text:style-name="T17">case </text:span><text:span text:style-name="T15">'?'</text:span><text:span text:style-name="T12">: </text:span><text:span text:style-name="T19">event</text:span><text:span text:style-name="T12">.</text:span><text:span text:style-name="T21">command </text:span><text:span text:style-name="T12">= </text:span><text:span text:style-name="T23">cmSize</text:span><text:span text:style-name="T12">; </text:span><text:span text:style-name="T17">break</text:span><text:span text:style-name="T12">;</text:span><text:span text:style-name="T16">//Size<text:line-break/><text:tab/><text:tab/></text:span><text:span text:style-name="T17">case </text:span><text:span text:style-name="T15">'q'</text:span><text:span text:style-name="T12">: </text:span><text:span text:style-name="T19">event</text:span><text:span text:style-name="T12">.</text:span><text:span text:style-name="T21">command </text:span><text:span text:style-name="T12">= </text:span><text:span text:style-name="T23">cmQuit</text:span><text:span text:style-name="T12">; </text:span><text:span text:style-name="T17">break</text:span><text:span text:style-name="T12">;</text:span><text:span text:style-name="T16">//End<text:line-break/><text:tab/><text:tab/></text:span><text:span text:style-name="T12">}<text:line-break/><text:tab/><text:tab/></text:span><text:span text:style-name="T16">//Extract parameter if present<text:line-break/><text:tab/><text:tab/></text:span><text:span text:style-name="T17">if </text:span><text:span text:style-name="T12">(</text:span><text:span text:style-name="T19">s</text:span><text:span text:style-name="T12">.</text:span><text:span text:style-name="T18">length</text:span><text:span text:style-name="T12">() &gt; </text:span><text:span text:style-name="T20">1</text:span><text:span text:style-name="T12">) {<text:line-break/><text:tab/><text:tab/><text:tab/></text:span><text:span text:style-name="T19">param </text:span><text:span text:style-name="T18">= </text:span><text:span text:style-name="T19">s</text:span><text:span text:style-name="T12">.</text:span><text:span text:style-name="T18">substr</text:span><text:span text:style-name="T12">(</text:span><text:span text:style-name="T20">1</text:span><text:span text:style-name="T12">, </text:span><text:span text:style-name="T19">s</text:span><text:span text:style-name="T12">.</text:span><text:span text:style-name="T18">length</text:span><text:span text:style-name="T12">() - </text:span><text:span text:style-name="T20">1</text:span><text:span text:style-name="T12">);<text:line-break/><text:tab/><text:tab/><text:tab/></text:span><text:span text:style-name="T17">int </text:span><text:span text:style-name="T19">A </text:span><text:span text:style-name="T12">= </text:span><text:span text:style-name="T18">atoi</text:span><text:span text:style-name="T12">(</text:span><text:span text:style-name="T19">param</text:span><text:span text:style-name="T12">.</text:span><text:span text:style-name="T18">c_str</text:span><text:span text:style-name="T12">());<text:line-break/><text:tab/><text:tab/><text:tab/></text:span><text:span text:style-name="T19">event</text:span><text:span text:style-name="T12">.</text:span><text:span text:style-name="T21">a </text:span><text:span text:style-name="T12">= </text:span><text:span text:style-name="T19">A</text:span><text:span text:style-name="T12">;<text:line-break/><text:tab/><text:tab/>}<text:line-break/><text:tab/>}<text:line-break/><text:tab/></text:span><text:span text:style-name="T17">else </text:span><text:span text:style-name="T12">{<text:line-break/><text:tab/><text:tab/></text:span><text:span text:style-name="T19">event</text:span><text:span text:style-name="T12">.</text:span><text:span text:style-name="T21">what </text:span><text:span text:style-name="T12">= </text:span><text:span text:style-name="T23">evNothing</text:span><text:span text:style-name="T12">; <text:s/></text:span><text:span text:style-name="T16">//invalid command - ignore<text:line-break/></text:span><text:soft-page-break/><text:span text:style-name="T16"><text:tab/></text:span><text:span text:style-name="T12">}<text:line-break/>}<text:line-break/><text:line-break/></text:span><text:span text:style-name="T16">//Main execution loop - processes user commands until exit<text:line-break/></text:span><text:span text:style-name="T17">int </text:span><text:span text:style-name="T19">Dialog</text:span><text:span text:style-name="T12">::</text:span><text:span text:style-name="T18">Execute</text:span><text:span text:style-name="T12">() {<text:line-break/><text:tab/></text:span><text:span text:style-name="T19">TEvent event</text:span><text:span text:style-name="T12">;<text:line-break/><text:tab/></text:span><text:span text:style-name="T19">std</text:span><text:span text:style-name="T12">::</text:span><text:span text:style-name="T19">cout </text:span><text:span text:style-name="T18">&lt;&lt; </text:span><text:span text:style-name="T15">"GUIDE:</text:span><text:span text:style-name="T22">\n</text:span><text:span text:style-name="T15">m N -&gt; initialize List of N elements</text:span><text:span text:style-name="T22">\n</text:span><text:span text:style-name="T15">+ -&gt; add Element</text:span><text:span text:style-name="T22">\n</text:span><text:span text:style-name="T15">- -&gt; delete Element</text:span><text:span text:style-name="T22">\n</text:span><text:span text:style-name="T15">s -&gt; Show List</text:span><text:span text:style-name="T22">\n</text:span><text:span text:style-name="T15">z -&gt; Show Names</text:span><text:span text:style-name="T22">\n</text:span><text:span text:style-name="T15">q -&gt; End</text:span><text:span text:style-name="T22">\n</text:span><text:span text:style-name="T15">---------------------------------------------------------------</text:span><text:span text:style-name="T22">\n</text:span><text:span text:style-name="T15">"</text:span><text:span text:style-name="T12">;<text:line-break/><text:tab/></text:span><text:span text:style-name="T17">do </text:span><text:span text:style-name="T12">{<text:line-break/><text:tab/><text:tab/></text:span><text:span text:style-name="T21">EndState </text:span><text:span text:style-name="T12">= </text:span><text:span text:style-name="T20">0</text:span><text:span text:style-name="T12">;<text:line-break/><text:tab/><text:tab/></text:span><text:span text:style-name="T18">GetEvent</text:span><text:span text:style-name="T12">(</text:span><text:span text:style-name="T19">event</text:span><text:span text:style-name="T12">);<text:line-break/><text:tab/><text:tab/></text:span><text:span text:style-name="T18">HandleEvent</text:span><text:span text:style-name="T12">(</text:span><text:span text:style-name="T19">event</text:span><text:span text:style-name="T12">);<text:line-break/><text:tab/>} </text:span><text:span text:style-name="T17">while </text:span><text:span text:style-name="T12">(!</text:span><text:span text:style-name="T18">Valid</text:span><text:span text:style-name="T12">());<text:line-break/><text:tab/></text:span><text:span text:style-name="T17">return </text:span><text:span text:style-name="T21">EndState</text:span><text:span text:style-name="T12">;<text:line-break/>}<text:line-break/><text:line-break/></text:span><text:span text:style-name="T16">//Check if execution should continue<text:line-break/></text:span><text:span text:style-name="T17">bool </text:span><text:span text:style-name="T19">Dialog</text:span><text:span text:style-name="T12">::</text:span><text:span text:style-name="T18">Valid</text:span><text:span text:style-name="T12">() {<text:line-break/><text:tab/></text:span><text:span text:style-name="T17">return </text:span><text:span text:style-name="T12">!(</text:span><text:span text:style-name="T21">EndState </text:span><text:span text:style-name="T12">== </text:span><text:span text:style-name="T20">0</text:span><text:span text:style-name="T12">);<text:line-break/>}<text:line-break/><text:line-break/></text:span><text:span text:style-name="T16">//Reset event to do-nothing state<text:line-break/></text:span><text:span text:style-name="T17">void </text:span><text:span text:style-name="T19">Dialog</text:span><text:span text:style-name="T12">::</text:span><text:span text:style-name="T18">ClearEvent</text:span><text:span text:style-name="T12">(</text:span><text:span text:style-name="T19">TEvent</text:span><text:span text:style-name="T12">&amp; </text:span><text:span text:style-name="T19">event</text:span><text:span text:style-name="T12">) {<text:line-break/><text:tab/></text:span><text:span text:style-name="T19">event</text:span><text:span text:style-name="T12">.</text:span><text:span text:style-name="T21">what </text:span><text:span text:style-name="T12">= </text:span><text:span text:style-name="T23">evNothing</text:span><text:span text:style-name="T12">;<text:line-break/>}<text:line-break/><text:line-break/></text:span><text:span text:style-name="T16">//Signal to exit execution loop<text:line-break/></text:span><text:span text:style-name="T17">void </text:span><text:span text:style-name="T19">Dialog</text:span><text:span text:style-name="T12">::</text:span><text:span text:style-name="T18">EndExec</text:span><text:span text:style-name="T12">() {<text:line-break/><text:tab/></text:span><text:span text:style-name="T21">EndState </text:span><text:span text:style-name="T12">= </text:span><text:span text:style-name="T20">1</text:span><text:span text:style-name="T12">;<text:line-break/>}<text:line-break/><text:line-break/></text:span><text:span text:style-name="T16">//Process event and execute appropriate actions<text:line-break/></text:span><text:span text:style-name="T17">void </text:span><text:span text:style-name="T19">Dialog</text:span><text:span text:style-name="T12">::</text:span><text:span text:style-name="T18">HandleEvent</text:span><text:span text:style-name="T12">(</text:span><text:span text:style-name="T19">TEvent</text:span><text:span text:style-name="T12">&amp; </text:span><text:span text:style-name="T19">event</text:span><text:span text:style-name="T12">) {<text:line-break/><text:tab/></text:span><text:span text:style-name="T17">if </text:span><text:span text:style-name="T12">(</text:span><text:span text:style-name="T19">event</text:span><text:span text:style-name="T12">.</text:span><text:span text:style-name="T21">what </text:span><text:span text:style-name="T12">== </text:span><text:span text:style-name="T23">evMessage</text:span><text:span text:style-name="T12">) {<text:line-break/><text:tab/><text:tab/></text:span><text:span text:style-name="T17">switch </text:span><text:span text:style-name="T12">(</text:span><text:span text:style-name="T19">event</text:span><text:span text:style-name="T12">.</text:span><text:span text:style-name="T21">command</text:span><text:span text:style-name="T12">) {<text:line-break/><text:tab/><text:tab/></text:span><text:span text:style-name="T17">case </text:span><text:span text:style-name="T23">cmMake</text:span><text:span text:style-name="T12">:<text:line-break/></text:span><text:soft-page-break/><text:span text:style-name="T12"><text:tab/><text:tab/><text:tab/></text:span><text:span text:style-name="T17">for </text:span><text:span text:style-name="T12">(</text:span><text:span text:style-name="T17">int </text:span><text:span text:style-name="T19">i </text:span><text:span text:style-name="T12">= </text:span><text:span text:style-name="T20">0</text:span><text:span text:style-name="T12">; </text:span><text:span text:style-name="T19">i </text:span><text:span text:style-name="T12">&lt; </text:span><text:span text:style-name="T19">event</text:span><text:span text:style-name="T12">.</text:span><text:span text:style-name="T21">a</text:span><text:span text:style-name="T12">; </text:span><text:span text:style-name="T19">i</text:span><text:span text:style-name="T12">++) {<text:line-break/><text:tab/><text:tab/><text:tab/><text:tab/></text:span><text:span text:style-name="T18">Add</text:span><text:span text:style-name="T12">();<text:line-break/><text:tab/><text:tab/><text:tab/>}<text:line-break/><text:tab/><text:tab/><text:tab/></text:span><text:span text:style-name="T18">ClearEvent</text:span><text:span text:style-name="T12">(</text:span><text:span text:style-name="T19">event</text:span><text:span text:style-name="T12">); </text:span><text:span text:style-name="T17">break</text:span><text:span text:style-name="T12">;<text:line-break/><text:tab/><text:tab/></text:span><text:span text:style-name="T17">case </text:span><text:span text:style-name="T23">cmAdd</text:span><text:span text:style-name="T12">:<text:line-break/><text:tab/><text:tab/><text:tab/></text:span><text:span text:style-name="T18">Add</text:span><text:span text:style-name="T12">();<text:line-break/><text:tab/><text:tab/><text:tab/></text:span><text:span text:style-name="T18">ClearEvent</text:span><text:span text:style-name="T12">(</text:span><text:span text:style-name="T19">event</text:span><text:span text:style-name="T12">); </text:span><text:span text:style-name="T17">break</text:span><text:span text:style-name="T12">;<text:line-break/><text:tab/><text:tab/></text:span><text:span text:style-name="T17">case </text:span><text:span text:style-name="T23">cmDel</text:span><text:span text:style-name="T12">:<text:line-break/><text:tab/><text:tab/><text:tab/></text:span><text:span text:style-name="T18">Del</text:span><text:span text:style-name="T12">();<text:line-break/><text:tab/><text:tab/><text:tab/></text:span><text:span text:style-name="T18">ClearEvent</text:span><text:span text:style-name="T12">(</text:span><text:span text:style-name="T19">event</text:span><text:span text:style-name="T12">); </text:span><text:span text:style-name="T17">break</text:span><text:span text:style-name="T12">;<text:line-break/><text:tab/><text:tab/></text:span><text:span text:style-name="T17">case </text:span><text:span text:style-name="T23">cmShow</text:span><text:span text:style-name="T12">:<text:line-break/><text:tab/><text:tab/><text:tab/></text:span><text:span text:style-name="T18">Show</text:span><text:span text:style-name="T12">();<text:line-break/><text:tab/><text:tab/><text:tab/></text:span><text:span text:style-name="T18">ClearEvent</text:span><text:span text:style-name="T12">(</text:span><text:span text:style-name="T19">event</text:span><text:span text:style-name="T12">); </text:span><text:span text:style-name="T17">break</text:span><text:span text:style-name="T12">;<text:line-break/><text:tab/><text:tab/></text:span><text:span text:style-name="T17">case </text:span><text:span text:style-name="T23">cmName</text:span><text:span text:style-name="T12">:<text:line-break/><text:tab/><text:tab/><text:tab/></text:span><text:span text:style-name="T17">default</text:span><text:span text:style-name="T12">:</text:span><text:span text:style-name="T19">List</text:span><text:span text:style-name="T12">::</text:span><text:span text:style-name="T18">HandleEvent</text:span><text:span text:style-name="T12">(</text:span><text:span text:style-name="T19">event</text:span><text:span text:style-name="T12">); </text:span><text:span text:style-name="T16">//forward to parent class for name display<text:line-break/><text:tab/><text:tab/><text:tab/></text:span><text:span text:style-name="T18">ClearEvent</text:span><text:span text:style-name="T12">(</text:span><text:span text:style-name="T19">event</text:span><text:span text:style-name="T12">); </text:span><text:span text:style-name="T17">break</text:span><text:span text:style-name="T12">;<text:line-break/><text:tab/><text:tab/></text:span><text:span text:style-name="T17">case </text:span><text:span text:style-name="T23">cmSize</text:span><text:span text:style-name="T12">:<text:line-break/><text:tab/><text:tab/><text:tab/></text:span><text:span text:style-name="T19">std</text:span><text:span text:style-name="T12">::</text:span><text:span text:style-name="T19">cout </text:span><text:span text:style-name="T18">&lt;&lt; </text:span><text:span text:style-name="T12">(*</text:span><text:span text:style-name="T17">this</text:span><text:span text:style-name="T12">)</text:span><text:span text:style-name="T18">() &lt;&lt; </text:span><text:span text:style-name="T15">'</text:span><text:span text:style-name="T22">\n</text:span><text:span text:style-name="T15">'</text:span><text:span text:style-name="T12">;<text:line-break/><text:tab/><text:tab/><text:tab/></text:span><text:span text:style-name="T18">ClearEvent</text:span><text:span text:style-name="T12">(</text:span><text:span text:style-name="T19">event</text:span><text:span text:style-name="T12">); </text:span><text:span text:style-name="T17">break</text:span><text:span text:style-name="T12">;<text:line-break/><text:tab/><text:tab/></text:span><text:span text:style-name="T17">case </text:span><text:span text:style-name="T23">cmQuit</text:span><text:span text:style-name="T12">:<text:line-break/><text:tab/><text:tab/><text:tab/></text:span><text:span text:style-name="T18">EndExec</text:span><text:span text:style-name="T12">();<text:line-break/><text:tab/><text:tab/><text:tab/></text:span><text:span text:style-name="T18">ClearEvent</text:span><text:span text:style-name="T12">(</text:span><text:span text:style-name="T19">event</text:span><text:span text:style-name="T12">); </text:span><text:span text:style-name="T17">break</text:span><text:span text:style-name="T12">;<text:line-break/><text:tab/><text:tab/>}<text:line-break/><text:tab/>}<text:line-break/>}</text:span></text:p>
      <text:p text:style-name="P20" loext:marker-style-name="T1"/>
      <text:p text:style-name="P21"><draw:frame draw:style-name="fr3" draw:name="Image2" text:anchor-type="as-char" svg:width="6.4965in" svg:height="4.8327in" draw:z-index="2"><draw:image xlink:href="Pictures/10000000000003150000024BAC7BCE82.png" xlink:type="simple" xlink:show="embed" xlink:actuate="onLoad" draw:mime-type="image/png"/></draw:frame><draw:frame draw:style-name="fr4" draw:name="Image3" text:anchor-type="as-char" svg:width="6.4965in" svg:height="4.7425in" draw:z-index="3"><draw:image xlink:href="Pictures/100000010000031500000240B39B9927.png" xlink:type="simple" xlink:show="embed" xlink:actuate="onLoad" draw:mime-type="image/png"/></draw:frame></text:p>
      <text:p text:style-name="P20"><text:soft-page-break/><draw:frame draw:style-name="fr4" draw:name="Image3 Copy 1" text:anchor-type="as-char" svg:width="6.4965in" svg:height="4.7425in" draw:z-index="4"><draw:image xlink:href="Pictures/100000010000031500000240B39B9927.png" xlink:type="simple" xlink:show="embed" xlink:actuate="onLoad" draw:mime-type="image/png"/></draw:frame></text:p>
      <text:p text:style-name="P20"/>
      <text:p text:style-name="P20"><text:soft-page-break/><draw:frame draw:style-name="fr3" draw:name="Image4" text:anchor-type="as-char" svg:width="6.4965in" svg:height="5.1807in" draw:z-index="5"><draw:image xlink:href="Pictures/100000010000030C0000026E4705BFE0.png" xlink:type="simple" xlink:show="embed" xlink:actuate="onLoad" draw:mime-type="image/png"/></draw:frame><draw:frame draw:style-name="fr4" draw:name="Image5" text:anchor-type="as-char" svg:width="4.989in" svg:height="3.8016in" draw:z-index="6"><draw:image xlink:href="Pictures/10000001000001DF0000016D5D2CD70A.png" xlink:type="simple" xlink:show="embed" xlink:actuate="onLoad" draw:mime-type="image/png"/></draw:frame></text:p>
      <text:p text:style-name="P20"><text:soft-page-break/><draw:frame draw:style-name="fr3" draw:name="Image4 Copy 1" text:anchor-type="as-char" svg:width="6.4965in" svg:height="5.4772in" draw:z-index="7"><draw:image xlink:href="Pictures/100000010000026800000258E46DF0CA.png" xlink:type="simple" xlink:show="embed" xlink:actuate="onLoad" draw:mime-type="image/png"/></draw:frame></text:p>
      <text:p text:style-name="P20"><draw:frame draw:style-name="fr5" draw:name="Image6" text:anchor-type="char" svg:width="6.4161in" svg:height="3.239in" draw:z-index="8"><draw:image xlink:href="Pictures/100000010000026800000137D3C1D66A.png" xlink:type="simple" xlink:show="embed" xlink:actuate="onLoad" draw:mime-type="image/png"/></draw:frame></text:p>
      <text:p text:style-name="P22" loext:marker-style-name="T1">Контрольные вопросы</text:p>
      <text:p text:style-name="P23"><text:span text:style-name="Strong_20_Emphasis"><text:span text:style-name="T24">1. </text:span></text:span><text:span text:style-name="Strong_20_Emphasis"><text:span text:style-name="T25">Что такое класс-группа? Привести примеры таких классов. — </text:span></text:span><text:span text:style-name="Strong_20_Emphasis"><text:span text:style-name="T24">Класс, предназначенный для хранения и управления набором объектов (возможно разных типов), объединенных общим интерфейсом.</text:span></text:span></text:p>
      <text:p text:style-name="P23"><text:span text:style-name="Strong_20_Emphasis"><text:span text:style-name="T25">2. Привести пример описания класса-группы Список (List).</text:span></text:span></text:p>
      <text:p text:style-name="P23"><text:span text:style-name="Strong_20_Emphasis"><text:span text:style-name="T25"/></text:span></text:p>
      <text:p text:style-name="P24" loext:marker-style-name="T26"><text:span text:style-name="Strong_20_Emphasis"><text:span text:style-name="T27">class </text:span></text:span><text:span text:style-name="T28">List </text:span><text:span text:style-name="T26">{<text:line-break/></text:span><text:span text:style-name="T29">protected</text:span><text:span text:style-name="T26">:<text:line-break/> </text:span><text:span text:style-name="T29">int </text:span><text:span text:style-name="T30">size</text:span><text:span text:style-name="T26">;<text:line-break/> </text:span><text:span text:style-name="T28">Node</text:span><text:span text:style-name="T26">* </text:span><text:span text:style-name="T30">head</text:span><text:span text:style-name="T26">;<text:line-break/> </text:span><text:span text:style-name="T28">Node</text:span><text:span text:style-name="T26">* </text:span><text:span text:style-name="T30">tail</text:span><text:span text:style-name="T26">;<text:line-break/></text:span><text:span text:style-name="T29">public</text:span><text:span text:style-name="T26">:</text:span></text:p>
      <text:p text:style-name="P24" loext:marker-style-name="T26"><text:span text:style-name="T26"><text:tab/></text:span><text:span text:style-name="T31">List()</text:span><text:span text:style-name="T26"><text:line-break/><text:tab/></text:span><text:span text:style-name="T32">List</text:span><text:span text:style-name="T26">(</text:span><text:span text:style-name="T29">int </text:span><text:span text:style-name="T28">s</text:span><text:span text:style-name="T26">);<text:line-break/><text:tab/></text:span><text:span text:style-name="T32">List</text:span><text:span text:style-name="T26">(</text:span><text:span text:style-name="T29">const </text:span><text:span text:style-name="T28">List</text:span><text:span text:style-name="T26">&amp; </text:span><text:span text:style-name="T28">l</text:span><text:span text:style-name="T26">);<text:line-break/><text:tab/></text:span><text:span text:style-name="T32">~List</text:span><text:span text:style-name="T26">();<text:line-break/><text:line-break/><text:tab/></text:span><text:span text:style-name="T28">List</text:span><text:span text:style-name="T26">&amp; </text:span><text:span text:style-name="T29">operator</text:span><text:span text:style-name="T26">=(</text:span><text:span text:style-name="T29">const </text:span><text:span text:style-name="T28">List</text:span><text:span text:style-name="T26">&amp; </text:span><text:span text:style-name="T28">l</text:span><text:span text:style-name="T26">);<text:line-break/><text:tab/><text:line-break/><text:tab/></text:span><text:span text:style-name="T29">void </text:span><text:span text:style-name="T32">Add</text:span><text:span text:style-name="T26">();<text:line-break/><text:tab/></text:span><text:span text:style-name="T29">void </text:span><text:span text:style-name="T32">Del</text:span><text:span text:style-name="T26">();<text:line-break/><text:tab/></text:span><text:span text:style-name="T29">void </text:span><text:span text:style-name="T32">Show</text:span><text:span text:style-name="T26">();<text:line-break/><text:tab/></text:span><text:span text:style-name="T29">void </text:span><text:span text:style-name="T32">HandleEvent</text:span><text:span text:style-name="T26">(</text:span><text:span text:style-name="T29">const </text:span><text:span text:style-name="T28">TEvent</text:span><text:span text:style-name="T26">&amp; </text:span><text:span text:style-name="T28">e</text:span><text:span text:style-name="T26">);<text:line-break/><text:line-break/><text:tab/></text:span><text:span text:style-name="T33">//+n?<text:line-break/><text:tab/></text:span><text:span text:style-name="T29">int operator</text:span><text:span text:style-name="T26">() ();<text:line-break/>};</text:span></text:p>
      <text:p text:style-name="P23"><text:span text:style-name="Strong_20_Emphasis"><text:span text:style-name="T25"/></text:span></text:p>
      <text:p text:style-name="P23"><text:span text:style-name="Strong_20_Emphasis"><text:span text:style-name="T25">3. Привести пример конструктора (с параметром, без параметров, копирования) для класса-группы Список.</text:span></text:span></text:p>
      <text:p text:style-name="P23"><text:span text:style-name="Strong_20_Emphasis"><text:span text:style-name="T25"/></text:span></text:p>
      <text:p text:style-name="P19" loext:marker-style-name="T26"><text:span text:style-name="T28">List</text:span><text:span text:style-name="T26">::</text:span><text:span text:style-name="T32">List</text:span><text:span text:style-name="T26">() : </text:span><text:span text:style-name="T30">head</text:span><text:span text:style-name="T26">(</text:span><text:span text:style-name="T29">nullptr</text:span><text:span text:style-name="T26">), </text:span><text:span text:style-name="T30">tail</text:span><text:span text:style-name="T26">(</text:span><text:span text:style-name="T29">nullptr</text:span><text:span text:style-name="T26">), </text:span><text:span text:style-name="T30">size</text:span><text:span text:style-name="T26">(</text:span><text:span text:style-name="T34">0</text:span><text:span text:style-name="T26">) {}<text:line-break/><text:line-break/></text:span><text:span text:style-name="T28">List</text:span><text:span text:style-name="T26">::</text:span><text:span text:style-name="T32">List</text:span><text:span text:style-name="T26">(</text:span><text:span text:style-name="T29">int </text:span><text:span text:style-name="T28">s</text:span><text:span text:style-name="T26">) {<text:line-break/><text:tab/></text:span><text:span text:style-name="T30">size </text:span><text:span text:style-name="T26">= </text:span><text:span text:style-name="T28">s</text:span><text:span text:style-name="T26">;<text:line-break/><text:tab/></text:span><text:span text:style-name="T29">if </text:span><text:span text:style-name="T26">(</text:span><text:span text:style-name="T30">size </text:span><text:span text:style-name="T26">== </text:span><text:span text:style-name="T34">0</text:span><text:span text:style-name="T26">) {<text:line-break/><text:tab/><text:tab/></text:span><text:span text:style-name="T30">head </text:span><text:span text:style-name="T26">= </text:span><text:span text:style-name="T29">nullptr</text:span><text:span text:style-name="T26">;<text:line-break/><text:tab/><text:tab/></text:span><text:span text:style-name="T30">tail </text:span><text:span text:style-name="T26">= </text:span><text:span text:style-name="T29">nullptr</text:span><text:span text:style-name="T26">;<text:line-break/><text:tab/>}<text:line-break/><text:tab/></text:span><text:span text:style-name="T29">else </text:span><text:span text:style-name="T26">{<text:line-break/><text:tab/><text:tab/></text:span><text:span text:style-name="T29">for </text:span><text:span text:style-name="T26">(</text:span><text:span text:style-name="T29">int </text:span><text:span text:style-name="T28">i </text:span><text:span text:style-name="T26">= </text:span><text:span text:style-name="T34">0</text:span><text:span text:style-name="T26">; </text:span><text:span text:style-name="T28">i </text:span><text:span text:style-name="T26">&lt; </text:span><text:span text:style-name="T30">size</text:span><text:span text:style-name="T26">; </text:span><text:span text:style-name="T28">i</text:span><text:span text:style-name="T26">++) {<text:line-break/><text:tab/><text:tab/><text:tab/></text:span><text:span text:style-name="T32">Add</text:span><text:span text:style-name="T26">();<text:line-break/><text:tab/><text:tab/>}<text:line-break/></text:span><text:soft-page-break/><text:span text:style-name="T26"><text:tab/>}<text:line-break/>}<text:line-break/><text:line-break/></text:span><text:span text:style-name="T28">List</text:span><text:span text:style-name="T26">::</text:span><text:span text:style-name="T32">List</text:span><text:span text:style-name="T26">(</text:span><text:span text:style-name="T29">const </text:span><text:span text:style-name="T28">List</text:span><text:span text:style-name="T26">&amp; </text:span><text:span text:style-name="T28">l</text:span><text:span text:style-name="T26">) {<text:line-break/><text:tab/></text:span><text:span text:style-name="T28">Node</text:span><text:span text:style-name="T26">* </text:span><text:span text:style-name="T28">cur </text:span><text:span text:style-name="T26">= </text:span><text:span text:style-name="T28">l</text:span><text:span text:style-name="T26">.</text:span><text:span text:style-name="T30">head</text:span><text:span text:style-name="T26">;<text:line-break/><text:line-break/><text:tab/></text:span><text:span text:style-name="T29">while </text:span><text:span text:style-name="T26">(</text:span><text:span text:style-name="T28">cur</text:span><text:span text:style-name="T26">) {<text:line-break/><text:tab/><text:tab/></text:span><text:span text:style-name="T28">Node</text:span><text:span text:style-name="T26">* </text:span><text:span text:style-name="T28">to_add </text:span><text:span text:style-name="T26">= </text:span><text:span text:style-name="T29">new </text:span><text:span text:style-name="T28">Node</text:span><text:span text:style-name="T32">(</text:span><text:span text:style-name="T28">cur</text:span><text:span text:style-name="T26">-&gt;</text:span><text:span text:style-name="T30">data</text:span><text:span text:style-name="T32">)</text:span><text:span text:style-name="T26">;<text:line-break/><text:tab/><text:tab/></text:span><text:span text:style-name="T29">if </text:span><text:span text:style-name="T26">(!</text:span><text:span text:style-name="T30">head</text:span><text:span text:style-name="T26">) {<text:line-break/><text:tab/><text:tab/><text:tab/></text:span><text:span text:style-name="T30">head </text:span><text:span text:style-name="T26">= </text:span><text:span text:style-name="T28">to_add</text:span><text:span text:style-name="T26">;<text:line-break/><text:tab/><text:tab/><text:tab/></text:span><text:span text:style-name="T30">tail </text:span><text:span text:style-name="T26">= </text:span><text:span text:style-name="T28">to_add</text:span><text:span text:style-name="T26">;<text:line-break/><text:tab/><text:tab/>}<text:line-break/><text:tab/><text:tab/></text:span><text:span text:style-name="T29">else </text:span><text:span text:style-name="T26">{<text:line-break/><text:tab/><text:tab/><text:tab/></text:span><text:span text:style-name="T30">tail</text:span><text:span text:style-name="T26">-&gt;</text:span><text:span text:style-name="T30">next </text:span><text:span text:style-name="T26">= </text:span><text:span text:style-name="T28">to_add</text:span><text:span text:style-name="T26">;<text:line-break/><text:tab/><text:tab/><text:tab/></text:span><text:span text:style-name="T30">tail</text:span><text:span text:style-name="T26">-&gt;</text:span><text:span text:style-name="T30">next</text:span><text:span text:style-name="T26">-&gt;</text:span><text:span text:style-name="T30">prev </text:span><text:span text:style-name="T26">= </text:span><text:span text:style-name="T30">tail</text:span><text:span text:style-name="T26">;<text:line-break/><text:tab/><text:tab/><text:tab/></text:span><text:span text:style-name="T30">tail </text:span><text:span text:style-name="T26">= </text:span><text:span text:style-name="T28">to_add</text:span><text:span text:style-name="T26">;<text:line-break/><text:tab/><text:tab/>}<text:line-break/><text:tab/><text:tab/></text:span><text:span text:style-name="T28">cur </text:span><text:span text:style-name="T26">= </text:span><text:span text:style-name="T28">cur</text:span><text:span text:style-name="T26">-&gt;</text:span><text:span text:style-name="T30">next</text:span><text:span text:style-name="T26">;<text:line-break/><text:tab/>}<text:line-break/>}</text:span></text:p>
      <text:p text:style-name="P23"><text:span text:style-name="Strong_20_Emphasis"><text:span text:style-name="T25"/></text:span></text:p>
      <text:p text:style-name="P23"><text:span text:style-name="Strong_20_Emphasis"><text:span text:style-name="T25">4. Привести пример деструктора для класса-группы Список.</text:span></text:span></text:p>
      <text:p text:style-name="P23"><text:span text:style-name="Strong_20_Emphasis"><text:span text:style-name="T25"/></text:span></text:p>
      <text:p text:style-name="P19" loext:marker-style-name="T26"><text:span text:style-name="Strong_20_Emphasis"><text:span text:style-name="T35">List</text:span></text:span><text:span text:style-name="T26">::</text:span><text:span text:style-name="T32">~List</text:span><text:span text:style-name="T26">() {<text:line-break/><text:tab/></text:span><text:span text:style-name="T28">Node</text:span><text:span text:style-name="T26">* </text:span><text:span text:style-name="T28">cur </text:span><text:span text:style-name="T26">= </text:span><text:span text:style-name="T30">head</text:span><text:span text:style-name="T26">;<text:line-break/><text:tab/></text:span><text:span text:style-name="T28">Node</text:span><text:span text:style-name="T26">* </text:span><text:span text:style-name="T28">buf</text:span><text:span text:style-name="T26">;<text:line-break/><text:tab/></text:span><text:span text:style-name="T29">while </text:span><text:span text:style-name="T26">(</text:span><text:span text:style-name="T28">cur</text:span><text:span text:style-name="T26">) {<text:line-break/><text:tab/><text:tab/></text:span><text:span text:style-name="T28">buf </text:span><text:span text:style-name="T26">= </text:span><text:span text:style-name="T28">cur</text:span><text:span text:style-name="T26">;<text:line-break/><text:tab/><text:tab/></text:span><text:span text:style-name="T28">cur </text:span><text:span text:style-name="T26">= </text:span><text:span text:style-name="T28">cur</text:span><text:span text:style-name="T26">-&gt;</text:span><text:span text:style-name="T30">next</text:span><text:span text:style-name="T26">;<text:line-break/><text:tab/><text:tab/></text:span><text:span text:style-name="T29">delete </text:span><text:span text:style-name="T28">buf</text:span><text:span text:style-name="T26">;<text:line-break/><text:tab/>}<text:line-break/><text:tab/></text:span><text:span text:style-name="T30">head </text:span><text:span text:style-name="T26">= </text:span><text:span text:style-name="T29">nullptr</text:span><text:span text:style-name="T26">;<text:line-break/><text:tab/></text:span><text:span text:style-name="T30">tail </text:span><text:span text:style-name="T26">= </text:span><text:span text:style-name="T29">nullptr</text:span><text:span text:style-name="T26">;<text:line-break/>}</text:span></text:p>
      <text:p text:style-name="P25"><text:span text:style-name="Strong_20_Emphasis"><text:span text:style-name="T25"/></text:span></text:p>
      <text:p text:style-name="P23"><text:span text:style-name="Strong_20_Emphasis"><text:span text:style-name="T25"/></text:span></text:p>
      <text:p text:style-name="P23"><text:span text:style-name="Strong_20_Emphasis"><text:span text:style-name="T25">5. Привести пример метода для просмотра элементов для класса-группы Список.</text:span></text:span></text:p>
      <text:p text:style-name="P23"/>
      <text:p text:style-name="P23"><text:span text:style-name="Strong_20_Emphasis"><text:span text:style-name="T25">template &lt;class T&gt;</text:span></text:span></text:p>
      <text:p text:style-name="P23"><text:span text:style-name="Strong_20_Emphasis"><text:span text:style-name="T25">T&amp; List&lt;T&gt;::operator[](int index) {</text:span></text:span></text:p>
      <text:p text:style-name="P23"><text:span text:style-name="Strong_20_Emphasis"><text:span text:style-name="T25"><text:tab/>if (index &lt; size) {</text:span></text:span></text:p>
      <text:p text:style-name="P23"><text:span text:style-name="Strong_20_Emphasis"><text:span text:style-name="T25"><text:tab/><text:tab/>Node&lt;T&gt;* cur = head;</text:span></text:span></text:p>
      <text:p text:style-name="P23"><text:soft-page-break/><text:span text:style-name="Strong_20_Emphasis"><text:span text:style-name="T25"><text:tab/><text:tab/>for (int i = 0; i &lt; index; i++) {</text:span></text:span></text:p>
      <text:p text:style-name="P23"><text:span text:style-name="Strong_20_Emphasis"><text:span text:style-name="T25"><text:tab/><text:tab/><text:tab/>cur = cur-&gt;next;</text:span></text:span></text:p>
      <text:p text:style-name="P23"><text:span text:style-name="Strong_20_Emphasis"><text:span text:style-name="T25"><text:tab/><text:tab/>}</text:span></text:span></text:p>
      <text:p text:style-name="P23"><text:span text:style-name="Strong_20_Emphasis"><text:span text:style-name="T25"><text:tab/><text:tab/>return cur-&gt;data;</text:span></text:span></text:p>
      <text:p text:style-name="P23"><text:span text:style-name="Strong_20_Emphasis"><text:span text:style-name="T25"><text:tab/>}</text:span></text:span></text:p>
      <text:p text:style-name="P23"><text:span text:style-name="Strong_20_Emphasis"><text:span text:style-name="T25"><text:tab/>else {</text:span></text:span></text:p>
      <text:p text:style-name="P23"><text:span text:style-name="Strong_20_Emphasis"><text:span text:style-name="T25"><text:tab/><text:tab/>std::cout &lt;&lt; "ERROR!";</text:span></text:span></text:p>
      <text:p text:style-name="P23"><text:span text:style-name="Strong_20_Emphasis"><text:span text:style-name="T25"><text:tab/><text:tab/>T stub;</text:span></text:span></text:p>
      <text:p text:style-name="P23"><text:span text:style-name="Strong_20_Emphasis"><text:span text:style-name="T25"><text:tab/><text:tab/>return stub;</text:span></text:span></text:p>
      <text:p text:style-name="P23"><text:span text:style-name="Strong_20_Emphasis"><text:span text:style-name="T25"><text:tab/>}</text:span></text:span></text:p>
      <text:p text:style-name="P23"><text:span text:style-name="Strong_20_Emphasis"><text:span text:style-name="T25">}</text:span></text:span></text:p>
      <text:p text:style-name="P23"><text:span text:style-name="Strong_20_Emphasis"><text:span text:style-name="T25"/></text:span></text:p>
      <text:p text:style-name="P23"><text:span text:style-name="Strong_20_Emphasis"><text:span text:style-name="T25">6. Какой вид иерархии дает группа? — </text:span></text:span><text:span text:style-name="Strong_20_Emphasis"><text:span text:style-name="T24">Часть-Целое (Агрегация либо Композиция)</text:span></text:span></text:p>
      <text:p text:style-name="P23"><text:span text:style-name="Strong_20_Emphasis"><text:span text:style-name="T25">7. Почему во главе иерархии классов, содержащихся в группе объектов должен находиться абстрактный класс? — </text:span></text:span><text:span text:style-name="Strong_20_Emphasis"><text:span text:style-name="T24">Чтобы обеспечить полиморфное поведение класс-группы</text:span></text:span></text:p>
      <text:p text:style-name="P23"><text:span text:style-name="Strong_20_Emphasis"><text:span text:style-name="T25">8. Что такое событие? Для чего используются события? — </text:span></text:span><text:span text:style-name="Strong_20_Emphasis"><text:span text:style-name="T24">Сигнал о том, что произошло некое действие, объект, передаваемый между объектами группы с сообщениями и командами</text:span></text:span></text:p>
      <text:p text:style-name="P23"><text:span text:style-name="Strong_20_Emphasis"><text:span text:style-name="T25">9. Какие характеристики должно иметь событие-сообщение? — </text:span></text:span><text:span text:style-name="Strong_20_Emphasis"><text:span text:style-name="T24">Тип события, данные события, цель</text:span></text:span></text:p>
      <text:p text:style-name="P23"><text:span text:style-name="Strong_20_Emphasis"><text:span text:style-name="T25">10. Привести пример структуры, описывающей событие.</text:span></text:span></text:p>
      <text:p text:style-name="P23"><text:span text:style-name="Strong_20_Emphasis"><text:span text:style-name="T25"/></text:span></text:p>
      <text:p text:style-name="P19" loext:marker-style-name="T26"><text:span text:style-name="Strong_20_Emphasis"><text:span text:style-name="T27">struct </text:span></text:span><text:span text:style-name="T28">TEvent </text:span><text:span text:style-name="T26">{<text:line-break/><text:tab/></text:span><text:span text:style-name="T29">int </text:span><text:span text:style-name="T30">what</text:span><text:span text:style-name="T26">;<text:line-break/><text:tab/></text:span><text:span text:style-name="T29">union </text:span><text:span text:style-name="T26">{<text:line-break/><text:tab/><text:tab/></text:span><text:span text:style-name="T29">int </text:span><text:span text:style-name="T30">command</text:span><text:span text:style-name="T26">;<text:line-break/><text:tab/><text:tab/></text:span><text:span text:style-name="T29">struct </text:span><text:span text:style-name="T26">{<text:line-break/><text:tab/><text:tab/><text:tab/></text:span><text:span text:style-name="T29">int </text:span><text:span text:style-name="T30">message</text:span><text:span text:style-name="T26">;<text:line-break/><text:tab/><text:tab/><text:tab/></text:span><text:span text:style-name="T29">int </text:span><text:span text:style-name="T30">a</text:span><text:span text:style-name="T26">;<text:line-break/><text:tab/><text:tab/>};<text:line-break/><text:tab/>};<text:line-break/>};</text:span></text:p>
      <text:p text:style-name="P25"><text:span text:style-name="Strong_20_Emphasis"><text:span text:style-name="T25"/></text:span></text:p>
      <text:p text:style-name="P23"><text:span text:style-name="Strong_20_Emphasis"><text:span text:style-name="T25"/></text:span></text:p>
      <text:p text:style-name="P23"><text:span text:style-name="Strong_20_Emphasis"><text:span text:style-name="T25">11. Задана структура события</text:span></text:span></text:p>
      <text:p text:style-name="P23"><text:span text:style-name="Strong_20_Emphasis"><text:span text:style-name="T25">struct TEvent</text:span></text:span></text:p>
      <text:p text:style-name="P23"><text:span text:style-name="Strong_20_Emphasis"><text:span text:style-name="T25">{</text:span></text:span></text:p>
      <text:p text:style-name="P23"><text:soft-page-break/><text:span text:style-name="Strong_20_Emphasis"><text:span text:style-name="T25">int what;</text:span></text:span></text:p>
      <text:p text:style-name="P23"><text:span text:style-name="Strong_20_Emphasis"><text:span text:style-name="T25">union</text:span></text:span></text:p>
      <text:p text:style-name="P23"><text:span text:style-name="Strong_20_Emphasis"><text:span text:style-name="T25">{</text:span></text:span></text:p>
      <text:p text:style-name="P23"><text:span text:style-name="Strong_20_Emphasis"><text:span text:style-name="T25">MouseEventType mouse;</text:span></text:span></text:p>
      <text:p text:style-name="P23"><text:span text:style-name="Strong_20_Emphasis"><text:span text:style-name="T25">KeyDownEvent keyDown;</text:span></text:span></text:p>
      <text:p text:style-name="P23"><text:span text:style-name="Strong_20_Emphasis"><text:span text:style-name="T25">MessageEvent message;</text:span></text:span></text:p>
      <text:p text:style-name="P23"><text:span text:style-name="Strong_20_Emphasis"><text:span text:style-name="T25">}</text:span></text:span></text:p>
      <text:p text:style-name="P23"><text:span text:style-name="Strong_20_Emphasis"><text:span text:style-name="T25">};</text:span></text:span></text:p>
      <text:p text:style-name="P23"><text:span text:style-name="Strong_20_Emphasis"><text:span text:style-name="T25">Какие значения, и в каких случаях присваиваются полю what?</text:span></text:span></text:p>
      <text:p text:style-name="P26"><text:span text:style-name="Strong_20_Emphasis"><text:span text:style-name="T24">evMouseMove/evMouseRight/evMouseLeft — движение мыши, ПКМ, ЛКМ</text:span></text:span></text:p>
      <text:p text:style-name="P26"><text:span text:style-name="Strong_20_Emphasis"><text:span text:style-name="T24">evKeyDown — нажатие клавиши</text:span></text:span></text:p>
      <text:p text:style-name="P26"><text:span text:style-name="Strong_20_Emphasis"><text:span text:style-name="T24">evMessage — передача пользовательского сообщения</text:span></text:span></text:p>
      <text:p text:style-name="P23"><text:span text:style-name="Strong_20_Emphasis"><text:span text:style-name="T25">12. Задана структура события</text:span></text:span></text:p>
      <text:p text:style-name="P23"><text:span text:style-name="Strong_20_Emphasis"><text:span text:style-name="T25">struct TEvent</text:span></text:span></text:p>
      <text:p text:style-name="P23"><text:span text:style-name="Strong_20_Emphasis"><text:span text:style-name="T25">{</text:span></text:span></text:p>
      <text:p text:style-name="P23"><text:span text:style-name="Strong_20_Emphasis"><text:span text:style-name="T25">int what;//тип события</text:span></text:span></text:p>
      <text:p text:style-name="P23"><text:span text:style-name="Strong_20_Emphasis"><text:span text:style-name="T25">union</text:span></text:span></text:p>
      <text:p text:style-name="P23"><text:span text:style-name="Strong_20_Emphasis"><text:span text:style-name="T25">{</text:span></text:span></text:p>
      <text:p text:style-name="P23"><text:span text:style-name="Strong_20_Emphasis"><text:span text:style-name="T25">int command;//код комманды</text:span></text:span></text:p>
      <text:p text:style-name="P23"><text:span text:style-name="Strong_20_Emphasis"><text:span text:style-name="T25">struct//параметры команды</text:span></text:span></text:p>
      <text:p text:style-name="P23"><text:span text:style-name="Strong_20_Emphasis"><text:span text:style-name="T25">{</text:span></text:span></text:p>
      <text:p text:style-name="P23"><text:span text:style-name="Strong_20_Emphasis"><text:span text:style-name="T25">int message;</text:span></text:span></text:p>
      <text:p text:style-name="P23"><text:span text:style-name="Strong_20_Emphasis"><text:span text:style-name="T25">int a;</text:span></text:span></text:p>
      <text:p text:style-name="P23"><text:span text:style-name="Strong_20_Emphasis"><text:span text:style-name="T25">};</text:span></text:span></text:p>
      <text:p text:style-name="P23"><text:span text:style-name="Strong_20_Emphasis"><text:span text:style-name="T25">};</text:span></text:span></text:p>
      <text:p text:style-name="P23"><text:span text:style-name="Strong_20_Emphasis"><text:span text:style-name="T25">};</text:span></text:span></text:p>
      <text:p text:style-name="P23"><text:span text:style-name="Strong_20_Emphasis"><text:span text:style-name="T25">Какие значения, и в каких случаях присваиваются полю command?</text:span></text:span></text:p>
      <text:p text:style-name="P26"><text:span text:style-name="Strong_20_Emphasis"><text:span text:style-name="T24">CmName — в зависимости от того, какая команда передается, она будет либо сообщением, либо сопровождающим параметром а</text:span></text:span></text:p>
      <text:p text:style-name="P23"><text:span text:style-name="Strong_20_Emphasis"><text:span text:style-name="T25">13. Задана структура события</text:span></text:span></text:p>
      <text:p text:style-name="P23"><text:span text:style-name="Strong_20_Emphasis"><text:span text:style-name="T25">struct TEvent</text:span></text:span></text:p>
      <text:p text:style-name="P23"><text:span text:style-name="Strong_20_Emphasis"><text:span text:style-name="T25">{</text:span></text:span></text:p>
      <text:p text:style-name="P23"><text:span text:style-name="Strong_20_Emphasis"><text:span text:style-name="T25">int what;//тип события</text:span></text:span></text:p>
      <text:p text:style-name="P23"><text:span text:style-name="Strong_20_Emphasis"><text:span text:style-name="T25">union</text:span></text:span></text:p>
      <text:p text:style-name="P23"><text:span text:style-name="Strong_20_Emphasis"><text:span text:style-name="T25">{</text:span></text:span></text:p>
      <text:p text:style-name="P23"><text:span text:style-name="Strong_20_Emphasis"><text:span text:style-name="T25">int command;//код комманды</text:span></text:span></text:p>
      <text:p text:style-name="P23"><text:span text:style-name="Strong_20_Emphasis"><text:span text:style-name="T25">struct//параметры команды</text:span></text:span></text:p>
      <text:p text:style-name="P23"><text:span text:style-name="Strong_20_Emphasis"><text:span text:style-name="T25">{</text:span></text:span></text:p>
      <text:p text:style-name="P23"><text:span text:style-name="Strong_20_Emphasis"><text:span text:style-name="T25">int message;</text:span></text:span></text:p>
      <text:p text:style-name="P23"><text:soft-page-break/><text:span text:style-name="Strong_20_Emphasis"><text:span text:style-name="T25">int a;</text:span></text:span></text:p>
      <text:p text:style-name="P23"><text:span text:style-name="Strong_20_Emphasis"><text:span text:style-name="T25">};</text:span></text:span></text:p>
      <text:p text:style-name="P23"><text:span text:style-name="Strong_20_Emphasis"><text:span text:style-name="T25">};</text:span></text:span></text:p>
      <text:p text:style-name="P23"><text:span text:style-name="Strong_20_Emphasis"><text:span text:style-name="T25">};</text:span></text:span></text:p>
      <text:p text:style-name="P23"><text:span text:style-name="Strong_20_Emphasis"><text:span text:style-name="T25">Для чего используются поля a и message?</text:span></text:span></text:p>
      <text:p text:style-name="P26"><text:span text:style-name="Strong_20_Emphasis"><text:span text:style-name="T24">А — для передачи параметра с событием</text:span></text:span></text:p>
      <text:p text:style-name="P26"><text:span text:style-name="Strong_20_Emphasis"><text:span text:style-name="T24">Message — для передачи сообщения с событием</text:span></text:span></text:p>
      <text:p text:style-name="P23"><text:span text:style-name="Strong_20_Emphasis"><text:span text:style-name="T25">14. Какие методы необходимы для организации обработки сообщений? — </text:span></text:span><text:span text:style-name="Strong_20_Emphasis"><text:span text:style-name="T36">GetEvent, HandleEvent, ClearEvent, Valid</text:span></text:span></text:p>
      <text:p text:style-name="P23"><text:span text:style-name="Strong_20_Emphasis"><text:span text:style-name="T25">15. Какой вид имеет главный цикл обработки событий-сообщений?</text:span></text:span></text:p>
      <text:p text:style-name="P19" loext:marker-style-name="T26"><text:span text:style-name="Strong_20_Emphasis"><text:span text:style-name="T27">do </text:span></text:span><text:span text:style-name="T26">{<text:line-break/><text:tab/></text:span><text:span text:style-name="T30">EndState </text:span><text:span text:style-name="T26">= </text:span><text:span text:style-name="T34">0</text:span><text:span text:style-name="T26">;<text:line-break/><text:tab/></text:span><text:span text:style-name="T32">GetEvent</text:span><text:span text:style-name="T26">(</text:span><text:span text:style-name="T28">event</text:span><text:span text:style-name="T26">);<text:line-break/><text:tab/></text:span><text:span text:style-name="T32">HandleEvent</text:span><text:span text:style-name="T26">(</text:span><text:span text:style-name="T28">event</text:span><text:span text:style-name="T26">);<text:line-break/>} </text:span><text:span text:style-name="T29">while </text:span><text:span text:style-name="T26">(!</text:span><text:span text:style-name="T32">Valid</text:span><text:span text:style-name="T26">());</text:span></text:p>
      <text:p text:style-name="P23"><text:span text:style-name="Strong_20_Emphasis"><text:span text:style-name="T25">16. Какую функцию выполняет метод ClearEvent()? Каким образом? — </text:span></text:span><text:span text:style-name="Strong_20_Emphasis"><text:span text:style-name="T36">Освобождает ресурсы связанные с событием. Например при помощи delete</text:span></text:span></text:p>
      <text:p text:style-name="P23"><text:span text:style-name="Strong_20_Emphasis"><text:span text:style-name="T25">17. Какую функцию выполняет метод HandleEvent ()?Каким образом? — </text:span></text:span><text:span text:style-name="Strong_20_Emphasis"><text:span text:style-name="T36">Обрабатывает событие в соответствии с его типом и переданными с ним данными. Виртуально переопределяется в наследниках</text:span></text:span></text:p>
      <text:p text:style-name="P23"><text:span text:style-name="Strong_20_Emphasis"><text:span text:style-name="T25">18. Какую функцию выполняет метод GetEvent ()? — </text:span></text:span><text:span text:style-name="Strong_20_Emphasis"><text:span text:style-name="T36">Получает от пользователя параметры, по ним составляет событие а затем передает его на обработку.</text:span></text:span></text:p>
      <text:p text:style-name="P23"><text:span text:style-name="Strong_20_Emphasis"><text:span text:style-name="T25">19. Для чего используется поле EndState? Какой класс (объект) содержит это поле? — </text:span></text:span><text:span text:style-name="Strong_20_Emphasis"><text:span text:style-name="T36">Флаг, указывающий на то, что диалог/объект должен завершить свою работу, его содержит сам Диалог.</text:span></text:span></text:p>
      <text:p text:style-name="P23"><text:span text:style-name="Strong_20_Emphasis"><text:span text:style-name="T25">20. Для чего используется функция Valid()? — </text:span></text:span><text:span text:style-name="Strong_20_Emphasis"><text:span text:style-name="T36">Для проверки Диалога на работоспособность (В простейшем случае — достиг он EndState или нет)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等线" style:font-size-asian="12pt" style:language-asian="zh" style:country-asian="CN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2pt" fo:language="ru" fo:country="RU" style:letter-kerning="true" style:font-name-asian="等线" style:font-size-asian="12pt" style:language-asian="zh" style:country-asian="CN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等线 Light" style:font-family-asian="'等线 Light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等线 Light" style:font-family-asian="'等线 Light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c-lboyjj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Базовый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等线 Light" style:font-family-asian="'等线 Light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等线 Light" style:font-family-asian="'等线 Light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102in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c-itonen" style:family="text" style:parent-style-name="Default_20_Paragraph_20_Font"/>
    <style:style style:name="katex-mathml" style:family="text" style:parent-style-name="Default_20_Paragraph_20_Font"/>
    <style:style style:name="mord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Calibri" fo:font-family="Calibri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 style:font-name-asian="等线" style:font-family-asian="等线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Calibri" fo:font-family="Calibri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Times New Roman" fo:font-family="'Times New Roman'" style:font-family-generic="roman" style:font-pitch="variable" style:font-name-asian="等线" style:font-family-asian="等线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="Times New Roman" fo:font-family="'Times New Roman'" style:font-family-generic="roman" style:font-pitch="variable" style:font-name-asian="等线" style:font-family-asian="等线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="Calibri" fo:font-family="Calibri" style:font-family-generic="roman" style:font-pitch="variable"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text:style-name="ListLabel_20_12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ListLabel_20_13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text:style-name="ListLabel_20_14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ListLabel_20_15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text:style-name="ListLabel_20_16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8" text:style-name="ListLabel_20_17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text:style-name="ListLabel_20_18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.022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22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22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52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22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22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5.022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22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02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Дарья Альметова</meta:initial-creator>
    <meta:editing-cycles>64</meta:editing-cycles>
    <meta:creation-date>2025-12-13T14:37:00</meta:creation-date>
    <dc:date>2026-05-03T12:18:45.825728905</dc:date>
    <meta:editing-duration>PT19H3M34S</meta:editing-duration>
    <meta:generator>LibreOffice/25.8.5.2$Linux_X86_64 LibreOffice_project/580$Build-2</meta:generator>
    <meta:document-statistic meta:table-count="0" meta:image-count="9" meta:object-count="0" meta:page-count="28" meta:paragraph-count="153" meta:word-count="2525" meta:character-count="18323" meta:non-whitespace-character-count="15092"/>
    <meta:user-defined meta:name="AppVersion">16.0000</meta:user-defined>
    <meta:template xlink:type="simple" xlink:actuate="onRequest" xlink:title="Normal" xlink:href=""/>
  </office:meta>
</office:document-meta>
</file>