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B000000A1C30E48CA.png" manifest:media-type="image/png"/>
  <manifest:file-entry manifest:full-path="Pictures/10000001000004B4000006A02699D5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dc61f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officeooo:rsid="0017070d" officeooo:paragraph-rsid="0017070d"/>
    </style:style>
    <style:style style:name="P8" style:family="paragraph" style:parent-style-name="List_20_Paragraph">
      <style:paragraph-properties fo:margin-left="0in" fo:text-align="justify" style:justify-single-word="false" fo:text-indent="0.4925in" style:auto-text-indent="false" fo:break-before="page"/>
      <style:text-properties officeooo:paragraph-rsid="00482439"/>
    </style:style>
    <style:style style:name="P9" style:family="paragraph" style:parent-style-name="List_20_Paragraph">
      <style:paragraph-properties fo:margin-left="0in" fo:text-align="justify" style:justify-single-word="false" fo:text-indent="0in" style:auto-text-indent="false"/>
      <style:text-properties style:font-name="Times New Roman" fo:font-size="14pt" fo:language="ru" fo:country="RU" fo:font-weight="normal" officeooo:rsid="0032acfc" officeooo:paragraph-rsid="00482439" style:font-size-asian="14pt" style:font-weight-asian="normal" style:font-name-complex="Times New Roman1" style:font-size-complex="14pt" style:font-weight-complex="normal"/>
    </style:style>
    <style:style style:name="P10" style:family="paragraph" style:parent-style-name="List_20_Paragraph">
      <style:paragraph-properties fo:margin-left="0.7425in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List_20_Paragraph">
      <style:paragraph-properties fo:margin-left="0in" fo:text-align="justify" style:justify-single-word="false" fo:text-indent="0.4925in" style:auto-text-indent="false"/>
    </style:style>
    <style:style style:name="P12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3adf73" officeooo:paragraph-rsid="003adf73" style:font-size-asian="14pt" style:font-name-complex="Times New Roman1" style:font-size-complex="14pt"/>
    </style:style>
    <style:style style:name="P13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419a16" officeooo:paragraph-rsid="00419a16" style:font-size-asian="14pt" style:font-name-complex="Times New Roman1" style:font-size-complex="14pt"/>
    </style:style>
    <style:style style:name="P14" style:family="paragraph" style:parent-style-name="List_20_Paragraph">
      <style:paragraph-properties fo:margin-left="0in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language="en" fo:country="US" fo:font-weight="bold" officeooo:rsid="003adf73" officeooo:paragraph-rsid="003adf73" style:font-size-asian="14pt" style:font-weight-asian="bold" style:font-name-complex="Times New Roman1" style:font-size-complex="14pt" style:font-weight-complex="bold"/>
    </style:style>
    <style:style style:name="P16" style:family="paragraph" style:parent-style-name="List_20_Paragraph">
      <style:paragraph-properties fo:margin-left="0in" fo:text-align="center" style:justify-single-word="false"/>
      <style:text-properties style:font-name="Times New Roman" fo:font-size="14pt" fo:font-weight="bold" officeooo:paragraph-rsid="0033bc22" style:font-size-asian="14pt" style:font-weight-asian="bold" style:font-name-complex="Times New Roman1" style:font-size-complex="14pt" style:font-weight-complex="bold"/>
    </style:style>
    <style:style style:name="P17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officeooo:paragraph-rsid="001bab08" style:font-size-asian="14pt" style:font-name-complex="Times New Roman1" style:font-size-complex="14pt"/>
    </style:style>
    <style:style style:name="P18" style:family="paragraph" style:parent-style-name="Standard">
      <style:text-properties fo:color="#000000" loext:opacity="100%" style:font-name="Cascadia Mono" fo:font-size="9.5pt" fo:language="en" fo:country="US" fo:font-weight="bold" officeooo:rsid="003adf73" officeooo:paragraph-rsid="003adf73" fo:background-color="#ffffff" style:font-size-asian="9.5pt" style:font-weight-asian="bold" style:font-name-complex="Times New Roman1" style:font-size-complex="14pt" style:font-weight-complex="bold"/>
    </style:style>
    <style:style style:name="P19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20" style:family="paragraph" style:parent-style-name="Standard">
      <style:text-properties fo:color="#808080" loext:opacity="100%" style:font-name="Cascadia Mono" fo:font-size="9.5pt" fo:language="en" fo:country="US" fo:font-weight="bold" officeooo:rsid="003adf73" fo:background-color="#ffffff" style:font-size-asian="9.5pt" style:font-weight-asian="bold" style:font-name-complex="Times New Roman1" style:font-size-complex="14pt" style:font-weight-complex="bold"/>
    </style:style>
    <style:style style:name="P21" style:family="paragraph" style:parent-style-name="Standard">
      <style:text-properties fo:color="#0000ff" loext:opacity="100%" style:font-name="Cascadia Mono" fo:font-size="9.5pt" fo:language="en" fo:country="US" fo:font-weight="bold" officeooo:rsid="003adf73" fo:background-color="#ffffff" style:font-size-asian="9.5pt" style:font-weight-asian="bold" style:font-name-complex="Times New Roman1" style:font-size-complex="14pt" style:font-weight-complex="bold"/>
    </style:style>
    <style:style style:name="P22" style:family="paragraph" style:parent-style-name="Standard">
      <style:text-properties fo:color="#0000ff" loext:opacity="100%" style:font-name="Cascadia Mono" fo:font-size="9.5pt" fo:background-color="#ffffff" style:font-size-asian="9.5pt"/>
    </style:style>
    <style:style style:name="P23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font-weight="bold" officeooo:rsid="001a7dbe" officeooo:paragraph-rsid="001a7dbe" style:font-size-asian="14pt" style:font-weight-asian="bold" style:font-name-complex="Times New Roman1" style:font-size-complex="14pt" style:font-weight-complex="bold"/>
    </style:style>
    <style:style style:name="P24" style:family="paragraph" style:parent-style-name="List_20_Paragraph">
      <style:paragraph-properties fo:margin-left="0in" fo:text-align="center" style:justify-single-word="false"/>
      <style:text-properties officeooo:paragraph-rsid="001a7dbe"/>
    </style:style>
    <style:style style:name="P25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font-weight="bold" officeooo:rsid="003d601d" officeooo:paragraph-rsid="003d601d" style:font-size-asian="14pt" style:font-weight-asian="bold" style:font-name-complex="Times New Roman1" style:font-size-complex="14pt" style:font-weight-complex="bold"/>
    </style:style>
    <style:style style:name="P26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ru" fo:country="RU" fo:font-weight="normal" officeooo:rsid="004245f6" officeooo:paragraph-rsid="00482439" style:font-size-asian="14pt" style:font-weight-asian="normal" style:font-name-complex="Times New Roman1" style:font-size-complex="14pt" style:font-weight-complex="normal"/>
    </style:style>
    <style:style style:name="P27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ru" fo:country="RU" fo:font-weight="normal" officeooo:rsid="004245f6" officeooo:paragraph-rsid="00493fd5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fo:font-weight="bold" officeooo:rsid="0046eef9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1a7dbe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fo:font-weight="bold" officeooo:rsid="00482439" style:font-weight-asian="bold" style:font-weight-complex="bold"/>
    </style:style>
    <style:style style:name="T11" style:family="text">
      <style:text-properties officeooo:rsid="00419a16"/>
    </style:style>
    <style:style style:name="T12" style:family="text">
      <style:text-properties fo:language="en" fo:country="US" officeooo:rsid="00419a16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482439"/>
    </style:style>
    <style:style style:name="T15" style:family="text">
      <style:text-properties officeooo:rsid="00482439"/>
    </style:style>
    <style:style style:name="T16" style:family="text">
      <style:text-properties fo:font-weight="bold" officeooo:rsid="001c65e1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80808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9" style:family="text">
      <style:text-properties fo:color="#9e880d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0" style:family="text">
      <style:text-properties fo:color="#0033b3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1" style:family="text">
      <style:text-properties fo:color="#067d17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2" style:family="text">
      <style:text-properties fo:color="#000000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3" style:family="text">
      <style:text-properties fo:color="#8c8c8c" loext:opacity="100%" fo:font-family="'JetBrains Mono'" style:font-family-generic="roman" style:font-pitch="variable" fo:font-size="12pt" fo:font-style="italic" fo:font-weight="normal" style:font-size-asian="12pt" style:font-style-asian="italic" style:font-weight-asian="normal"/>
    </style:style>
    <style:style style:name="T24" style:family="text">
      <style:text-properties fo:color="#808080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5" style:family="text">
      <style:text-properties fo:color="#871094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6" style:family="text">
      <style:text-properties fo:color="#00627a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7" style:family="text">
      <style:text-properties fo:color="#1750eb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8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29" style:family="text">
      <style:text-properties officeooo:rsid="00489290"/>
    </style:style>
    <style:style style:name="T30" style:family="text">
      <style:text-properties fo:language="en" fo:country="US" officeooo:rsid="00489290"/>
    </style:style>
    <style:style style:name="T31" style:family="text">
      <style:text-properties officeooo:rsid="00493aee"/>
    </style:style>
    <style:style style:name="T32" style:family="text">
      <style:text-properties fo:language="en" fo:country="US" officeooo:rsid="00493aee"/>
    </style:style>
    <style:style style:name="T33" style:family="text">
      <style:text-properties officeooo:rsid="00493fd5"/>
    </style:style>
    <style:style style:name="T34" style:family="text">
      <style:text-properties fo:language="en" fo:country="US" officeooo:rsid="00493fd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217066912"/><text:span text:style-name="T1">Министерство науки и высшего образования Российской Федерации</text:span><text:span text:style-name="T1"/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" loext:marker-style-name="T1"><text:span text:style-name="T1">«Пермский национальный исследовательский политехнический университет»</text:span><text:span text:style-name="T1"/></text:p>
      <text:p text:style-name="P2" loext:marker-style-name="T2"/>
      <text:p text:style-name="P1" loext:marker-style-name="T2"><text:span text:style-name="T2">Электротехнический факультет</text:span><text:span text:style-name="T2"/></text:p>
      <text:p text:style-name="Standard" loext:marker-style-name="T3"><text:span text:style-name="T2">Выпускающая кафедра: </text:span><text:span text:style-name="T3">информационные технологии и автоматизированные системы (ИТАС)</text:span></text:p>
      <text:p text:style-name="Standard" loext:marker-style-name="T3"><text:span text:style-name="T2">Направление подготовки: </text:span><text:span text:style-name="T3">09.03.04 Программная инженерия</text:span></text:p>
      <text:p text:style-name="P3" loext:marker-style-name="T2"/>
      <text:p text:style-name="P4" loext:marker-style-name="T1"/>
      <text:p text:style-name="P1" loext:marker-style-name="T1"><text:span text:style-name="T1">ОТЧЕТ</text:span><text:span text:style-name="T1"/></text:p>
      <text:p text:style-name="P1" loext:marker-style-name="T4"><text:span text:style-name="T1">Лабораторная работа</text:span></text:p>
      <text:p text:style-name="P1" loext:marker-style-name="T1"><text:span text:style-name="T1">«</text:span><text:span text:style-name="T5">Перегрузка операций</text:span><text:span text:style-name="T1">»</text:span></text:p>
      <text:p text:style-name="P1" loext:marker-style-name="T1"><text:span text:style-name="T1">По дисциплине «Основы алгоритмизации и программирования»</text:span><text:span text:style-name="T1"/></text:p>
      <text:p text:style-name="P5" loext:marker-style-name="T6"/>
      <text:p text:style-name="P2" loext:marker-style-name="T2"/>
      <text:p text:style-name="P2" loext:marker-style-name="T2"/>
      <text:p text:style-name="P2" loext:marker-style-name="T2"/>
      <text:p text:style-name="P6" loext:marker-style-name="T2"><text:span text:style-name="T2">Выполнил студент группы РИС-25-2б</text:span><text:span text:style-name="T2"/></text:p>
      <text:p text:style-name="P7" loext:marker-style-name="T2"><text:span text:style-name="T2">Фокин Алексей Дмитриевич</text:span></text:p>
      <text:p text:style-name="P6" loext:marker-style-name="T2"><text:span text:style-name="T2">Принял: Доц. Полякова О.А.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" loext:marker-style-name="T7"><text:span text:style-name="T2">Пермь 202</text:span><text:span text:style-name="T8">6</text:span></text:p>
      <text:p text:style-name="P8" loext:marker-style-name="T9"><text:span text:style-name="T1">Постановка задачи</text:span><text:span text:style-name="T9">:</text:span></text:p>
      <text:p text:style-name="P9" loext:marker-style-name="T9"><text:span text:style-name="T10">1. <text:s text:c="3"/></text:span>Определить пользовательский класс.</text:p>
      <text:p text:style-name="P9" loext:marker-style-name="T9">2. Определить в классе следующие конструкторы: без параметров, с параметрами, копирования.</text:p>
      <text:p text:style-name="P9" loext:marker-style-name="T9">3. Определить в классе деструктор.</text:p>
      <text:p text:style-name="P9" loext:marker-style-name="T9">4. Определить в классе компоненты-функции для просмотра и установки полей данных (селекторы и модификаторы).</text:p>
      <text:p text:style-name="P9" loext:marker-style-name="T9">5. Перегрузить операцию присваивания.</text:p>
      <text:p text:style-name="P9" loext:marker-style-name="T9">6. Перегрузить операции ввода и вывода объектов с помощью потоков.</text:p>
      <text:p text:style-name="P9" loext:marker-style-name="T9">7. Перегрузить операции указанные в варианте.</text:p>
      <text:p text:style-name="P9" loext:marker-style-name="T9">8. Написать программу, в которой продемонстрировать создание объектов и работу всех перегруженных операций.</text:p>
      <text:p text:style-name="P9" loext:marker-style-name="T9"/>
      <text:p text:style-name="P9" loext:marker-style-name="T9">Создать класс Pair (пара чисел). Пара должна быть представлено двумя полями: типа int для первого числа и типа double для второго. Первое число при выводе на экран должно быть отделено от второго числа двоеточием. Реализовать:</text:p>
      <text:p text:style-name="P9" loext:marker-style-name="T9">- вычитание пар чисел</text:p>
      <text:p text:style-name="P9" loext:marker-style-name="T9">- добавление константы к паре (увеличивается первое число, если константа целая, второе, если константа вещественная).</text:p>
      <text:p text:style-name="P10" loext:marker-style-name="T2"/>
      <text:p text:style-name="P11" loext:marker-style-name="T9"><text:span text:style-name="T1">Анализ задачи</text:span><text:span text:style-name="T9">:</text:span></text:p>
      <text:list text:style-name="WWNum25">
        <text:list-item>
          <text:p text:style-name="P12">Реализуем <text:span text:style-name="T11">указанную структуру с указанными полями с модификатором </text:span><text:span text:style-name="T12">private</text:span></text:p>
        </text:list-item>
        <text:list-item>
          <text:p text:style-name="P13">С модификатором <text:span text:style-name="T13">public </text:span>реализуем конструкторы (без параметров, с параметрами, копирования), деструктор (все поля — типы по умолчанию поэтому определение оставляем пустым), Реализуем <text:span text:style-name="T14">2</text:span> геттера (по одному на поле), реализуем <text:span text:style-name="T14">2</text:span> сеттера (по одному на поле). <text:span text:style-name="T15">Переопределим операцции присваивания, сложения, вычитания, в качестве дружественных функций переопределим взаимодействие с потоками </text:span><text:span text:style-name="T14">iostream</text:span></text:p>
        </text:list-item>
        <text:list-item>
          <text:p text:style-name="P13">Реализуем главную функцию с тестированием всего вышеперечисленного</text:p>
        </text:list-item>
      </text:list>
      <text:p text:style-name="P14" loext:marker-style-name="T1"/>
      <text:p text:style-name="P15">UML</text:p>
      <text:p text:style-name="P16" loext:marker-style-name="T1"><draw:frame draw:style-name="fr1" draw:name="Изображение1" text:anchor-type="as-char" svg:y="-2.5866in" svg:width="4.6382in" svg:height="6.8862in" draw:z-index="0"><draw:image xlink:href="Pictures/10000001000004B4000006A02699D53D.png" xlink:type="simple" xlink:show="embed" xlink:actuate="onLoad" draw:mime-type="image/png"/></draw:frame></text:p>
      <text:p text:style-name="P17" loext:marker-style-name="T1"><text:span text:style-name="T16">К</text:span><text:span text:style-name="T17">од</text:span></text:p>
      <text:p text:style-name="P18"><text:span text:style-name="T11">Pa</text:span><text:span text:style-name="T15">ir</text:span>.h:</text:p>
      <text:p text:style-name="P19" loext:marker-style-name="T18"><text:span text:style-name="T19">#pragma </text:span><text:span text:style-name="T20">once<text:line-break/></text:span><text:span text:style-name="T19">#include </text:span><text:span text:style-name="T21">&lt;iostream&gt;<text:line-break/><text:line-break/></text:span><text:span text:style-name="T20">class </text:span><text:span text:style-name="T22">Pair </text:span><text:span text:style-name="T18">{ </text:span><text:span text:style-name="T23">//class definition<text:line-break/></text:span><text:span text:style-name="T24">private:<text:line-break/><text:tab/></text:span><text:span text:style-name="T20">int </text:span><text:span text:style-name="T25">first</text:span><text:span text:style-name="T18">;<text:line-break/><text:tab/></text:span><text:span text:style-name="T20">double </text:span><text:span text:style-name="T25">second</text:span><text:span text:style-name="T18">;<text:line-break/></text:span><text:span text:style-name="T20">public</text:span><text:span text:style-name="T18">:<text:line-break/><text:tab/></text:span><text:span text:style-name="T26">Pair</text:span><text:span text:style-name="T18">() { </text:span><text:span text:style-name="T25">first </text:span><text:span text:style-name="T18">= </text:span><text:span text:style-name="T27">0</text:span><text:span text:style-name="T18">; </text:span><text:span text:style-name="T25">second </text:span><text:span text:style-name="T18">= </text:span><text:span text:style-name="T27">0.0</text:span><text:span text:style-name="T18">; }</text:span><text:span text:style-name="T24">; </text:span><text:span text:style-name="T23">//default constructor<text:line-break/><text:tab/></text:span><text:span text:style-name="T26">Pair</text:span><text:span text:style-name="T18">(</text:span><text:span text:style-name="T20">int </text:span><text:span text:style-name="T22">f</text:span><text:span text:style-name="T18">, </text:span><text:span text:style-name="T20">double </text:span><text:span text:style-name="T22">s</text:span><text:span text:style-name="T18">) { </text:span><text:span text:style-name="T25">first </text:span><text:span text:style-name="T18">= </text:span><text:span text:style-name="T22">f</text:span><text:span text:style-name="T18">; </text:span><text:span text:style-name="T25">second </text:span><text:span text:style-name="T18">= </text:span><text:span text:style-name="T22">s</text:span><text:span text:style-name="T18">; } </text:span><text:span text:style-name="T23">//constructor with parameters<text:line-break/><text:tab/></text:span><text:span text:style-name="T26">Pair</text:span><text:span text:style-name="T18">(</text:span><text:span text:style-name="T20">const </text:span><text:span text:style-name="T22">Pair</text:span><text:span text:style-name="T18">&amp; </text:span><text:span text:style-name="T22">p</text:span><text:span text:style-name="T18">) { </text:span><text:span text:style-name="T25">first </text:span><text:span text:style-name="T18">= </text:span><text:span text:style-name="T22">p</text:span><text:span text:style-name="T18">.</text:span><text:span text:style-name="T25">first</text:span><text:span text:style-name="T18">; </text:span><text:span text:style-name="T25">second </text:span><text:span text:style-name="T18">= </text:span><text:span text:style-name="T22">p</text:span><text:span text:style-name="T18">.</text:span><text:span text:style-name="T25">second</text:span><text:span text:style-name="T18">;} </text:span><text:span text:style-name="T23">//copy constructor<text:line-break/><text:tab/></text:span><text:span text:style-name="T26">~Pair</text:span><text:span text:style-name="T18">() {}</text:span><text:span text:style-name="T24">; </text:span><text:span text:style-name="T23">//destructor<text:line-break/><text:tab/>//basic getters<text:line-break/><text:tab/></text:span><text:span text:style-name="T20">int </text:span><text:span text:style-name="T26">getFirst</text:span><text:span text:style-name="T18">() </text:span><text:span text:style-name="T20">const </text:span><text:span text:style-name="T18">{ </text:span><text:span text:style-name="T20">return </text:span><text:span text:style-name="T25">first</text:span><text:span text:style-name="T18">; }<text:line-break/><text:tab/></text:span><text:span text:style-name="T20">double </text:span><text:span text:style-name="T26">getSecond</text:span><text:span text:style-name="T18">() </text:span><text:span text:style-name="T20">const </text:span><text:span text:style-name="T18">{ </text:span><text:span text:style-name="T20">return </text:span><text:span text:style-name="T25">second</text:span><text:span text:style-name="T18">; }<text:line-break/><text:tab/></text:span><text:span text:style-name="T23">//basic setters<text:line-break/><text:tab/></text:span><text:span text:style-name="T20">void </text:span><text:span text:style-name="T26">setFirst</text:span><text:span text:style-name="T18">(</text:span><text:span text:style-name="T20">int </text:span><text:span text:style-name="T22">f</text:span><text:span text:style-name="T18">) { </text:span><text:span text:style-name="T25">first </text:span><text:span text:style-name="T18">= </text:span><text:span text:style-name="T22">f</text:span><text:span text:style-name="T18">; }<text:line-break/><text:tab/></text:span><text:span text:style-name="T20">void </text:span><text:span text:style-name="T26">setSecond</text:span><text:span text:style-name="T18">(</text:span><text:span text:style-name="T20">double </text:span><text:span text:style-name="T22">s</text:span><text:span text:style-name="T18">) { </text:span><text:span text:style-name="T25">second </text:span><text:span text:style-name="T18">= </text:span><text:span text:style-name="T22">s</text:span><text:span text:style-name="T18">; }<text:line-break/><text:tab/></text:span><text:span text:style-name="T23">//basic operations overload<text:line-break/><text:tab/></text:span><text:span text:style-name="T22">Pair</text:span><text:span text:style-name="T18">&amp; </text:span><text:span text:style-name="T20">operator</text:span><text:span text:style-name="T18">= (</text:span><text:span text:style-name="T20">const </text:span><text:span text:style-name="T22">Pair</text:span><text:span text:style-name="T18">&amp; </text:span><text:span text:style-name="T22">p</text:span><text:span text:style-name="T18">);<text:line-break/><text:tab/></text:span><text:span text:style-name="T22">Pair </text:span><text:span text:style-name="T20">operator</text:span><text:span text:style-name="T18">-(</text:span><text:span text:style-name="T20">const </text:span><text:span text:style-name="T22">Pair</text:span><text:span text:style-name="T18">&amp;);<text:line-break/><text:tab/></text:span><text:span text:style-name="T22">Pair </text:span><text:span text:style-name="T20">operator</text:span><text:span text:style-name="T18">+(</text:span><text:span text:style-name="T20">int</text:span><text:span text:style-name="T18">);<text:line-break/><text:tab/></text:span><text:span text:style-name="T22">Pair </text:span><text:span text:style-name="T20">operator</text:span><text:span text:style-name="T18">+(</text:span><text:span text:style-name="T20">double</text:span><text:span text:style-name="T18">);<text:line-break/><text:tab/></text:span><text:span text:style-name="T23">//console i/o overload<text:line-break/><text:tab/></text:span><text:span text:style-name="T20">friend </text:span><text:span text:style-name="T22">std</text:span><text:span text:style-name="T18">::istream&amp; </text:span><text:span text:style-name="T20">operator</text:span><text:span text:style-name="T18">&gt;&gt; (</text:span><text:span text:style-name="T22">std</text:span><text:span text:style-name="T18">::istream&amp; </text:span><text:span text:style-name="T22">in</text:span><text:span text:style-name="T18">, </text:span><text:span text:style-name="T22">Pair</text:span><text:span text:style-name="T18">&amp; </text:span><text:span text:style-name="T22">p</text:span><text:span text:style-name="T18">);<text:line-break/><text:tab/></text:span><text:span text:style-name="T20">friend </text:span><text:span text:style-name="T22">std</text:span><text:span text:style-name="T18">::ostream&amp; </text:span><text:span text:style-name="T20">operator</text:span><text:span text:style-name="T18">&lt;&lt; (</text:span><text:span text:style-name="T22">std</text:span><text:span text:style-name="T18">::ostream&amp; </text:span><text:span text:style-name="T22">out</text:span><text:span text:style-name="T18">, </text:span><text:span text:style-name="T20">const </text:span><text:span text:style-name="T22">Pair</text:span><text:span text:style-name="T18">&amp; </text:span><text:span text:style-name="T22">p</text:span><text:span text:style-name="T18">);<text:line-break/>};</text:span></text:p>
      <text:p text:style-name="P20" loext:marker-style-name="T28"/>
      <text:p text:style-name="P18"><text:span text:style-name="T11">Pa</text:span><text:span text:style-name="T15">ir</text:span>.cpp:</text:p>
      <text:p text:style-name="P19" loext:marker-style-name="T18"><text:span text:style-name="T19">#include </text:span><text:span text:style-name="T21">"Pair.h"<text:line-break/></text:span><text:span text:style-name="T19">#include </text:span><text:span text:style-name="T21">&lt;iostream&gt;<text:line-break/></text:span><text:span text:style-name="T20">using namespace </text:span><text:span text:style-name="T22">std</text:span><text:span text:style-name="T18">;<text:line-break/><text:line-break/></text:span><text:soft-page-break/><text:span text:style-name="T22">Pair</text:span><text:span text:style-name="T18">&amp; </text:span><text:span text:style-name="T22">Pair</text:span><text:span text:style-name="T18">::</text:span><text:span text:style-name="T20">operator</text:span><text:span text:style-name="T18">= (</text:span><text:span text:style-name="T20">const </text:span><text:span text:style-name="T22">Pair</text:span><text:span text:style-name="T18">&amp; </text:span><text:span text:style-name="T22">p</text:span><text:span text:style-name="T18">) { </text:span><text:span text:style-name="T23">//overloading '='<text:line-break/><text:tab/></text:span><text:span text:style-name="T20">if </text:span><text:span text:style-name="T18">(</text:span><text:span text:style-name="T20">this </text:span><text:span text:style-name="T18">== &amp;</text:span><text:span text:style-name="T22">p</text:span><text:span text:style-name="T18">) </text:span><text:span text:style-name="T20">return </text:span><text:span text:style-name="T18">*</text:span><text:span text:style-name="T20">this</text:span><text:span text:style-name="T18">; </text:span><text:span text:style-name="T23">//to avoid self-assignment<text:line-break/><text:tab/></text:span><text:span text:style-name="T25">first </text:span><text:span text:style-name="T18">= </text:span><text:span text:style-name="T22">p</text:span><text:span text:style-name="T18">.</text:span><text:span text:style-name="T25">first</text:span><text:span text:style-name="T18">;<text:line-break/><text:tab/></text:span><text:span text:style-name="T25">second </text:span><text:span text:style-name="T18">= </text:span><text:span text:style-name="T22">p</text:span><text:span text:style-name="T18">.</text:span><text:span text:style-name="T25">second</text:span><text:span text:style-name="T18">;<text:line-break/><text:tab/></text:span><text:span text:style-name="T20">return </text:span><text:span text:style-name="T18">*</text:span><text:span text:style-name="T20">this</text:span><text:span text:style-name="T18">;<text:line-break/>}<text:line-break/><text:line-break/></text:span><text:span text:style-name="T22">Pair Pair</text:span><text:span text:style-name="T18">::</text:span><text:span text:style-name="T20">operator</text:span><text:span text:style-name="T18">-(</text:span><text:span text:style-name="T20">const </text:span><text:span text:style-name="T22">Pair</text:span><text:span text:style-name="T18">&amp; </text:span><text:span text:style-name="T22">p</text:span><text:span text:style-name="T18">) { </text:span><text:span text:style-name="T23">//subtration overload<text:line-break/><text:tab/></text:span><text:span text:style-name="T22">Pair temp</text:span><text:span text:style-name="T18">;<text:line-break/><text:tab/></text:span><text:span text:style-name="T23">//subtracting both attributes separately<text:line-break/><text:tab/></text:span><text:span text:style-name="T22">temp</text:span><text:span text:style-name="T18">.</text:span><text:span text:style-name="T25">first </text:span><text:span text:style-name="T18">= </text:span><text:span text:style-name="T25">first </text:span><text:span text:style-name="T18">- </text:span><text:span text:style-name="T22">p</text:span><text:span text:style-name="T18">.</text:span><text:span text:style-name="T25">first</text:span><text:span text:style-name="T18">;<text:line-break/><text:tab/></text:span><text:span text:style-name="T22">temp</text:span><text:span text:style-name="T18">.</text:span><text:span text:style-name="T25">second </text:span><text:span text:style-name="T18">= </text:span><text:span text:style-name="T25">second </text:span><text:span text:style-name="T18">- </text:span><text:span text:style-name="T22">p</text:span><text:span text:style-name="T18">.</text:span><text:span text:style-name="T25">second</text:span><text:span text:style-name="T18">;<text:line-break/><text:tab/></text:span><text:span text:style-name="T20">return </text:span><text:span text:style-name="T22">temp</text:span><text:span text:style-name="T18">;<text:line-break/>}<text:line-break/><text:line-break/></text:span><text:span text:style-name="T22">Pair Pair</text:span><text:span text:style-name="T18">::</text:span><text:span text:style-name="T20">operator</text:span><text:span text:style-name="T18">+(</text:span><text:span text:style-name="T20">int </text:span><text:span text:style-name="T22">n</text:span><text:span text:style-name="T18">) {<text:line-break/><text:tab/></text:span><text:span text:style-name="T22">Pair temp</text:span><text:span text:style-name="T18">;<text:line-break/><text:tab/></text:span><text:span text:style-name="T23">//if we're adding 'int', add it to the first attribute<text:line-break/><text:tab/></text:span><text:span text:style-name="T22">temp</text:span><text:span text:style-name="T18">.</text:span><text:span text:style-name="T25">first </text:span><text:span text:style-name="T18">= </text:span><text:span text:style-name="T25">first </text:span><text:span text:style-name="T18">+ </text:span><text:span text:style-name="T22">n</text:span><text:span text:style-name="T18">;<text:line-break/><text:tab/></text:span><text:span text:style-name="T22">temp</text:span><text:span text:style-name="T18">.</text:span><text:span text:style-name="T25">second </text:span><text:span text:style-name="T18">= </text:span><text:span text:style-name="T25">second</text:span><text:span text:style-name="T18">;<text:line-break/><text:tab/></text:span><text:span text:style-name="T20">return </text:span><text:span text:style-name="T22">temp</text:span><text:span text:style-name="T18">;<text:line-break/>}<text:line-break/><text:line-break/></text:span><text:span text:style-name="T22">Pair Pair</text:span><text:span text:style-name="T18">::</text:span><text:span text:style-name="T20">operator</text:span><text:span text:style-name="T18">+(</text:span><text:span text:style-name="T20">double </text:span><text:span text:style-name="T22">n</text:span><text:span text:style-name="T18">) {<text:line-break/><text:tab/></text:span><text:span text:style-name="T22">Pair temp</text:span><text:span text:style-name="T18">;<text:line-break/><text:tab/></text:span><text:span text:style-name="T23">//if we're adding 'double', add it to the second attribute<text:line-break/><text:tab/></text:span><text:span text:style-name="T22">temp</text:span><text:span text:style-name="T18">.</text:span><text:span text:style-name="T25">first </text:span><text:span text:style-name="T18">= </text:span><text:span text:style-name="T25">first</text:span><text:span text:style-name="T18">;<text:line-break/><text:tab/></text:span><text:span text:style-name="T22">temp</text:span><text:span text:style-name="T18">.</text:span><text:span text:style-name="T25">second </text:span><text:span text:style-name="T18">= </text:span><text:span text:style-name="T25">second </text:span><text:span text:style-name="T18">+ </text:span><text:span text:style-name="T22">n</text:span><text:span text:style-name="T18">;<text:line-break/><text:tab/></text:span><text:span text:style-name="T20">return </text:span><text:span text:style-name="T22">temp</text:span><text:span text:style-name="T18">;<text:line-break/>}<text:line-break/></text:span><text:span text:style-name="T23">//overload of console i/o to make it stylized<text:line-break/></text:span><text:span text:style-name="T18">istream&amp; </text:span><text:span text:style-name="T20">operator</text:span><text:span text:style-name="T18">&gt;&gt; (istream&amp; </text:span><text:span text:style-name="T22">in</text:span><text:span text:style-name="T18">, </text:span><text:span text:style-name="T22">Pair</text:span><text:span text:style-name="T18">&amp; </text:span><text:span text:style-name="T22">p</text:span><text:span text:style-name="T18">) {<text:line-break/><text:tab/>cout &lt;&lt; </text:span><text:span text:style-name="T21">"Enter first: "</text:span><text:span text:style-name="T18">;<text:line-break/><text:tab/></text:span><text:span text:style-name="T22">in </text:span><text:span text:style-name="T18">&gt;&gt; </text:span><text:span text:style-name="T22">p</text:span><text:span text:style-name="T18">.</text:span><text:span text:style-name="T25">first</text:span><text:span text:style-name="T18">;<text:line-break/><text:tab/>cout &lt;&lt; </text:span><text:span text:style-name="T21">"Enter second: "</text:span><text:span text:style-name="T18">;<text:line-break/><text:tab/></text:span><text:span text:style-name="T22">in </text:span><text:span text:style-name="T18">&gt;&gt; </text:span><text:span text:style-name="T22">p</text:span><text:span text:style-name="T18">.</text:span><text:span text:style-name="T25">second</text:span><text:span text:style-name="T18">;<text:line-break/><text:tab/></text:span><text:span text:style-name="T20">return </text:span><text:span text:style-name="T22">in</text:span><text:span text:style-name="T18">;<text:line-break/>}<text:line-break/>ostream&amp; </text:span><text:span text:style-name="T20">operator</text:span><text:span text:style-name="T18">&lt;&lt; (ostream&amp; </text:span><text:span text:style-name="T22">out</text:span><text:span text:style-name="T18">, </text:span><text:span text:style-name="T20">const </text:span><text:span text:style-name="T22">Pair</text:span><text:span text:style-name="T18">&amp; </text:span><text:span text:style-name="T22">p</text:span><text:span text:style-name="T18">) {<text:line-break/></text:span><text:soft-page-break/><text:span text:style-name="T18"><text:tab/></text:span><text:span text:style-name="T22">out </text:span><text:span text:style-name="T18">&lt;&lt; </text:span><text:span text:style-name="T22">p</text:span><text:span text:style-name="T18">.</text:span><text:span text:style-name="T25">first </text:span><text:span text:style-name="T18">&lt;&lt; </text:span><text:span text:style-name="T21">" : " </text:span><text:span text:style-name="T18">&lt;&lt; </text:span><text:span text:style-name="T22">p</text:span><text:span text:style-name="T18">.</text:span><text:span text:style-name="T25">second</text:span><text:span text:style-name="T18">;<text:line-break/><text:tab/></text:span><text:span text:style-name="T20">return </text:span><text:span text:style-name="T22">out</text:span><text:span text:style-name="T18">;<text:line-break/>}</text:span></text:p>
      <text:p text:style-name="P21" loext:marker-style-name="T28"/>
      <text:p text:style-name="P18">main.cpp:</text:p>
      <text:p text:style-name="P19" loext:marker-style-name="T18"><text:span text:style-name="T19">#include </text:span><text:span text:style-name="T21">"Pair.h"<text:line-break/></text:span><text:span text:style-name="T19">#include </text:span><text:span text:style-name="T21">&lt;iostream&gt;<text:line-break/></text:span><text:span text:style-name="T20">using namespace </text:span><text:span text:style-name="T22">std</text:span><text:span text:style-name="T18">;<text:line-break/><text:line-break/></text:span><text:span text:style-name="T20">int </text:span><text:span text:style-name="T26">main</text:span><text:span text:style-name="T18">()<text:line-break/>{<text:line-break/> <text:s text:c="3"/></text:span><text:span text:style-name="T22">Pair a</text:span><text:span text:style-name="T18">; </text:span><text:span text:style-name="T23">//three default objects<text:line-break/> <text:s text:c="3"/></text:span><text:span text:style-name="T22">Pair b</text:span><text:span text:style-name="T18">;<text:line-break/> <text:s text:c="3"/></text:span><text:span text:style-name="T22">Pair c</text:span><text:span text:style-name="T18">;<text:line-break/> <text:s text:c="3"/>cin </text:span><text:span text:style-name="T26">&gt;&gt; </text:span><text:span text:style-name="T22">a</text:span><text:span text:style-name="T18">; </text:span><text:span text:style-name="T23">//input of two objects from console<text:line-break/> <text:s text:c="3"/></text:span><text:span text:style-name="T18">cin </text:span><text:span text:style-name="T26">&gt;&gt; </text:span><text:span text:style-name="T22">b</text:span><text:span text:style-name="T18">;<text:line-break/> <text:s text:c="3"/></text:span><text:span text:style-name="T22">a </text:span><text:span text:style-name="T26">= </text:span><text:span text:style-name="T22">a </text:span><text:span text:style-name="T26">+ </text:span><text:span text:style-name="T27">5</text:span><text:span text:style-name="T18">; </text:span><text:span text:style-name="T23">//modification of objects<text:line-break/><text:tab/></text:span><text:span text:style-name="T22">b </text:span><text:span text:style-name="T26">= </text:span><text:span text:style-name="T22">b </text:span><text:span text:style-name="T26">+ </text:span><text:span text:style-name="T27">2.5</text:span><text:span text:style-name="T18">;<text:line-break/> <text:s text:c="3"/></text:span><text:span text:style-name="T22">c </text:span><text:span text:style-name="T26">= </text:span><text:span text:style-name="T22">a </text:span><text:span text:style-name="T26">- </text:span><text:span text:style-name="T22">b</text:span><text:span text:style-name="T18">; </text:span><text:span text:style-name="T23">//subtraction of objects, then assignment<text:line-break/> <text:s text:c="3"/></text:span><text:span text:style-name="T18">cout &lt;&lt; </text:span><text:span text:style-name="T21">"a: " </text:span><text:span text:style-name="T26">&lt;&lt; </text:span><text:span text:style-name="T22">a </text:span><text:span text:style-name="T18">&lt;&lt; endl; </text:span><text:span text:style-name="T23">//testing output<text:line-break/> <text:s text:c="3"/></text:span><text:span text:style-name="T18">cout &lt;&lt; </text:span><text:span text:style-name="T21">"b: " </text:span><text:span text:style-name="T26">&lt;&lt; </text:span><text:span text:style-name="T22">b </text:span><text:span text:style-name="T18">&lt;&lt; endl;<text:line-break/><text:tab/>cout &lt;&lt; </text:span><text:span text:style-name="T21">"c: " </text:span><text:span text:style-name="T26">&lt;&lt; </text:span><text:span text:style-name="T22">c </text:span><text:span text:style-name="T18">&lt;&lt; endl;<text:line-break/>}</text:span></text:p>
      <text:p text:style-name="P22" loext:marker-style-name="T28"/>
      <text:p text:style-name="P23" loext:marker-style-name="T1">Решение</text:p>
      <text:p text:style-name="P24" loext:marker-style-name="T1"><draw:frame draw:style-name="fr2" draw:name="Изображение4" text:anchor-type="as-char" svg:width="3.689in" svg:height="2.9457in" draw:z-index="1"><draw:image xlink:href="Pictures/10000001000000FB000000A1C30E48CA.png" xlink:type="simple" xlink:show="embed" xlink:actuate="onLoad" draw:mime-type="image/png"/></draw:frame></text:p>
      <text:p text:style-name="P25" loext:marker-style-name="T1">Контрольные вопросы</text:p>
      <text:p text:style-name="P26">1. Для чего используются дружественные функции и классы? — <text:span text:style-name="T15">для того чтобы внешние функции и классы могли взаимодействовать с полями данного напрямую</text:span></text:p>
      <text:p text:style-name="P26">2. Сформулировать правила описания и особенности дружественных функций. — <text:span text:style-name="T15">ключевое слово </text:span><text:span text:style-name="T14">friend, </text:span><text:span text:style-name="T15">описание вне самого класса, не получает </text:span><text:span text:style-name="T14">this, </text:span><text:span text:style-name="T15">может быть объявлена где угодно внутри класса (не имеет модификаторов доступа), одна функция может быть другом нескольких классов</text:span></text:p>
      <text:p text:style-name="P26">3. Каким образом можно перегрузить унарные операции? — <text:span text:style-name="T29">как функцию-член класса (принимает</text:span><text:span text:style-name="T30"> this) </text:span><text:span text:style-name="T29">или как глобальную </text:span><text:span text:style-name="T30">(</text:span><text:span text:style-name="T29">принимает ссылку на объект или его значение), перегружаются при помощи ключ</text:span><text:span text:style-name="T31">евого</text:span><text:span text:style-name="T29"> </text:span><text:span text:style-name="T31">с</text:span><text:span text:style-name="T29">лова </text:span><text:span text:style-name="T30">operator</text:span></text:p>
      <text:p text:style-name="P26">4. Сколько операндов должна иметь унарная функция-операция, определяемая внутри класса? - <text:span text:style-name="T31">0</text:span></text:p>
      <text:p text:style-name="P26">. Сколько операндов должна иметь унарная функция-операция, определяемая вне класса? - <text:span text:style-name="T31">1</text:span></text:p>
      <text:p text:style-name="P26">6. Сколько операндов должна иметь бинарная функция-операция, определяемая внутри класса? - <text:span text:style-name="T31">1</text:span></text:p>
      <text:p text:style-name="P26">7. Сколько операндов должна иметь бинарная функция-операция, определяемая вне класса? - <text:span text:style-name="T31">2</text:span></text:p>
      <text:p text:style-name="P26">8. Чем отличается перегрузка префиксных и постфиксных унарных операций? — <text:span text:style-name="T31">постфиксная возвращает объект по ссылке, префиксная — копию, притом меняется значение операнда, а в операции участвует старое значение</text:span></text:p>
      <text:p text:style-name="P26">9. Каким образом можно перегрузить операцию присваивания? — <text:span text:style-name="T32">class_name&amp; operator=(const class_name&amp; other), </text:span><text:span text:style-name="T31">перегрузкой оператора «=»</text:span></text:p>
      <text:p text:style-name="P26">10. Что должна возвращать операция присваивания? — <text:span text:style-name="T31">ссылку на объект класса</text:span></text:p>
      <text:p text:style-name="P26">11. Каким образом можно перегрузить операции ввода-вывода? — <text:span text:style-name="T31">перегрузкой операторов &lt;&lt; и &gt;&gt;</text:span></text:p>
      <text:p text:style-name="P26">12. В программе описан класс class Student {… Student&amp; operator++(); …. }; и определен объект этого класса Student s; Выполняется операция ++s; Каким образом, компилятор будет воспринимать вызов функции-операции? — <text:span text:style-name="T31">вызовет </text:span><text:span text:style-name="T32">s.operator++() </text:span><text:span text:style-name="T31">для объекта </text:span><text:span text:style-name="T32">s, </text:span><text:span text:style-name="T33">где оператор вызывается как функция-компонента</text:span></text:p>
      <text:p text:style-name="P26">13. В программе описан класс class Student {… friend Student&amp; operator ++( Student&amp;); …. }; и определен объект этого класса Student s; Выполняется операция ++s; Каким образом, компилятор будет воспринимать вызов <text:soft-page-break/>функции-операции? — <text:span text:style-name="T33">вызовет </text:span><text:span text:style-name="T34">operator++(s), </text:span><text:span text:style-name="T33">где оператор — глобальная функция</text:span></text:p>
      <text:p text:style-name="P26">14. В программе описан класс class Student {… bool operator&lt;(Student &amp;P); …. }; и определены объекты этого класса Student a,b; Выполняется операция cout&lt;&lt;a&lt;b; Каким образом, компилятор будет воспринимать вызов функции-операции? — <text:span text:style-name="T33">вызовет a.operator&lt;(b), как функцию-компоненту</text:span></text:p>
      <text:p text:style-name="P27">15. В программе описан класс class Student {… friend bool operator &gt;(const Person&amp;, Person&amp;) …. }; и определены объекты этого класса Student a,b; Выполняется операция cout&lt;&lt;a&gt;b; Каким образом, компилятор будет воспринимать вызов функции-операции? — <text:span text:style-name="T33">вызовет operator&lt;(а, b), как глобальную функцию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等线" style:font-size-asian="12pt" style:language-asian="zh" style:country-asian="CN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RU" style:letter-kerning="true" style:font-name-asian="等线" style:font-size-asian="12pt" style:language-asian="zh" style:country-asian="CN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c-lboyjj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Базовый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c-itonen" style:family="text" style:parent-style-name="Default_20_Paragraph_20_Font"/>
    <style:style style:name="katex-mathml" style:family="text" style:parent-style-name="Default_20_Paragraph_20_Font"/>
    <style:style style:name="mord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12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13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14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15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1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1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1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022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2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2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52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2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2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022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22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02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арья Альметова</meta:initial-creator>
    <meta:editing-cycles>52</meta:editing-cycles>
    <meta:creation-date>2025-12-13T14:37:00</meta:creation-date>
    <dc:date>2026-05-03T10:33:06.544572985</dc:date>
    <meta:editing-duration>PT16H51M30S</meta:editing-duration>
    <meta:generator>LibreOffice/25.8.5.2$Linux_X86_64 LibreOffice_project/580$Build-2</meta:generator>
    <meta:document-statistic meta:table-count="0" meta:image-count="2" meta:object-count="0" meta:page-count="9" meta:paragraph-count="57" meta:word-count="975" meta:character-count="7074" meta:non-whitespace-character-count="6050"/>
    <meta:user-defined meta:name="AppVersion">16.0000</meta:user-defined>
    <meta:template xlink:type="simple" xlink:actuate="onRequest" xlink:title="Normal" xlink:href=""/>
  </office:meta>
</office:document-meta>
</file>