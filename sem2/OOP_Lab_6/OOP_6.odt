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7000000E406A7D61B.png" manifest:media-type="image/png"/>
  <manifest:file-entry manifest:full-path="Pictures/1000000100000C9C00000A04C98BEC11.png" manifest:media-type="image/png"/>
  <manifest:file-entry manifest:full-path="Pictures/100000000000044000000112087B1C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000000" loext:opacity="100%" style:font-name="Times New Roman" fo:font-size="12pt" fo:language="en" fo:country="US" fo:font-style="normal" fo:font-weight="normal" officeooo:rsid="004af9d1" officeooo:paragraph-rsid="00543dac" style:font-size-asian="12pt" style:font-style-asian="normal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in" fo:text-align="justify" style:justify-single-word="false" fo:text-indent="0in" style:auto-text-indent="false"/>
      <style:text-properties fo:color="#000000" loext:opacity="100%" style:font-name="Times New Roman" fo:font-size="12pt" fo:font-style="normal" fo:font-weight="normal" officeooo:paragraph-rsid="004af9d1" style:font-size-asian="12pt" style:font-style-asian="normal" style:font-weight-asian="normal"/>
    </style:style>
    <style:style style:name="P11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2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56fa99" officeooo:paragraph-rsid="0056fa99" style:font-size-asian="14pt" style:font-name-complex="Times New Roman1" style:font-size-complex="14pt"/>
    </style:style>
    <style:style style:name="P13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5b9d52" officeooo:paragraph-rsid="005b9d52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rsid="005db378" officeooo:paragraph-rsid="005db378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8" style:family="paragraph" style:parent-style-name="Standard">
      <style:text-properties fo:color="#000000" loext:opacity="100%" style:font-name="Cascadia Mono" fo:font-size="9.5pt" fo:language="en" fo:country="US" officeooo:rsid="004f79b3" officeooo:paragraph-rsid="004f79b3" fo:background-color="#ffffff" style:font-size-asian="9.5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0" style:family="paragraph" style:parent-style-name="Standard">
      <style:text-properties fo:color="#000000" loext:opacity="100%" style:font-name="Cascadia Mono" fo:font-size="9.5pt" fo:language="en" fo:country="US" fo:font-weight="bold" officeooo:rsid="00543dac" officeooo:paragraph-rsid="00543dac" fo:background-color="#ffffff" style:font-size-asian="9.5pt" style:font-weight-asian="bold" style:font-weight-complex="bold"/>
    </style:style>
    <style:style style:name="P21" style:family="paragraph" style:parent-style-name="Standard">
      <style:text-properties fo:color="#000000" loext:opacity="100%" style:font-name="Cascadia Mono" fo:font-size="9.5pt" fo:language="en" fo:country="US" fo:font-weight="bold" officeooo:rsid="005b9d52" officeooo:paragraph-rsid="005b9d52" fo:background-color="#ffffff" style:font-size-asian="9.5pt" style:font-weight-asian="bold" style:font-weight-complex="bold"/>
    </style:style>
    <style:style style:name="P22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3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4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5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5b9d52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5315d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weight="bold" officeooo:rsid="001c65e1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8080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3" style:family="text">
      <style:text-properties fo:color="#9e880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67d17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33b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627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8" style:family="text">
      <style:text-properties fo:color="#8c8c8c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19" style:family="text">
      <style:text-properties fo:color="#1750e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37a6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1" style:family="text">
      <style:text-properties fo:color="#80808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2" style:family="text">
      <style:text-properties fo:color="#87109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23" style:family="text">
      <style:text-properties fo:font-variant="normal" fo:text-transform="none" fo:color="#222222" loext:opacity="100%" fo:font-family="'times new roman', serif" fo:letter-spacing="normal" fo:font-style="normal" fo:font-weight="normal" officeooo:rsid="0058d4cf"/>
    </style:style>
    <style:style style:name="T24" style:family="text">
      <style:text-properties fo:font-variant="normal" fo:text-transform="none" fo:color="#222222" loext:opacity="100%" fo:font-family="'times new roman', serif" fo:letter-spacing="normal" fo:font-style="normal" fo:font-weight="normal" officeooo:rsid="005d13f7"/>
    </style:style>
    <style:style style:name="T25" style:family="text">
      <style:text-properties fo:font-variant="normal" fo:text-transform="none" fo:color="#222222" loext:opacity="100%" fo:font-family="'times new roman', serif" fo:letter-spacing="normal" fo:font-style="normal" fo:font-weight="normal" officeooo:rsid="005b9d52"/>
    </style:style>
    <style:style style:name="T26" style:family="text">
      <style:text-properties fo:font-variant="normal" fo:text-transform="none" fo:color="#222222" loext:opacity="100%" fo:font-family="'times new roman', serif" fo:letter-spacing="normal" fo:font-style="normal" fo:font-weight="bold" officeooo:rsid="005b9d5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АТД. Контейнеры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list text:style-name="L1">
        <text:list-item>
          <text:p text:style-name="P9">Определить класс-контейнер.</text:p>
        </text:list-item>
        <text:list-item>
          <text:p text:style-name="P9">Реализовать конструкторы, деструктор, операции ввода-вывода, операцию присваивания.</text:p>
        </text:list-item>
        <text:list-item>
          <text:p text:style-name="P9">Перегрузить операции, указанные в варианте.</text:p>
        </text:list-item>
        <text:list-item>
          <text:p text:style-name="P9">Реализовать класс-итератор. Реализовать с его помощью операции последовательного доступа.</text:p>
        </text:list-item>
        <text:list-item>
          <text:p text:style-name="P9">Написать тестирующую программу, иллюстрирующую выполнение операций.</text:p>
        </text:list-item>
      </text:list>
      <text:p text:style-name="P10"/>
      <text:p text:style-name="P10"><draw:frame draw:style-name="fr1" draw:name="Image1" text:anchor-type="char" svg:width="6.4965in" svg:height="1.848in" draw:z-index="2"><draw:image xlink:href="Pictures/100000000000044000000112087B1C65.png" xlink:type="simple" xlink:show="embed" xlink:actuate="onLoad" draw:mime-type="image/png"/></draw:frame></text:p>
      <text:p text:style-name="P11" loext:marker-style-name="T9"><text:span text:style-name="T1">Анализ задачи</text:span><text:span text:style-name="T9">:</text:span></text:p>
      <text:list text:style-name="WWNum25">
        <text:list-item>
          <text:p text:style-name="P12">Реализум класс Список, содержащий Узлы. Как список, так и его узлы — шаблоны классов. Методы списка описываем в том же файле: конструкторы, деструктор, оператор присвоения, оператор получения значения по индексу, оператор умножения списка на список (определено вариантом), оператор получения размера, а также дружественные операторы ввода-вывода iostream</text:p>
        </text:list-item>
        <text:list-item>
          <text:p text:style-name="P13">Определим также для Списка дружественный класс Итератор, содержащий указатели на элементы-узлы и умеющий итерироваться по ним вперед и назад, также получать указатели на начало и конец списка</text:p>
        </text:list-item>
        <text:list-item>
          <text:p text:style-name="P12">В главной функции проверяем работу Списка как контейнера для объектов класса Пара</text:p>
        </text:list-item>
      </text:list>
      <text:p text:style-name="P14">UML</text:p>
      <text:p text:style-name="P15" loext:marker-style-name="T1"><draw:frame draw:style-name="fr2" draw:name="Изображение1" text:anchor-type="as-char" svg:y="-2.5866in" svg:width="5.7339in" svg:height="5.3992in" draw:z-index="0"><draw:image xlink:href="Pictures/1000000100000C9C00000A04C98BEC11.png" xlink:type="simple" xlink:show="embed" xlink:actuate="onLoad" draw:mime-type="image/png"/></draw:frame></text:p>
      <text:p text:style-name="P16" loext:marker-style-name="T1">Node содержится в List, не имеет смысла существование Node вне List</text:p>
      <text:p text:style-name="P16" loext:marker-style-name="T1">Iterator итерируется по List и указывает на Node, способен на автономное существование и не модифицирует оригинал</text:p>
      <text:p text:style-name="P17" loext:marker-style-name="T1"><text:span text:style-name="T10">К</text:span><text:span text:style-name="T11">од</text:span></text:p>
      <text:p text:style-name="P18">main.cpp</text:p>
      <text:p text:style-name="P19" loext:marker-style-name="T12"><text:span text:style-name="T13">#include </text:span><text:span text:style-name="T14">&lt;iostream&gt;<text:line-break/></text:span><text:span text:style-name="T13">#include </text:span><text:span text:style-name="T14">"List.h"<text:line-break/><text:line-break/></text:span><text:span text:style-name="T15">using namespace </text:span><text:span text:style-name="T16">std</text:span><text:span text:style-name="T12">;<text:line-break/><text:line-break/></text:span><text:span text:style-name="T15">int </text:span><text:span text:style-name="T17">main</text:span><text:span text:style-name="T12">()<text:line-break/>{ <text:s text:c="2"/><text:line-break/> <text:s text:c="3"/></text:span><text:span text:style-name="T18">//initializing a list of 5 elements (zeroes by default)<text:line-break/> <text:s text:c="3"/></text:span><text:span text:style-name="T16">List a</text:span><text:span text:style-name="T17">(</text:span><text:span text:style-name="T19">5</text:span><text:span text:style-name="T17">)</text:span><text:span text:style-name="T12">;<text:line-break/> <text:s text:c="3"/></text:span><text:span text:style-name="T16">cout </text:span><text:span text:style-name="T17">&lt;&lt; </text:span><text:span text:style-name="T16">a </text:span><text:span text:style-name="T17">&lt;&lt; </text:span><text:span text:style-name="T14">"</text:span><text:span text:style-name="T20">\n</text:span><text:span text:style-name="T14">"</text:span><text:span text:style-name="T12">;<text:line-break/> <text:s text:c="3"/></text:span><text:span text:style-name="T16">cin </text:span><text:span text:style-name="T17">&gt;&gt; </text:span><text:span text:style-name="T16">a</text:span><text:span text:style-name="T12">; </text:span><text:span text:style-name="T18">//filling from console<text:line-break/> <text:s text:c="3"/></text:span><text:span text:style-name="T16">cout </text:span><text:span text:style-name="T17">&lt;&lt; </text:span><text:span text:style-name="T16">a </text:span><text:span text:style-name="T17">&lt;&lt; </text:span><text:span text:style-name="T14">"</text:span><text:span text:style-name="T20">\n</text:span><text:span text:style-name="T14">"</text:span><text:span text:style-name="T12">;<text:line-break/> <text:s text:c="3"/></text:span><text:span text:style-name="T16">a</text:span><text:span text:style-name="T17">[</text:span><text:span text:style-name="T19">2</text:span><text:span text:style-name="T17">] </text:span><text:span text:style-name="T12">= </text:span><text:span text:style-name="T19">40</text:span><text:span text:style-name="T12">; </text:span><text:span text:style-name="T18">//accessing and assigning an element by index<text:line-break/> <text:s text:c="3"/></text:span><text:span text:style-name="T16">cout </text:span><text:span text:style-name="T17">&lt;&lt; </text:span><text:span text:style-name="T16">a </text:span><text:span text:style-name="T17">&lt;&lt; </text:span><text:span text:style-name="T14">"</text:span><text:span text:style-name="T20">\n</text:span><text:span text:style-name="T14">"</text:span><text:span text:style-name="T12">;<text:line-break/> <text:s text:c="3"/></text:span><text:span text:style-name="T16">List b</text:span><text:span text:style-name="T17">(</text:span><text:span text:style-name="T19">10</text:span><text:span text:style-name="T17">)</text:span><text:span text:style-name="T12">; </text:span><text:span text:style-name="T18">//a new list of zeroes<text:line-break/> <text:s text:c="3"/></text:span><text:span text:style-name="T16">b </text:span><text:span text:style-name="T17">= </text:span><text:span text:style-name="T16">a</text:span><text:span text:style-name="T12">; </text:span><text:span text:style-name="T18">//copied from a<text:line-break/> <text:s text:c="3"/></text:span><text:span text:style-name="T16">cout </text:span><text:span text:style-name="T17">&lt;&lt; </text:span><text:span text:style-name="T16">b </text:span><text:span text:style-name="T17">&lt;&lt; </text:span><text:span text:style-name="T14">"</text:span><text:span text:style-name="T20">\n</text:span><text:span text:style-name="T14">"</text:span><text:span text:style-name="T12">;<text:line-break/> <text:s text:c="3"/></text:span><text:span text:style-name="T16">List c</text:span><text:span text:style-name="T17">(</text:span><text:span text:style-name="T19">10</text:span><text:span text:style-name="T17">)</text:span><text:span text:style-name="T12">; </text:span><text:span text:style-name="T18">//a new list of zeroes<text:line-break/> <text:s text:c="3"/></text:span><text:span text:style-name="T16">c </text:span><text:span text:style-name="T17">= </text:span><text:span text:style-name="T16">b </text:span><text:span text:style-name="T17">* </text:span><text:span text:style-name="T16">b</text:span><text:span text:style-name="T12">; </text:span><text:span text:style-name="T18">//equal to elements of b squared<text:line-break/> <text:s text:c="3"/></text:span><text:span text:style-name="T16">cout </text:span><text:span text:style-name="T17">&lt;&lt; </text:span><text:span text:style-name="T16">c </text:span><text:span text:style-name="T17">&lt;&lt; </text:span><text:span text:style-name="T14">"</text:span><text:span text:style-name="T20">\n</text:span><text:span text:style-name="T14">"</text:span><text:span text:style-name="T12">;<text:line-break/> <text:s text:c="3"/></text:span><text:span text:style-name="T16">cout </text:span><text:span text:style-name="T17">&lt;&lt; </text:span><text:span text:style-name="T14">"Size of c: " </text:span><text:span text:style-name="T17">&lt;&lt; </text:span><text:span text:style-name="T16">c</text:span><text:span text:style-name="T12">() </text:span><text:span text:style-name="T17">&lt;&lt; endl</text:span><text:span text:style-name="T12">; </text:span><text:span text:style-name="T18">//size getting test<text:line-break/> <text:s text:c="3"/><text:line-break/> <text:s text:c="3"/></text:span><text:span text:style-name="T16">cout </text:span><text:span text:style-name="T17">&lt;&lt; *</text:span><text:span text:style-name="T21">(</text:span><text:span text:style-name="T16">a</text:span><text:span text:style-name="T12">.</text:span><text:span text:style-name="T17">first</text:span><text:span text:style-name="T12">()</text:span><text:span text:style-name="T21">) </text:span><text:span text:style-name="T17">&lt;&lt; endl</text:span><text:span text:style-name="T12">; </text:span><text:span text:style-name="T18">//iterator test<text:line-break/><text:line-break/> <text:s text:c="3"/>//iteration through all list's elements<text:line-break/> <text:s text:c="3"/></text:span><text:span text:style-name="T16">Iterator i </text:span><text:span text:style-name="T17">= </text:span><text:span text:style-name="T16">a</text:span><text:span text:style-name="T12">.</text:span><text:span text:style-name="T17">first</text:span><text:span text:style-name="T12">();<text:line-break/> <text:s text:c="7"/></text:span><text:span text:style-name="T16">cout </text:span><text:span text:style-name="T17">&lt;&lt; *</text:span><text:span text:style-name="T16">i </text:span><text:span text:style-name="T17">&lt;&lt; endl</text:span><text:span text:style-name="T12">;<text:line-break/> <text:s text:c="3"/></text:span><text:span text:style-name="T15">for </text:span><text:span text:style-name="T12">(</text:span><text:span text:style-name="T16">i </text:span><text:span text:style-name="T17">= </text:span><text:span text:style-name="T16">a</text:span><text:span text:style-name="T12">.</text:span><text:span text:style-name="T17">first</text:span><text:span text:style-name="T12">(); </text:span><text:span text:style-name="T16">i </text:span><text:span text:style-name="T17">!= </text:span><text:span text:style-name="T16">a</text:span><text:span text:style-name="T12">.</text:span><text:span text:style-name="T17">last</text:span><text:span text:style-name="T12">(); </text:span><text:span text:style-name="T17">++</text:span><text:span text:style-name="T16">i</text:span><text:span text:style-name="T12">) </text:span><text:span text:style-name="T16">cout </text:span><text:span text:style-name="T17">&lt;&lt; *</text:span><text:span text:style-name="T16">i </text:span><text:span text:style-name="T17">&lt;&lt; </text:span><text:span text:style-name="T14">" "</text:span><text:span text:style-name="T12">;<text:line-break/><text:line-break/> <text:s text:c="3"/></text:span><text:span text:style-name="T15">return </text:span><text:span text:style-name="T19">0</text:span><text:span text:style-name="T12">;<text:line-break/>}</text:span></text:p>
      <text:p text:style-name="P20">List.h</text:p>
      <text:p text:style-name="P19" loext:marker-style-name="T12"><text:span text:style-name="T13">#pragma </text:span><text:span text:style-name="T15">once<text:line-break/></text:span><text:span text:style-name="T13">#include </text:span><text:span text:style-name="T14">&lt;iostream&gt;<text:line-break/><text:line-break/></text:span><text:span text:style-name="T15">struct </text:span><text:span text:style-name="T16">Node </text:span><text:span text:style-name="T12">{ </text:span><text:span text:style-name="T18">//A node of the list structure<text:line-break/></text:span><text:soft-page-break/><text:span text:style-name="T18"><text:tab/></text:span><text:span text:style-name="T15">int </text:span><text:span text:style-name="T22">data</text:span><text:span text:style-name="T12">; </text:span><text:span text:style-name="T18">//data storage<text:line-break/><text:tab/></text:span><text:span text:style-name="T16">Node</text:span><text:span text:style-name="T12">* </text:span><text:span text:style-name="T22">next</text:span><text:span text:style-name="T12">; </text:span><text:span text:style-name="T18">//pointers<text:line-break/><text:tab/></text:span><text:span text:style-name="T16">Node</text:span><text:span text:style-name="T12">* </text:span><text:span text:style-name="T22">prev</text:span><text:span text:style-name="T12">;<text:line-break/><text:line-break/><text:tab/></text:span><text:span text:style-name="T18">//utility constructors<text:line-break/><text:tab/></text:span><text:span text:style-name="T17">Node</text:span><text:span text:style-name="T12">(</text:span><text:span text:style-name="T15">int </text:span><text:span text:style-name="T16">i</text:span><text:span text:style-name="T12">) : </text:span><text:span text:style-name="T22">data</text:span><text:span text:style-name="T12">(</text:span><text:span text:style-name="T16">i</text:span><text:span text:style-name="T12">), </text:span><text:span text:style-name="T22">next</text:span><text:span text:style-name="T12">(</text:span><text:span text:style-name="T15">nullptr</text:span><text:span text:style-name="T12">), </text:span><text:span text:style-name="T22">prev</text:span><text:span text:style-name="T12">(</text:span><text:span text:style-name="T15">nullptr</text:span><text:span text:style-name="T12">) {}<text:line-break/><text:tab/></text:span><text:span text:style-name="T17">Node</text:span><text:span text:style-name="T12">() : </text:span><text:span text:style-name="T22">data</text:span><text:span text:style-name="T12">(</text:span><text:span text:style-name="T19">0</text:span><text:span text:style-name="T12">), </text:span><text:span text:style-name="T22">next</text:span><text:span text:style-name="T12">(</text:span><text:span text:style-name="T15">nullptr</text:span><text:span text:style-name="T12">), </text:span><text:span text:style-name="T22">prev</text:span><text:span text:style-name="T12">(</text:span><text:span text:style-name="T15">nullptr</text:span><text:span text:style-name="T12">) {}<text:line-break/><text:tab/></text:span><text:span text:style-name="T17">Node</text:span><text:span text:style-name="T12">(</text:span><text:span text:style-name="T15">int </text:span><text:span text:style-name="T16">i</text:span><text:span text:style-name="T12">, </text:span><text:span text:style-name="T16">Node</text:span><text:span text:style-name="T12">* </text:span><text:span text:style-name="T16">first</text:span><text:span text:style-name="T12">, </text:span><text:span text:style-name="T16">Node</text:span><text:span text:style-name="T12">* </text:span><text:span text:style-name="T16">second</text:span><text:span text:style-name="T12">) : </text:span><text:span text:style-name="T22">data</text:span><text:span text:style-name="T12">(</text:span><text:span text:style-name="T16">i</text:span><text:span text:style-name="T12">), </text:span><text:span text:style-name="T22">next</text:span><text:span text:style-name="T12">(</text:span><text:span text:style-name="T16">first</text:span><text:span text:style-name="T12">), </text:span><text:span text:style-name="T22">prev</text:span><text:span text:style-name="T12">(</text:span><text:span text:style-name="T16">second</text:span><text:span text:style-name="T12">) {}<text:line-break/><text:tab/></text:span><text:span text:style-name="T18">//stylized output<text:line-break/><text:tab/></text:span><text:span text:style-name="T15">friend 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Node</text:span><text:span text:style-name="T12">&amp; </text:span><text:span text:style-name="T16">l</text:span><text:span text:style-name="T12">);<text:line-break/>};<text:line-break/><text:line-break/></text:span><text:span text:style-name="T15">class </text:span><text:span text:style-name="T16">Iterator </text:span><text:span text:style-name="T12">{ </text:span><text:span text:style-name="T18">//An Iterator to itareate over a List<text:line-break/><text:tab/></text:span><text:span text:style-name="T15">friend class </text:span><text:span text:style-name="T16">List</text:span><text:span text:style-name="T12">;<text:line-break/></text:span><text:span text:style-name="T21">private:<text:line-break/><text:tab/></text:span><text:span text:style-name="T16">Node</text:span><text:span text:style-name="T12">* </text:span><text:span text:style-name="T22">elem</text:span><text:span text:style-name="T12">; </text:span><text:span text:style-name="T18">//Pointer to the current element<text:line-break/></text:span><text:span text:style-name="T15">public</text:span><text:span text:style-name="T12">:<text:line-break/><text:tab/></text:span><text:span text:style-name="T18">//basic constructors<text:line-break/><text:tab/></text:span><text:span text:style-name="T17">Iterator</text:span><text:span text:style-name="T12">() { </text:span><text:span text:style-name="T22">elem </text:span><text:span text:style-name="T12">= </text:span><text:span text:style-name="T15">nullptr</text:span><text:span text:style-name="T12">; }<text:line-break/><text:tab/></text:span><text:span text:style-name="T17">Iterator</text:span><text:span text:style-name="T12">(</text:span><text:span text:style-name="T15">const </text:span><text:span text:style-name="T16">Iterator</text:span><text:span text:style-name="T12">&amp; </text:span><text:span text:style-name="T16">other</text:span><text:span text:style-name="T12">) { </text:span><text:span text:style-name="T22">elem </text:span><text:span text:style-name="T12">= </text:span><text:span text:style-name="T16">other</text:span><text:span text:style-name="T12">.</text:span><text:span text:style-name="T22">elem</text:span><text:span text:style-name="T12">; }<text:line-break/><text:tab/></text:span><text:span text:style-name="T18">//basic operations of list traversing<text:line-break/><text:tab/></text:span><text:span text:style-name="T15">bool operator</text:span><text:span text:style-name="T12">==(</text:span><text:span text:style-name="T15">const </text:span><text:span text:style-name="T16">Iterator</text:span><text:span text:style-name="T12">&amp; </text:span><text:span text:style-name="T16">other</text:span><text:span text:style-name="T12">) { </text:span><text:span text:style-name="T15">return </text:span><text:span text:style-name="T22">elem </text:span><text:span text:style-name="T12">== </text:span><text:span text:style-name="T16">other</text:span><text:span text:style-name="T12">.</text:span><text:span text:style-name="T22">elem</text:span><text:span text:style-name="T12">; }<text:line-break/><text:tab/></text:span><text:span text:style-name="T15">bool operator</text:span><text:span text:style-name="T12">!=(</text:span><text:span text:style-name="T15">const </text:span><text:span text:style-name="T16">Iterator</text:span><text:span text:style-name="T12">&amp; </text:span><text:span text:style-name="T16">other</text:span><text:span text:style-name="T12">) { </text:span><text:span text:style-name="T15">return </text:span><text:span text:style-name="T22">elem </text:span><text:span text:style-name="T12">!= </text:span><text:span text:style-name="T16">other</text:span><text:span text:style-name="T12">.</text:span><text:span text:style-name="T22">elem</text:span><text:span text:style-name="T12">; }<text:line-break/><text:tab/></text:span><text:span text:style-name="T15">void operator</text:span><text:span text:style-name="T12">++() { </text:span><text:span text:style-name="T22">elem </text:span><text:span text:style-name="T12">= </text:span><text:span text:style-name="T22">elem</text:span><text:span text:style-name="T12">-&gt;</text:span><text:span text:style-name="T22">next</text:span><text:span text:style-name="T12">; }<text:line-break/><text:tab/></text:span><text:span text:style-name="T15">void operator</text:span><text:span text:style-name="T12">--() { </text:span><text:span text:style-name="T22">elem </text:span><text:span text:style-name="T12">= </text:span><text:span text:style-name="T22">elem</text:span><text:span text:style-name="T12">-&gt;</text:span><text:span text:style-name="T22">prev</text:span><text:span text:style-name="T12">; }<text:line-break/><text:tab/></text:span><text:span text:style-name="T15">void operator</text:span><text:span text:style-name="T12">+(</text:span><text:span text:style-name="T15">int </text:span><text:span text:style-name="T16">n</text:span><text:span text:style-name="T12">) { 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16">n</text:span><text:span text:style-name="T12">; </text:span><text:span text:style-name="T16">i</text:span><text:span text:style-name="T12">++) </text:span><text:span text:style-name="T22">elem </text:span><text:span text:style-name="T12">= </text:span><text:span text:style-name="T22">elem</text:span><text:span text:style-name="T12">-&gt;</text:span><text:span text:style-name="T22">next</text:span><text:span text:style-name="T12">; }<text:line-break/><text:tab/></text:span><text:span text:style-name="T15">void operator</text:span><text:span text:style-name="T12">-(</text:span><text:span text:style-name="T15">int </text:span><text:span text:style-name="T16">n</text:span><text:span text:style-name="T12">) { 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16">n</text:span><text:span text:style-name="T12">; </text:span><text:span text:style-name="T16">i</text:span><text:span text:style-name="T12">++) </text:span><text:span text:style-name="T22">elem </text:span><text:span text:style-name="T12">= </text:span><text:span text:style-name="T22">elem</text:span><text:span text:style-name="T12">-&gt;</text:span><text:span text:style-name="T22">prev</text:span><text:span text:style-name="T12">; }<text:line-break/><text:tab/></text:span><text:span text:style-name="T18">//An operator to get the value stored in the element iterator points to<text:line-break/><text:tab/></text:span><text:span text:style-name="T16">Node</text:span><text:span text:style-name="T12">&amp; </text:span><text:span text:style-name="T15">operator </text:span><text:span text:style-name="T12">*() </text:span><text:span text:style-name="T15">const </text:span><text:span text:style-name="T12">{ </text:span><text:span text:style-name="T15">return </text:span><text:span text:style-name="T12">*</text:span><text:span text:style-name="T22">elem</text:span><text:span text:style-name="T12">; }<text:line-break/>};<text:line-break/><text:line-break/></text:span><text:span text:style-name="T15">class </text:span><text:span text:style-name="T16">List </text:span><text:span text:style-name="T12">{<text:line-break/></text:span><text:soft-page-break/><text:span text:style-name="T21">private: </text:span><text:span text:style-name="T18">//attributes of the list<text:line-break/><text:tab/></text:span><text:span text:style-name="T15">int </text:span><text:span text:style-name="T22">size</text:span><text:span text:style-name="T12">; </text:span><text:span text:style-name="T18">//size indicator<text:line-break/><text:tab/></text:span><text:span text:style-name="T16">Node</text:span><text:span text:style-name="T12">* </text:span><text:span text:style-name="T22">head</text:span><text:span text:style-name="T12">; </text:span><text:span text:style-name="T18">//first element of the list<text:line-break/><text:tab/></text:span><text:span text:style-name="T16">Node</text:span><text:span text:style-name="T12">* </text:span><text:span text:style-name="T22">tail</text:span><text:span text:style-name="T12">; </text:span><text:span text:style-name="T18">//last element of the list<text:line-break/><text:tab/></text:span><text:span text:style-name="T16">Iterator </text:span><text:span text:style-name="T22">beg</text:span><text:span text:style-name="T12">; </text:span><text:span text:style-name="T18">//beginning iterator<text:line-break/><text:tab/></text:span><text:span text:style-name="T16">Iterator </text:span><text:span text:style-name="T22">end</text:span><text:span text:style-name="T12">; </text:span><text:span text:style-name="T18">//ending iterator<text:line-break/></text:span><text:span text:style-name="T15">public</text:span><text:span text:style-name="T12">:<text:line-break/><text:tab/></text:span><text:span text:style-name="T18">//basic constructor/destructor set<text:line-break/><text:tab/></text:span><text:span text:style-name="T17">List</text:span><text:span text:style-name="T12">(</text:span><text:span text:style-name="T15">int </text:span><text:span text:style-name="T16">s</text:span><text:span text:style-name="T12">, </text:span><text:span text:style-name="T15">int </text:span><text:span text:style-name="T16">k </text:span><text:span text:style-name="T12">= </text:span><text:span text:style-name="T19">0</text:span><text:span text:style-name="T12">);<text:line-break/><text:tab/></text:span><text:span text:style-name="T17">List</text:span><text:span text:style-name="T12">(</text:span><text:span text:style-name="T15">const </text:span><text:span text:style-name="T16">List</text:span><text:span text:style-name="T12">&amp; </text:span><text:span text:style-name="T16">l</text:span><text:span text:style-name="T12">);<text:line-break/><text:tab/></text:span><text:span text:style-name="T17">List</text:span><text:span text:style-name="T12">();<text:line-break/><text:tab/></text:span><text:span text:style-name="T17">~List</text:span><text:span text:style-name="T12">();<text:line-break/><text:line-break/><text:tab/></text:span><text:span text:style-name="T18">//list assignment<text:line-break/><text:tab/></text:span><text:span text:style-name="T16">List</text:span><text:span text:style-name="T12">&amp; </text:span><text:span text:style-name="T15">operator</text:span><text:span text:style-name="T12">=(</text:span><text:span text:style-name="T15">const </text:span><text:span text:style-name="T16">List</text:span><text:span text:style-name="T12">&amp; </text:span><text:span text:style-name="T16">l</text:span><text:span text:style-name="T12">);<text:line-break/><text:tab/></text:span><text:span text:style-name="T18">//access through index<text:line-break/><text:tab/></text:span><text:span text:style-name="T15">int</text:span><text:span text:style-name="T12">&amp; </text:span><text:span text:style-name="T15">operator</text:span><text:span text:style-name="T12">[](</text:span><text:span text:style-name="T15">int </text:span><text:span text:style-name="T16">index</text:span><text:span text:style-name="T12">);<text:line-break/><text:tab/></text:span><text:span text:style-name="T18">//multyplying one list by another<text:line-break/><text:tab/></text:span><text:span text:style-name="T16">List </text:span><text:span text:style-name="T15">operator</text:span><text:span text:style-name="T12">*(</text:span><text:span text:style-name="T15">const </text:span><text:span text:style-name="T16">List</text:span><text:span text:style-name="T12">&amp; </text:span><text:span text:style-name="T16">l</text:span><text:span text:style-name="T12">);<text:line-break/><text:tab/></text:span><text:span text:style-name="T18">//a method to get size of the list<text:line-break/><text:tab/></text:span><text:span text:style-name="T15">int operator</text:span><text:span text:style-name="T12">() ();<text:line-break/><text:line-break/><text:tab/></text:span><text:span text:style-name="T18">//accessing iteraators pointing at list ends<text:line-break/><text:tab/></text:span><text:span text:style-name="T16">Iterator </text:span><text:span text:style-name="T17">first</text:span><text:span text:style-name="T12">() { </text:span><text:span text:style-name="T15">return </text:span><text:span text:style-name="T22">beg</text:span><text:span text:style-name="T12">; }<text:line-break/><text:tab/></text:span><text:span text:style-name="T16">Iterator </text:span><text:span text:style-name="T17">last</text:span><text:span text:style-name="T12">() { </text:span><text:span text:style-name="T15">return </text:span><text:span text:style-name="T22">end</text:span><text:span text:style-name="T12">; }<text:line-break/><text:line-break/><text:tab/></text:span><text:span text:style-name="T18">//i/o overload<text:line-break/><text:tab/></text:span><text:span text:style-name="T15">friend 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List</text:span><text:span text:style-name="T12">&amp; </text:span><text:span text:style-name="T16">l</text:span><text:span text:style-name="T12">);<text:line-break/><text:tab/></text:span><text:span text:style-name="T15">friend 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(</text:span><text:span text:style-name="T16">std</text:span><text:span text:style-name="T12">::</text:span><text:span text:style-name="T16">istream</text:span><text:span text:style-name="T12">&amp; </text:span><text:span text:style-name="T16">in</text:span><text:span text:style-name="T12">, </text:span><text:span text:style-name="T16">List</text:span><text:span text:style-name="T12">&amp; </text:span><text:span text:style-name="T16">l</text:span><text:span text:style-name="T12">);<text:line-break/>};</text:span></text:p>
      <text:p text:style-name="P21">List.cpp</text:p>
      <text:p text:style-name="P19" loext:marker-style-name="T12"><text:span text:style-name="T13">#include </text:span><text:span text:style-name="T14">&lt;iostream&gt;<text:line-break/></text:span><text:span text:style-name="T13">#include </text:span><text:span text:style-name="T14">"List.h"<text:line-break/><text:line-break/>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Node</text:span><text:span text:style-name="T12">&amp; </text:span><text:span text:style-name="T16">l</text:span><text:span text:style-name="T12">) {<text:line-break/><text:tab/></text:span><text:span text:style-name="T16">out </text:span><text:span text:style-name="T17">&lt;&lt; </text:span><text:span text:style-name="T16">l</text:span><text:span text:style-name="T12">.</text:span><text:span text:style-name="T22">data</text:span><text:span text:style-name="T12">; </text:span><text:span text:style-name="T18">//A node simply outputs its data<text:line-break/><text:tab/></text:span><text:span text:style-name="T15">return </text:span><text:span text:style-name="T16">out</text:span><text:span text:style-name="T12">;<text:line-break/>}<text:line-break/></text:span><text:soft-page-break/><text:span text:style-name="T16">List</text:span><text:span text:style-name="T12">::</text:span><text:span text:style-name="T17">List</text:span><text:span text:style-name="T12">() : </text:span><text:span text:style-name="T22">size</text:span><text:span text:style-name="T12">(</text:span><text:span text:style-name="T19">0</text:span><text:span text:style-name="T12">), </text:span><text:span text:style-name="T22">head</text:span><text:span text:style-name="T12">(</text:span><text:span text:style-name="T15">nullptr</text:span><text:span text:style-name="T12">), </text:span><text:span text:style-name="T22">tail</text:span><text:span text:style-name="T12">(</text:span><text:span text:style-name="T15">nullptr</text:span><text:span text:style-name="T12">), </text:span><text:span text:style-name="T22">beg</text:span><text:span text:style-name="T17">(</text:span><text:span text:style-name="T16">Iterator</text:span><text:span text:style-name="T17">())</text:span><text:span text:style-name="T12">, </text:span><text:span text:style-name="T22">end</text:span><text:span text:style-name="T17">(</text:span><text:span text:style-name="T16">Iterator</text:span><text:span text:style-name="T17">())</text:span><text:span text:style-name="T12">{}<text:line-break/><text:line-break/></text:span><text:span text:style-name="T16">List</text:span><text:span text:style-name="T12">::</text:span><text:span text:style-name="T17">List</text:span><text:span text:style-name="T12">(</text:span><text:span text:style-name="T15">int </text:span><text:span text:style-name="T16">s</text:span><text:span text:style-name="T12">, </text:span><text:span text:style-name="T15">int </text:span><text:span text:style-name="T16">k</text:span><text:span text:style-name="T12">) {<text:line-break/><text:tab/></text:span><text:span text:style-name="T18">//when initializing a list we must link all nodes to each other properly<text:line-break/><text:tab/></text:span><text:span text:style-name="T22">size </text:span><text:span text:style-name="T12">= </text:span><text:span text:style-name="T16">s</text:span><text:span text:style-name="T12">;<text:line-break/><text:tab/></text:span><text:span text:style-name="T18">//size check<text:line-break/><text:tab/></text:span><text:span text:style-name="T15">if </text:span><text:span text:style-name="T12">(</text:span><text:span text:style-name="T22">size </text:span><text:span text:style-name="T12">== </text:span><text:span text:style-name="T19">0</text:span><text:span text:style-name="T12">) {<text:line-break/><text:tab/><text:tab/></text:span><text:span text:style-name="T22">head </text:span><text:span text:style-name="T12">= </text:span><text:span text:style-name="T15">nullptr</text:span><text:span text:style-name="T12">;<text:line-break/><text:tab/><text:tab/></text:span><text:span text:style-name="T22">tail </text:span><text:span text:style-name="T12">= </text:span><text:span text:style-name="T15">nullptr</text:span><text:span text:style-name="T12">;<text:line-break/><text:tab/>}<text:line-break/><text:tab/></text:span><text:span text:style-name="T18">//insert nodes one by one<text:line-break/><text:tab/></text:span><text:span text:style-name="T15">else </text:span><text:span text:style-name="T12">{<text:line-break/><text:tab/><text:tab/></text:span><text:span text:style-name="T16">Node</text:span><text:span text:style-name="T12">* </text:span><text:span text:style-name="T16">newNode </text:span><text:span text:style-name="T12">= </text:span><text:span text:style-name="T15">new </text:span><text:span text:style-name="T16">Node</text:span><text:span text:style-name="T17">(</text:span><text:span text:style-name="T16">k</text:span><text:span text:style-name="T12">, </text:span><text:span text:style-name="T15">nullptr</text:span><text:span text:style-name="T12">, </text:span><text:span text:style-name="T15">nullptr</text:span><text:span text:style-name="T17">)</text:span><text:span text:style-name="T12">;<text:line-break/><text:tab/><text:tab/></text:span><text:span text:style-name="T22">head </text:span><text:span text:style-name="T12">= </text:span><text:span text:style-name="T16">newNode</text:span><text:span text:style-name="T12">;<text:line-break/><text:tab/><text:tab/></text:span><text:span text:style-name="T22">tail </text:span><text:span text:style-name="T12">= </text:span><text:span text:style-name="T16">newNode</text:span><text:span text:style-name="T12">;<text:line-break/><text:tab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1</text:span><text:span text:style-name="T12">; </text:span><text:span text:style-name="T16">i </text:span><text:span text:style-name="T12">&lt; </text:span><text:span text:style-name="T22">size</text:span><text:span text:style-name="T12">; </text:span><text:span text:style-name="T16">i</text:span><text:span text:style-name="T12">++) {<text:line-break/><text:tab/><text:tab/><text:tab/></text:span><text:span text:style-name="T16">Node</text:span><text:span text:style-name="T12">* </text:span><text:span text:style-name="T16">newNode </text:span><text:span text:style-name="T12">= </text:span><text:span text:style-name="T15">new </text:span><text:span text:style-name="T16">Node</text:span><text:span text:style-name="T17">(</text:span><text:span text:style-name="T16">k</text:span><text:span text:style-name="T12">, </text:span><text:span text:style-name="T15">nullptr</text:span><text:span text:style-name="T12">, </text:span><text:span text:style-name="T22">tail</text:span><text:span text:style-name="T17">)</text:span><text:span text:style-name="T12">;<text:line-break/><text:tab/><text:tab/><text:tab/></text:span><text:span text:style-name="T22">tail</text:span><text:span text:style-name="T12">-&gt;</text:span><text:span text:style-name="T22">next </text:span><text:span text:style-name="T12">= </text:span><text:span text:style-name="T16">newNode</text:span><text:span text:style-name="T12">;<text:line-break/><text:tab/><text:tab/><text:tab/></text:span><text:span text:style-name="T22">tail </text:span><text:span text:style-name="T12">= </text:span><text:span text:style-name="T16">newNode</text:span><text:span text:style-name="T12">;<text:line-break/><text:tab/><text:tab/>}<text:line-break/><text:tab/>}<text:line-break/><text:tab/></text:span><text:span text:style-name="T18">//assigning iterators<text:line-break/><text:tab/></text:span><text:span text:style-name="T22">beg</text:span><text:span text:style-name="T12">.</text:span><text:span text:style-name="T22">elem </text:span><text:span text:style-name="T12">= </text:span><text:span text:style-name="T22">head</text:span><text:span text:style-name="T12">;<text:line-break/><text:tab/></text:span><text:span text:style-name="T22">end</text:span><text:span text:style-name="T12">.</text:span><text:span text:style-name="T22">elem </text:span><text:span text:style-name="T12">= </text:span><text:span text:style-name="T22">tail</text:span><text:span text:style-name="T12">-&gt;</text:span><text:span text:style-name="T22">next</text:span><text:span text:style-name="T12">;<text:line-break/>}<text:line-break/></text:span><text:span text:style-name="T16">List</text:span><text:span text:style-name="T12">::</text:span><text:span text:style-name="T17">List</text:span><text:span text:style-name="T12">(</text:span><text:span text:style-name="T15">const </text:span><text:span text:style-name="T16">List</text:span><text:span text:style-name="T12">&amp; </text:span><text:span text:style-name="T16">l</text:span><text:span text:style-name="T12">) {<text:line-break/><text:tab/></text:span><text:span text:style-name="T18">//when copying list we must create copy of each node and link it into a new list<text:line-break/><text:tab/></text:span><text:span text:style-name="T16">Node</text:span><text:span text:style-name="T12">* </text:span><text:span text:style-name="T16">cur </text:span><text:span text:style-name="T12">= </text:span><text:span text:style-name="T16">l</text:span><text:span text:style-name="T12">.</text:span><text:span text:style-name="T22">head</text:span><text:span text:style-name="T12">;<text:line-break/><text:line-break/><text:tab/></text:span><text:span text:style-name="T15">while </text:span><text:span text:style-name="T12">(</text:span><text:span text:style-name="T16">cur</text:span><text:span text:style-name="T12">) {<text:line-break/><text:tab/><text:tab/></text:span><text:span text:style-name="T16">Node</text:span><text:span text:style-name="T12">* </text:span><text:span text:style-name="T16">to_add </text:span><text:span text:style-name="T12">= </text:span><text:span text:style-name="T15">new </text:span><text:span text:style-name="T16">Node</text:span><text:span text:style-name="T17">(</text:span><text:span text:style-name="T16">cur</text:span><text:span text:style-name="T12">-&gt;</text:span><text:span text:style-name="T22">data</text:span><text:span text:style-name="T17">)</text:span><text:span text:style-name="T12">;<text:line-break/><text:tab/><text:tab/></text:span><text:span text:style-name="T15">if </text:span><text:span text:style-name="T12">(!</text:span><text:span text:style-name="T22">head</text:span><text:span text:style-name="T12">) {<text:line-break/><text:tab/><text:tab/><text:tab/></text:span><text:span text:style-name="T22">head </text:span><text:span text:style-name="T12">= </text:span><text:span text:style-name="T16">to_add</text:span><text:span text:style-name="T12">;<text:line-break/><text:tab/><text:tab/><text:tab/></text:span><text:span text:style-name="T22">tail </text:span><text:span text:style-name="T12">= </text:span><text:span text:style-name="T16">to_add</text:span><text:span text:style-name="T12">;<text:line-break/><text:tab/><text:tab/>}<text:line-break/><text:tab/><text:tab/></text:span><text:span text:style-name="T15">else </text:span><text:span text:style-name="T12">{<text:line-break/></text:span><text:soft-page-break/><text:span text:style-name="T12"><text:tab/><text:tab/><text:tab/></text:span><text:span text:style-name="T22">tail</text:span><text:span text:style-name="T12">-&gt;</text:span><text:span text:style-name="T22">next </text:span><text:span text:style-name="T12">= </text:span><text:span text:style-name="T16">to_add</text:span><text:span text:style-name="T12">;<text:line-break/><text:tab/><text:tab/><text:tab/></text:span><text:span text:style-name="T22">tail</text:span><text:span text:style-name="T12">-&gt;</text:span><text:span text:style-name="T22">next</text:span><text:span text:style-name="T12">-&gt;</text:span><text:span text:style-name="T22">prev </text:span><text:span text:style-name="T12">= </text:span><text:span text:style-name="T22">tail</text:span><text:span text:style-name="T12">;<text:line-break/><text:tab/><text:tab/><text:tab/></text:span><text:span text:style-name="T22">tail </text:span><text:span text:style-name="T12">= </text:span><text:span text:style-name="T16">to_add</text:span><text:span text:style-name="T12">;<text:line-break/><text:tab/><text:tab/>}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}<text:line-break/><text:tab/></text:span><text:span text:style-name="T18">//iterators assignment<text:line-break/><text:tab/></text:span><text:span text:style-name="T22">beg </text:span><text:span text:style-name="T17">= </text:span><text:span text:style-name="T16">l</text:span><text:span text:style-name="T12">.</text:span><text:span text:style-name="T22">beg</text:span><text:span text:style-name="T12">;<text:line-break/><text:tab/></text:span><text:span text:style-name="T22">end </text:span><text:span text:style-name="T17">= </text:span><text:span text:style-name="T16">l</text:span><text:span text:style-name="T12">.</text:span><text:span text:style-name="T22">end</text:span><text:span text:style-name="T12">;<text:line-break/>}<text:line-break/></text:span><text:span text:style-name="T16">List</text:span><text:span text:style-name="T12">::</text:span><text:span text:style-name="T17">~List</text:span><text:span text:style-name="T12">() {<text:line-break/><text:tab/></text:span><text:span text:style-name="T18">//when deleting a list we must delete list itself, all its attributes and nodes<text:line-break/><text:tab/></text:span><text:span text:style-name="T16">Node</text:span><text:span text:style-name="T12">* </text:span><text:span text:style-name="T16">cur </text:span><text:span text:style-name="T12">= </text:span><text:span text:style-name="T22">head</text:span><text:span text:style-name="T12">;<text:line-break/><text:tab/></text:span><text:span text:style-name="T16">Node</text:span><text:span text:style-name="T12">* </text:span><text:span text:style-name="T16">buf</text:span><text:span text:style-name="T12">;<text:line-break/><text:tab/></text:span><text:span text:style-name="T15">while </text:span><text:span text:style-name="T12">(</text:span><text:span text:style-name="T16">cur</text:span><text:span text:style-name="T12">) {<text:line-break/><text:tab/><text:tab/></text:span><text:span text:style-name="T16">buf </text:span><text:span text:style-name="T12">= </text:span><text:span text:style-name="T16">cur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<text:tab/></text:span><text:span text:style-name="T15">delete </text:span><text:span text:style-name="T16">buf</text:span><text:span text:style-name="T12">;<text:line-break/><text:tab/>}<text:line-break/><text:tab/></text:span><text:span text:style-name="T22">head </text:span><text:span text:style-name="T12">= </text:span><text:span text:style-name="T15">nullptr</text:span><text:span text:style-name="T12">;<text:line-break/><text:tab/></text:span><text:span text:style-name="T22">tail </text:span><text:span text:style-name="T12">= </text:span><text:span text:style-name="T15">nullptr</text:span><text:span text:style-name="T12">;<text:line-break/>}<text:line-break/><text:line-break/></text:span><text:span text:style-name="T16">List</text:span><text:span text:style-name="T12">&amp; </text:span><text:span text:style-name="T16">List</text:span><text:span text:style-name="T12">::</text:span><text:span text:style-name="T15">operator</text:span><text:span text:style-name="T12">=(</text:span><text:span text:style-name="T15">const </text:span><text:span text:style-name="T16">List</text:span><text:span text:style-name="T12">&amp; </text:span><text:span text:style-name="T16">l</text:span><text:span text:style-name="T12">) {<text:line-break/><text:tab/></text:span><text:span text:style-name="T15">if </text:span><text:span text:style-name="T12">(</text:span><text:span text:style-name="T15">this </text:span><text:span text:style-name="T12">== &amp;</text:span><text:span text:style-name="T16">l</text:span><text:span text:style-name="T12">) </text:span><text:span text:style-name="T15">return </text:span><text:span text:style-name="T12">*</text:span><text:span text:style-name="T15">this</text:span><text:span text:style-name="T12">; </text:span><text:span text:style-name="T18">//self-assignment defense<text:line-break/><text:tab/>//everything else follows the principles described in the copy connstructor<text:line-break/><text:tab/></text:span><text:span text:style-name="T22">size </text:span><text:span text:style-name="T12">= </text:span><text:span text:style-name="T16">l</text:span><text:span text:style-name="T12">.</text:span><text:span text:style-name="T22">size</text:span><text:span text:style-name="T12">;<text:line-break/><text:line-break/><text:tab/></text:span><text:span text:style-name="T15">if </text:span><text:span text:style-name="T12">(</text:span><text:span text:style-name="T22">head</text:span><text:span text:style-name="T12">) {<text:line-break/><text:tab/><text:tab/></text:span><text:span text:style-name="T16">Node</text:span><text:span text:style-name="T12">* </text:span><text:span text:style-name="T16">cur </text:span><text:span text:style-name="T12">= </text:span><text:span text:style-name="T22">head</text:span><text:span text:style-name="T12">;<text:line-break/><text:tab/><text:tab/></text:span><text:span text:style-name="T16">Node</text:span><text:span text:style-name="T12">* </text:span><text:span text:style-name="T16">buf</text:span><text:span text:style-name="T12">;<text:line-break/><text:tab/><text:tab/></text:span><text:span text:style-name="T15">while </text:span><text:span text:style-name="T12">(</text:span><text:span text:style-name="T16">cur</text:span><text:span text:style-name="T12">) {<text:line-break/><text:tab/><text:tab/><text:tab/></text:span><text:span text:style-name="T16">buf </text:span><text:span text:style-name="T12">= </text:span><text:span text:style-name="T16">cur</text:span><text:span text:style-name="T12">;<text:line-break/><text:tab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<text:tab/><text:tab/></text:span><text:span text:style-name="T15">delete </text:span><text:span text:style-name="T16">buf</text:span><text:span text:style-name="T12">;<text:line-break/><text:tab/><text:tab/>}<text:line-break/><text:tab/><text:tab/></text:span><text:span text:style-name="T22">head </text:span><text:span text:style-name="T12">= </text:span><text:span text:style-name="T15">nullptr</text:span><text:span text:style-name="T12">;<text:line-break/></text:span><text:soft-page-break/><text:span text:style-name="T12"><text:tab/><text:tab/></text:span><text:span text:style-name="T22">tail </text:span><text:span text:style-name="T12">= </text:span><text:span text:style-name="T15">nullptr</text:span><text:span text:style-name="T12">;<text:line-break/><text:tab/>}<text:line-break/><text:line-break/><text:tab/></text:span><text:span text:style-name="T16">Node</text:span><text:span text:style-name="T12">* </text:span><text:span text:style-name="T16">cur </text:span><text:span text:style-name="T12">= </text:span><text:span text:style-name="T16">l</text:span><text:span text:style-name="T12">.</text:span><text:span text:style-name="T22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22">size</text:span><text:span text:style-name="T12">; </text:span><text:span text:style-name="T16">i</text:span><text:span text:style-name="T12">++) {<text:line-break/><text:tab/><text:tab/></text:span><text:span text:style-name="T16">Node</text:span><text:span text:style-name="T12">* </text:span><text:span text:style-name="T16">to_add </text:span><text:span text:style-name="T12">= </text:span><text:span text:style-name="T15">new </text:span><text:span text:style-name="T16">Node</text:span><text:span text:style-name="T17">(</text:span><text:span text:style-name="T16">cur</text:span><text:span text:style-name="T12">-&gt;</text:span><text:span text:style-name="T22">data</text:span><text:span text:style-name="T17">)</text:span><text:span text:style-name="T12">;<text:line-break/><text:tab/><text:tab/></text:span><text:span text:style-name="T15">if </text:span><text:span text:style-name="T12">(!</text:span><text:span text:style-name="T22">head</text:span><text:span text:style-name="T12">) {<text:line-break/><text:tab/><text:tab/><text:tab/></text:span><text:span text:style-name="T22">head </text:span><text:span text:style-name="T12">= </text:span><text:span text:style-name="T16">to_add</text:span><text:span text:style-name="T12">;<text:line-break/><text:tab/><text:tab/><text:tab/></text:span><text:span text:style-name="T22">tail </text:span><text:span text:style-name="T12">= </text:span><text:span text:style-name="T16">to_add</text:span><text:span text:style-name="T12">;<text:line-break/><text:tab/><text:tab/>}<text:line-break/><text:tab/><text:tab/></text:span><text:span text:style-name="T15">else </text:span><text:span text:style-name="T12">{<text:line-break/><text:tab/><text:tab/><text:tab/></text:span><text:span text:style-name="T22">tail</text:span><text:span text:style-name="T12">-&gt;</text:span><text:span text:style-name="T22">next </text:span><text:span text:style-name="T12">= </text:span><text:span text:style-name="T16">to_add</text:span><text:span text:style-name="T12">;<text:line-break/><text:tab/><text:tab/><text:tab/></text:span><text:span text:style-name="T22">tail</text:span><text:span text:style-name="T12">-&gt;</text:span><text:span text:style-name="T22">next</text:span><text:span text:style-name="T12">-&gt;</text:span><text:span text:style-name="T22">prev </text:span><text:span text:style-name="T12">= </text:span><text:span text:style-name="T22">tail</text:span><text:span text:style-name="T12">;<text:line-break/><text:tab/><text:tab/><text:tab/></text:span><text:span text:style-name="T22">tail </text:span><text:span text:style-name="T12">= </text:span><text:span text:style-name="T16">to_add</text:span><text:span text:style-name="T12">;<text:line-break/><text:tab/><text:tab/>}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}<text:line-break/><text:line-break/><text:tab/></text:span><text:span text:style-name="T22">beg </text:span><text:span text:style-name="T17">= </text:span><text:span text:style-name="T16">l</text:span><text:span text:style-name="T12">.</text:span><text:span text:style-name="T22">beg</text:span><text:span text:style-name="T12">;<text:line-break/><text:tab/></text:span><text:span text:style-name="T22">end </text:span><text:span text:style-name="T17">= </text:span><text:span text:style-name="T16">l</text:span><text:span text:style-name="T12">.</text:span><text:span text:style-name="T22">end</text:span><text:span text:style-name="T12">;<text:line-break/><text:line-break/><text:tab/></text:span><text:span text:style-name="T15">return </text:span><text:span text:style-name="T12">*</text:span><text:span text:style-name="T15">this</text:span><text:span text:style-name="T12">;<text:line-break/>}<text:line-break/></text:span><text:span text:style-name="T15">int</text:span><text:span text:style-name="T12">&amp; </text:span><text:span text:style-name="T16">List</text:span><text:span text:style-name="T12">::</text:span><text:span text:style-name="T15">operator</text:span><text:span text:style-name="T12">[](</text:span><text:span text:style-name="T15">int </text:span><text:span text:style-name="T16">index</text:span><text:span text:style-name="T12">) {<text:line-break/><text:tab/></text:span><text:span text:style-name="T18">//when recieving an index, we should iterate over a list until we find the correctly indexed element or reach the end of the list. O(n) operation<text:line-break/><text:tab/></text:span><text:span text:style-name="T15">if </text:span><text:span text:style-name="T12">(</text:span><text:span text:style-name="T16">index </text:span><text:span text:style-name="T12">&lt; </text:span><text:span text:style-name="T22">size</text:span><text:span text:style-name="T12">) {<text:line-break/><text:tab/><text:tab/></text:span><text:span text:style-name="T16">Node</text:span><text:span text:style-name="T12">* </text:span><text:span text:style-name="T16">cur </text:span><text:span text:style-name="T12">= </text:span><text:span text:style-name="T22">head</text:span><text:span text:style-name="T12">;<text:line-break/><text:tab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16">index</text:span><text:span text:style-name="T12">; </text:span><text:span text:style-name="T16">i</text:span><text:span text:style-name="T12">++) {<text:line-break/><text:tab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<text:tab/>}<text:line-break/><text:tab/><text:tab/></text:span><text:span text:style-name="T15">return </text:span><text:span text:style-name="T16">cur</text:span><text:span text:style-name="T12">-&gt;</text:span><text:span text:style-name="T22">data</text:span><text:span text:style-name="T12">;<text:line-break/><text:tab/>}<text:line-break/><text:tab/></text:span><text:span text:style-name="T21">else </text:span><text:span text:style-name="T12">{<text:line-break/><text:tab/><text:tab/></text:span><text:span text:style-name="T16">std</text:span><text:span text:style-name="T12">::</text:span><text:span text:style-name="T16">cout </text:span><text:span text:style-name="T17">&lt;&lt; </text:span><text:span text:style-name="T14">"ERROR!"</text:span><text:span text:style-name="T12">;<text:line-break/><text:tab/><text:tab/></text:span><text:span text:style-name="T15">int </text:span><text:span text:style-name="T16">stub</text:span><text:span text:style-name="T12">;<text:line-break/><text:tab/><text:tab/></text:span><text:span text:style-name="T15">return </text:span><text:span text:style-name="T16">stub</text:span><text:span text:style-name="T12">;<text:line-break/><text:tab/>}<text:line-break/></text:span><text:soft-page-break/><text:span text:style-name="T12">}<text:line-break/></text:span><text:span text:style-name="T16">List List</text:span><text:span text:style-name="T12">::</text:span><text:span text:style-name="T15">operator</text:span><text:span text:style-name="T12">*(</text:span><text:span text:style-name="T15">const </text:span><text:span text:style-name="T16">List</text:span><text:span text:style-name="T12">&amp; </text:span><text:span text:style-name="T16">l</text:span><text:span text:style-name="T12">) {<text:line-break/><text:tab/></text:span><text:span text:style-name="T18">//we create a new list that is as long as the shortest of two<text:line-break/><text:tab/>//and it's elements' values are equal to a multiplication of<text:line-break/><text:tab/>//values with the same indices from two multiplied lists<text:line-break/><text:tab/></text:span><text:span text:style-name="T16">List ans</text:span><text:span text:style-name="T17">(</text:span><text:span text:style-name="T21">(</text:span><text:span text:style-name="T22">size </text:span><text:span text:style-name="T12">&gt; </text:span><text:span text:style-name="T16">l</text:span><text:span text:style-name="T12">.</text:span><text:span text:style-name="T22">size</text:span><text:span text:style-name="T21">) </text:span><text:span text:style-name="T12">? </text:span><text:span text:style-name="T16">l</text:span><text:span text:style-name="T12">.</text:span><text:span text:style-name="T22">size </text:span><text:span text:style-name="T12">: </text:span><text:span text:style-name="T22">size</text:span><text:span text:style-name="T17">)</text:span><text:span text:style-name="T12">;<text:line-break/><text:tab/></text:span><text:span text:style-name="T16">Node</text:span><text:span text:style-name="T12">* </text:span><text:span text:style-name="T16">a </text:span><text:span text:style-name="T12">= </text:span><text:span text:style-name="T22">head</text:span><text:span text:style-name="T12">;<text:line-break/><text:tab/></text:span><text:span text:style-name="T16">Node</text:span><text:span text:style-name="T12">* </text:span><text:span text:style-name="T16">b </text:span><text:span text:style-name="T12">= </text:span><text:span text:style-name="T16">l</text:span><text:span text:style-name="T12">.</text:span><text:span text:style-name="T22">head</text:span><text:span text:style-name="T12">;<text:line-break/><text:tab/></text:span><text:span text:style-name="T16">Node</text:span><text:span text:style-name="T12">* </text:span><text:span text:style-name="T16">cur </text:span><text:span text:style-name="T12">= </text:span><text:span text:style-name="T16">ans</text:span><text:span text:style-name="T12">.</text:span><text:span text:style-name="T22">head</text:span><text:span text:style-name="T12">;<text:line-break/><text:tab/></text:span><text:span text:style-name="T15">while </text:span><text:span text:style-name="T12">(</text:span><text:span text:style-name="T16">a </text:span><text:span text:style-name="T12">&amp;&amp; </text:span><text:span text:style-name="T16">b</text:span><text:span text:style-name="T12">) {<text:line-break/><text:tab/><text:tab/></text:span><text:span text:style-name="T16">cur</text:span><text:span text:style-name="T12">-&gt;</text:span><text:span text:style-name="T22">data </text:span><text:span text:style-name="T12">= </text:span><text:span text:style-name="T16">a</text:span><text:span text:style-name="T12">-&gt;</text:span><text:span text:style-name="T22">data </text:span><text:span text:style-name="T12">* </text:span><text:span text:style-name="T16">b</text:span><text:span text:style-name="T12">-&gt;</text:span><text:span text:style-name="T22">data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<text:tab/></text:span><text:span text:style-name="T16">a </text:span><text:span text:style-name="T12">= </text:span><text:span text:style-name="T16">a</text:span><text:span text:style-name="T12">-&gt;</text:span><text:span text:style-name="T22">next</text:span><text:span text:style-name="T12">;<text:line-break/><text:tab/><text:tab/></text:span><text:span text:style-name="T16">b </text:span><text:span text:style-name="T12">= </text:span><text:span text:style-name="T16">b</text:span><text:span text:style-name="T12">-&gt;</text:span><text:span text:style-name="T22">next</text:span><text:span text:style-name="T12">;<text:line-break/><text:tab/>}<text:line-break/><text:tab/></text:span><text:span text:style-name="T15">return </text:span><text:span text:style-name="T16">ans</text:span><text:span text:style-name="T12">;<text:line-break/>}<text:line-break/></text:span><text:span text:style-name="T18">//a simple getter<text:line-break/></text:span><text:span text:style-name="T15">int </text:span><text:span text:style-name="T16">List</text:span><text:span text:style-name="T12">::</text:span><text:span text:style-name="T15">operator</text:span><text:span text:style-name="T12">() () {<text:line-break/><text:tab/></text:span><text:span text:style-name="T15">return </text:span><text:span text:style-name="T22">size</text:span><text:span text:style-name="T12">;<text:line-break/>}<text:line-break/></text:span><text:span text:style-name="T18">//i/o overload inputs/outputs data fields of nodes<text:line-break/>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List</text:span><text:span text:style-name="T12">&amp; </text:span><text:span text:style-name="T16">l</text:span><text:span text:style-name="T12">) {<text:line-break/><text:tab/></text:span><text:span text:style-name="T16">Node</text:span><text:span text:style-name="T12">* </text:span><text:span text:style-name="T16">cur </text:span><text:span text:style-name="T12">= </text:span><text:span text:style-name="T16">l</text:span><text:span text:style-name="T12">.</text:span><text:span text:style-name="T22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16">l</text:span><text:span text:style-name="T12">.</text:span><text:span text:style-name="T22">size</text:span><text:span text:style-name="T12">; </text:span><text:span text:style-name="T16">i</text:span><text:span text:style-name="T12">++) {<text:line-break/><text:tab/><text:tab/></text:span><text:span text:style-name="T16">out </text:span><text:span text:style-name="T17">&lt;&lt; </text:span><text:span text:style-name="T16">cur</text:span><text:span text:style-name="T12">-&gt;</text:span><text:span text:style-name="T22">data </text:span><text:span text:style-name="T17">&lt;&lt; </text:span><text:span text:style-name="T14">" "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}<text:line-break/><text:tab/></text:span><text:span text:style-name="T15">return </text:span><text:span text:style-name="T16">out</text:span><text:span text:style-name="T12">;<text:line-break/>}<text:line-break/>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(</text:span><text:span text:style-name="T16">std</text:span><text:span text:style-name="T12">::</text:span><text:span text:style-name="T16">istream</text:span><text:span text:style-name="T12">&amp; </text:span><text:span text:style-name="T16">in</text:span><text:span text:style-name="T12">, </text:span><text:span text:style-name="T16">List</text:span><text:span text:style-name="T12">&amp; </text:span><text:span text:style-name="T16">l</text:span><text:span text:style-name="T12">) {<text:line-break/><text:tab/></text:span><text:span text:style-name="T16">Node</text:span><text:span text:style-name="T12">* </text:span><text:span text:style-name="T16">cur </text:span><text:span text:style-name="T12">= </text:span><text:span text:style-name="T16">l</text:span><text:span text:style-name="T12">.</text:span><text:span text:style-name="T22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19">0</text:span><text:span text:style-name="T12">; </text:span><text:span text:style-name="T16">i </text:span><text:span text:style-name="T12">&lt; </text:span><text:span text:style-name="T16">l</text:span><text:span text:style-name="T12">.</text:span><text:span text:style-name="T22">size</text:span><text:span text:style-name="T12">; </text:span><text:span text:style-name="T16">i</text:span><text:span text:style-name="T12">++) {<text:line-break/><text:tab/><text:tab/></text:span><text:span text:style-name="T16">in </text:span><text:span text:style-name="T17">&gt;&gt; </text:span><text:span text:style-name="T16">cur</text:span><text:span text:style-name="T12">-&gt;</text:span><text:span text:style-name="T22">data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22">next</text:span><text:span text:style-name="T12">;<text:line-break/><text:tab/>}<text:line-break/><text:tab/></text:span><text:span text:style-name="T15">return </text:span><text:span text:style-name="T16">in</text:span><text:span text:style-name="T12">;<text:line-break/>}</text:span></text:p>
      <text:p text:style-name="P22" loext:marker-style-name="T1">Решение</text:p>
      <text:p text:style-name="P23" loext:marker-style-name="T1"><draw:frame draw:style-name="fr3" draw:name="Изображение4" text:anchor-type="as-char" svg:width="4.3591in" svg:height="4.5374in" draw:z-index="1"><draw:image xlink:href="Pictures/10000001000000A7000000E406A7D61B.png" xlink:type="simple" xlink:show="embed" xlink:actuate="onLoad" draw:mime-type="image/png"/></draw:frame></text:p>
      <text:p text:style-name="P23" loext:marker-style-name="T1"/>
      <text:p text:style-name="P24" loext:marker-style-name="T1">Контрольные вопросы</text:p>
      <text:p text:style-name="P25"><text:span text:style-name="Strong_20_Emphasis"><text:span text:style-name="T23">1. Что такое абстрактный тип данных? Привести примеры АТД. — </text:span></text:span><text:span text:style-name="Strong_20_Emphasis"><text:span text:style-name="T24">модель типа данных, определяемая интерфейсом (набором операций) и поведением, скрывающая способ представления данных и реализацию операций. Работает по принципам Инкапсуляции и Абстракции. Примеры: Вектор, Список, Стек, Очередь, Словарь</text:span></text:span></text:p>
      <text:p text:style-name="P25"><text:span text:style-name="Strong_20_Emphasis"><text:span text:style-name="T23">2. Привести примеры абстракции через параметризацию. — </text:span></text:span><text:span text:style-name="Strong_20_Emphasis"><text:span text:style-name="T24">Создание шаблонов классов/функций.</text:span></text:span></text:p>
      <text:p text:style-name="P25"><text:span text:style-name="Strong_20_Emphasis"><text:span text:style-name="T23">3. Привести примеры абстракции через спецификацию. — </text:span></text:span><text:span text:style-name="Strong_20_Emphasis"><text:span text:style-name="T24">Реализация одной и той же структуры с разной «начинкой», но одинаковыми наименованиями методов.</text:span></text:span></text:p>
      <text:p text:style-name="P25"><text:span text:style-name="Strong_20_Emphasis"><text:span text:style-name="T23">4. Что такое контейнер? Привести примеры. — </text:span></text:span><text:span text:style-name="Strong_20_Emphasis"><text:span text:style-name="T24">Объект или структура данных, предназначенные для хранения других объектов и предоставляющий доступ к ним. Примеры: Список, Стек, Очередь.</text:span></text:span></text:p>
      <text:p text:style-name="P25"><text:span text:style-name="Strong_20_Emphasis"><text:span text:style-name="T23">5. Какие группы операций выделяют в контейнерах? — </text:span></text:span><text:span text:style-name="Strong_20_Emphasis"><text:span text:style-name="T25">Конструирование, доступ, вставка, удаление, поиск, размер, итерация, сортировка и пр.</text:span></text:span></text:p>
      <text:p text:style-name="P25"><text:span text:style-name="Strong_20_Emphasis"><text:span text:style-name="T23">6. Какие виды доступа к элементам контейнера существуют? Привести примеры. — </text:span></text:span><text:span text:style-name="Strong_20_Emphasis"><text:span text:style-name="T25">Прямой по индексу, последовательный через итератор, косвенный по ключу, доступ к границам/граням</text:span></text:span></text:p>
      <text:p text:style-name="P25"><text:span text:style-name="Strong_20_Emphasis"><text:span text:style-name="T23">7. Что такое итератор? — </text:span></text:span><text:span text:style-name="Strong_20_Emphasis"><text:span text:style-name="T25">объект указывающий на элемент контейнера, позволяющий перебирать элементы последовательно</text:span></text:span></text:p>
      <text:p text:style-name="P25"><text:span text:style-name="Strong_20_Emphasis"><text:span text:style-name="T23">8. Каким образом может быть реализован итератор? — </text:span></text:span><text:span text:style-name="Strong_20_Emphasis"><text:span text:style-name="T25">встроенный указатель для контейнеров на простых типах данных, либо как пользовательский класс</text:span></text:span></text:p>
      <text:p text:style-name="P25"><text:span text:style-name="Strong_20_Emphasis"><text:span text:style-name="T23">9. Каким образом можно организовать объединение контейнеров? — </text:span></text:span><text:span text:style-name="Strong_20_Emphasis"><text:span text:style-name="T25">Копирование, Вставка, Слияние</text:span></text:span></text:p>
      <text:p text:style-name="P25"><text:span text:style-name="Strong_20_Emphasis"><text:span text:style-name="T23">10. Какой доступ к элементам предоставляет контейнер, состоящий из элементов «ключ-значение»? — </text:span></text:span><text:span text:style-name="Strong_20_Emphasis"><text:span text:style-name="T25">Ассоциативный</text:span></text:span></text:p>
      <text:p text:style-name="P25"><text:span text:style-name="Strong_20_Emphasis"><text:span text:style-name="T23">11. Как называется контейнер, в котором вставка и удаление элементов выполняется на одном конце контейнера? — </text:span></text:span><text:span text:style-name="Strong_20_Emphasis"><text:span text:style-name="T25">Стек</text:span></text:span></text:p>
      <text:p text:style-name="P25"><text:span text:style-name="Strong_20_Emphasis"><text:span text:style-name="T23">12. Какой из объектов (a,b,c,d) является контейнером?</text:span></text:span></text:p>
      <text:p text:style-name="P25"><text:span text:style-name="Strong_20_Emphasis"><text:span text:style-name="T23">a. int mas=10;</text:span></text:span></text:p>
      <text:p text:style-name="P25"><text:span text:style-name="Strong_20_Emphasis"><text:span text:style-name="T23">b. 2. int mas;</text:span></text:span></text:p>
      <text:p text:style-name="P25"><text:span text:style-name="Strong_20_Emphasis"><text:span text:style-name="T23">c. 3. struct {char name[30]; int age;} mas;</text:span></text:span></text:p>
      <text:p text:style-name="P25"><text:span text:style-name="Strong_20_Emphasis"><text:span text:style-name="T23">d. 4. int mas[100];</text:span></text:span></text:p>
      <text:p text:style-name="P25"><text:span text:style-name="Strong_20_Emphasis"><text:span text:style-name="T23"/></text:span></text:p>
      <text:p text:style-name="P26"><text:span text:style-name="Strong_20_Emphasis"><text:span text:style-name="T26">d</text:span></text:span></text:p>
      <text:p text:style-name="P25"><text:span text:style-name="Strong_20_Emphasis"><text:span text:style-name="T23"/></text:span></text:p>
      <text:p text:style-name="P25"><text:span text:style-name="Strong_20_Emphasis"><text:span text:style-name="T23">13. Какой из объектов (a,b,c,d) не является контейнером?</text:span></text:span></text:p>
      <text:p text:style-name="P25"><text:span text:style-name="Strong_20_Emphasis"><text:span text:style-name="T23">a. int a[]={1,2,3,4,5};</text:span></text:span></text:p>
      <text:p text:style-name="P25"><text:soft-page-break/><text:span text:style-name="Strong_20_Emphasis"><text:span text:style-name="T23">b. 2. int mas[30];</text:span></text:span></text:p>
      <text:p text:style-name="P25"><text:span text:style-name="Strong_20_Emphasis"><text:span text:style-name="T23">c. 3. struct {char name[30]; int age;} mas[30];</text:span></text:span></text:p>
      <text:p text:style-name="P25"><text:span text:style-name="Strong_20_Emphasis"><text:span text:style-name="T23">d. 4. int mas;</text:span></text:span></text:p>
      <text:p text:style-name="P25"><text:span text:style-name="Strong_20_Emphasis"><text:span text:style-name="T23"/></text:span></text:p>
      <text:p text:style-name="P26"><text:span text:style-name="Strong_20_Emphasis"><text:span text:style-name="T26">d</text:span></text:span></text:p>
      <text:p text:style-name="P25"><text:span text:style-name="Strong_20_Emphasis"><text:span text:style-name="T23"/></text:span></text:p>
      <text:p text:style-name="P25"><text:span text:style-name="Strong_20_Emphasis"><text:span text:style-name="T23">14. Контейнер реализован как динамический массив, в нем определена операция доступ по индексу. Каким будет доступ к элементам контейнера? - </text:span></text:span><text:span text:style-name="Strong_20_Emphasis"><text:span text:style-name="T24">Прямым</text:span></text:span></text:p>
      <text:p text:style-name="P25"><text:span text:style-name="Strong_20_Emphasis"><text:span text:style-name="T23">15. Контейнер реализован как линейный список. Каким будет доступ к элементам контейнера? —</text:span></text:span><text:span text:style-name="Strong_20_Emphasis"><text:span text:style-name="T24"> Последовательным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61</meta:editing-cycles>
    <meta:creation-date>2025-12-13T14:37:00</meta:creation-date>
    <dc:date>2026-05-03T11:40:20.825262470</dc:date>
    <meta:editing-duration>PT17H27M22S</meta:editing-duration>
    <meta:generator>LibreOffice/25.8.5.2$Linux_X86_64 LibreOffice_project/580$Build-2</meta:generator>
    <meta:document-statistic meta:table-count="0" meta:image-count="3" meta:object-count="0" meta:page-count="13" meta:paragraph-count="63" meta:word-count="1521" meta:character-count="10108" meta:non-whitespace-character-count="8287"/>
    <meta:user-defined meta:name="AppVersion">16.0000</meta:user-defined>
    <meta:template xlink:type="simple" xlink:actuate="onRequest" xlink:title="Normal" xlink:href=""/>
  </office:meta>
</office:document-meta>
</file>